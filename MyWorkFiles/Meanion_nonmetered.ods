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3.7492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ta1" style:family="table" style:master-page-name="PageStyle_5f_Menaion_5f_Vespers_5f_notmetered">
      <style:table-properties table:display="true" style:writing-mode="lr-tb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1" table:print="false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4" table:default-cell-style-name="ce31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4])" office:value-type="float" office:value="787">
            <text:p>787</text:p>
          </table:table-cell>
          <table:table-cell table:style-name="ce44" office:value-type="string">
            <text:p>of 852</text:p>
          </table:table-cell>
          <table:table-cell table:style-name="ce45" table:formula="of:=852-[.D2]" office:value-type="float" office:value="65">
            <text:p>6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Aposticha1 </text:p>
          </table:table-cell>
          <table:table-cell table:style-name="ce17" office:value-type="date" office:date-value="2025-01-02">
            <text:p>01/02/25</text:p>
          </table:table-cell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Aposticha2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Aposticha3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Stichera01 </text:p>
          </table:table-cell>
          <table:table-cell table:style-name="ce19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Stichera02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Stichera03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7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7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7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7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2.d21_en_US_barrett.meVE.SticTheotokion </text:p>
          </table:table-cell>
          <table:table-cell table:style-name="ce24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2.d26_en_US_dedes.meVE.SticStavrotheotokion </text:p>
          </table:table-cell>
          <table:table-cell table:style-name="ce24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oca.meVE.Stichera01 </text:p>
          </table:table-cell>
          <table:table-cell table:style-name="ce27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2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oca.meVE.Stichera02 </text:p>
          </table:table-cell>
          <table:table-cell table:style-name="ce28"/>
          <table:table-cell table:style-name="ce13" office:value-type="string">
            <text:p>goadedes</text:p>
          </table:table-cell>
          <table:table-cell table:style-name="ce2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oca.meVE.Stichera03 </text:p>
          </table:table-cell>
          <table:table-cell table:style-name="ce28"/>
          <table:table-cell table:style-name="ce13" office:value-type="string">
            <text:p>goadedes</text:p>
          </table:table-cell>
          <table:table-cell table:style-name="ce28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4.d11_en_US_dedes.meVE.SticStavrotheotokion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4.d12_en_US_dedes.meVE.Stichera02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2_en_US_dedes.meVE.Stichera03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3_en_US_oca.meVE.Stichera01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3_en_US_oca.meVE.Stichera02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3_en_US_oca.meVE.Stichera03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0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0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4.d25_en_US_oca.meVE.Stichera04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5_en_US_oca.meVE.Stichera05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5_en_US_oca.meVE.Stichera06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6_en_US_oca.meVE.Stichera01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6_en_US_oca.meVE.Stichera02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6_en_US_oca.meVE.Stichera03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7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7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7_en_US_oca.meVE.Apolytikion1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30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30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5.d08_en_US_oca.meVE.Stichera04 </text:p>
          </table:table-cell>
          <table:table-cell table:style-name="ce29" office:value-type="string">
            <text:p>not use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5.d08_en_US_oca.meVE.Stichera05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5.d08_en_US_oca.meVE.Stichera06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4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4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6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6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e.m06.d30_en_US_oca.meVE.Stichera06 </text:p>
          </table:table-cell>
          <table:table-cell table:style-name="ce32"/>
          <table:table-cell table:style-name="ce15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6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6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5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6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dedes.meVE.Stichera04 </text:p>
          </table:table-cell>
          <table:table-cell table:style-name="ce34" office:value-type="string">
            <text:p>NA E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8.d16_en_US_dedes.meVE.Stichera05 </text:p>
          </table:table-cell>
          <table:table-cell table:style-name="ce34" office:value-type="string">
            <text:p>NA E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8.d16_en_US_dedes.meVE.Stichera06 </text:p>
          </table:table-cell>
          <table:table-cell table:style-name="ce34" office:value-type="string">
            <text:p>NA E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30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3_en_US_dedes.meVE.AposTheotokion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0.d03_en_US_dedes.meVE.SticTheotokion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9_en_US_dedes.meVE.Stichera04 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6" office:value-type="string">
            <text:p>me.m10.d19_en_US_dedes.meVE.Stichera05 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6" office:value-type="string">
            <text:p>me.m10.d19_en_US_dedes.meVE.Stichera06 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28_en_US_dedes.meVE.Stichera01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2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3</text:p>
          </table:table-cell>
          <table:table-cell table:style-name="ce34"/>
          <table:table-cell table:number-columns-repeated="1022"/>
        </table:table-row>
        <table:table-row table:style-name="ro2">
          <table:table-cell table:style-name="ce3" office:value-type="string">
            <text:p>me.m10.28_en_US_dedes.meVE.Stichera04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5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6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4_en_US_dedes.meVE.SticTheotokion </text:p>
          </table:table-cell>
          <table:table-cell table:style-name="ce24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4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4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40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40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41" office:value-type="string">
            <text:p>goadedes</text:p>
          </table:table-cell>
          <table:table-cell table:style-name="ce41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4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7_en_US_dedes.meVE.Stichera04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hera05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hera06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Stavrotheotokion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Theotokion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4_en_US_dedes.meVE.Stichera01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dedes.meVE.Stichera02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dedes.meVE.Stichera03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oca.meVE.Stichera04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oca.meVE.Stichera05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oca.meVE.Stichera06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21_en_US_dedes.meVE.Stichera04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dedes.meVE.Stichera05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dedes.meVE.Stichera06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Aposticha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Aposticha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Aposticha3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Stichera0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Stichera0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Stichera03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 table:number-rows-repeated="1047282">
          <table:table-cell table:number-columns-repeated="1024"/>
        </table:table-row>
        <table:table-row table:style-name="ro3" table:number-rows-repeated="4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6">05/26/2026</text:date>, <text:time>08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26T08:13:32.08</dc:date>
    <dc:creator>Alex Dedes</dc:creator>
    <meta:document-statistic meta:table-count="4" meta:cell-count="3749" meta:object-count="0"/>
    <meta:generator>OpenOffice/4.1.15$Win32 OpenOffice.org_project/4115m2$Build-9813</meta:generator>
  </office:meta>
</office:document-meta>
</file>