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0717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3445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3.7492in"/>
    </style:style>
    <style:style style:name="co13" style:family="table-column">
      <style:table-column-properties fo:break-before="auto" style:column-width="0.5256in"/>
    </style:style>
    <style:style style:name="co14" style:family="table-column">
      <style:table-column-properties fo:break-before="auto" style:column-width="0.4508in"/>
    </style:style>
    <style:style style:name="co15" style:family="table-column">
      <style:table-column-properties fo:break-before="auto" style:column-width="3.1043in"/>
    </style:style>
    <style:style style:name="co16" style:family="table-column">
      <style:table-column-properties fo:break-before="auto" style:column-width="1.2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3" style:family="table-cell" style:parent-style-name="Default">
      <style:table-cell-properties fo:background-color="#ffff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4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5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66" style:family="table-cell" style:parent-style-name="Excel_20_Built-in_20_Normal">
      <style:table-cell-properties fo:background-color="#ff33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 style:data-style-name="N37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66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37">
      <style:table-cell-properties fo:background-color="#ffff66" style:text-align-source="fix" style:repeat-content="false"/>
      <style:paragraph-properties fo:text-align="center" fo:margin-left="0in"/>
    </style:style>
    <style:style style:name="ce81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Menaion Vespers Idiomela" table:style-name="ta1" table:print="false">
        <office:forms form:automatic-focus="false" form:apply-design-mode="false"/>
        <table:table-column table:style-name="co15" table:default-cell-style-name="Default"/>
        <table:table-column table:style-name="co2" table:default-cell-style-name="ce77"/>
        <table:table-column table:style-name="co16" table:default-cell-style-name="ce9"/>
        <table:table-column table:style-name="co2" table:number-columns-repeated="3" table:default-cell-style-name="ce9"/>
        <table:table-row table:style-name="ro1">
          <table:table-cell table:style-name="ce1" office:value-type="string">
            <text:p>Idiomela</text:p>
          </table:table-cell>
          <table:table-cell table:style-name="ce76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76"/>
          <table:table-cell table:style-name="ce8" office:value-type="string">
            <text:p>Total so far:</text:p>
          </table:table-cell>
          <table:table-cell table:style-name="ce12" table:formula="of:=SUM([.D3:.D200])" office:value-type="float" office:value="28">
            <text:p>28</text:p>
          </table:table-cell>
          <table:table-cell table:style-name="ce13"/>
          <table:table-cell table:style-name="ce14" table:formula="of:=198-[.D2]" office:value-type="float" office:value="170">
            <text:p>170</text:p>
          </table:table-cell>
        </table:table-row>
        <table:table-row table:style-name="ro1">
          <table:table-cell office:value-type="string">
            <text:p><text:s/>me.m01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7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2_en_US_oca.meVE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2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7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3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1_en_US_oca.meVE.SticBoth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2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3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13_en_US_oca.meVE.Apolytikion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1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3.d0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08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6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5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08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6.d1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7 <text:s/></text:p>
          </table:table-cell>
          <table:table-cell table:number-columns-repeated="5"/>
        </table:table-row>
        <table:table-row table:style-name="ro1">
          <table:table-cell table:style-name="ce74" office:value-type="string">
            <text:p><text:s/>me.m06.d29_en_US_oca.meVE.Aposticha1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6-25">
            <text:p>06/25/26</text:p>
          </table:table-cell>
        </table:table-row>
        <table:table-row table:style-name="ro1">
          <table:table-cell table:style-name="ce74" office:value-type="string">
            <text:p><text:s/>me.m06.d29_en_US_oca.meVE.Aposticha2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6-25">
            <text:p>06/25/26</text:p>
          </table:table-cell>
        </table:table-row>
        <table:table-row table:style-name="ro1">
          <table:table-cell table:style-name="ce74" office:value-type="string">
            <text:p><text:s/>me.m06.d29_en_US_oca.meVE.Aposticha3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b</text:p>
          </table:table-cell>
          <table:table-cell table:style-name="ce79" office:value-type="date" office:date-value="2026-06-25">
            <text:p>06/25/26</text:p>
          </table:table-cell>
        </table:table-row>
        <table:table-row table:style-name="ro1">
          <table:table-cell table:style-name="ce74" office:value-type="string">
            <text:p><text:s/>me.m06.d29_en_US_oca.meVE.Lity1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4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5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7.d01_en_US_oca.meVE.LityGlory <text:s/></text:p>
          </table:table-cell>
          <table:table-cell office:value-type="date" office:date-value="2026-06-26">
            <text:p>06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02_en_US_oca.meVE.SticGlory <text:s/></text:p>
          </table:table-cell>
          <table:table-cell table:style-name="ce7" office:value-type="date" office:date-value="2026-06-26">
            <text:p>06/26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17_en_US_oca.meVE.SticGlory <text:s/></text:p>
          </table:table-cell>
          <table:table-cell office:value-type="date" office:date-value="2026-06-29">
            <text:p>06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22_en_US_oca.meVE.Apos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table:number-columns-repeated="3"/>
        </table:table-row>
        <table:table-row table:style-name="ro1">
          <table:table-cell table:style-name="ce75" office:value-type="string">
            <text:p><text:s/>me.m07.d22_en_US_oca.meVE.Stic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2">
            <text:p>2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24_en_US_oca.meVE.Apos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7.d24_en_US_oca.meVE.Stic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7.d27_en_US_oca.meVE.Lity2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3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4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5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4">
            <text:p>4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01_en_US_oca.meVE.Apos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VE.Stic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8.d22_en_US_oca.meVE.AposBoth <text:s/></text:p>
          </table:table-cell>
          <table:table-cell table:style-name="ce79" office:value-type="date" office:date-value="2026-07-04">
            <text:p>07/0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26_en_US_oca.meVE.AposGlory <text:s/></text:p>
          </table:table-cell>
          <table:table-cell office:value-type="date" office:date-value="2026-07-04">
            <text:p>07/04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26_en_US_oca.meVE.SticGlory <text:s/></text:p>
          </table:table-cell>
          <table:table-cell office:value-type="date" office:date-value="2026-07-04">
            <text:p>07/04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8.d29_en_US_oca.meVE.Aposticha2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7-07">
            <text:p>07/07/26</text:p>
          </table:table-cell>
        </table:table-row>
        <table:table-row table:style-name="ro1">
          <table:table-cell table:style-name="ce74" office:value-type="string">
            <text:p><text:s/>me.m08.d29_en_US_oca.meVE.Aposticha3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7-07">
            <text:p>07/07/26</text:p>
          </table:table-cell>
        </table:table-row>
        <table:table-row table:style-name="ro1">
          <table:table-cell table:style-name="ce74" office:value-type="string">
            <text:p><text:s/>me.m08.d29_en_US_oca.meVE.Lity1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2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3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Glory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6">
            <text:p>6</text:p>
          </table:table-cell>
          <table:table-cell table:style-name="ce81" table:number-columns-repeated="2"/>
        </table:table-row>
        <table:table-row table:style-name="ro1">
          <table:table-cell table:style-name="ce74" office:value-type="string">
            <text:p><text:s/>me.m08.d29_en_US_oca.meVE.Stichera02 <text:s/></text:p>
          </table:table-cell>
          <table:table-cell table:style-name="ce79" office:value-type="date" office:date-value="2026-07-05">
            <text:p>07/05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7-06">
            <text:p>07/06/26</text:p>
          </table:table-cell>
        </table:table-row>
        <table:table-row table:style-name="ro1">
          <table:table-cell table:style-name="ce74" office:value-type="string">
            <text:p><text:s/>me.m08.d29_en_US_oca.meVE.Stichera03 <text:s/></text:p>
          </table:table-cell>
          <table:table-cell table:style-name="ce79" office:value-type="date" office:date-value="2026-07-05">
            <text:p>07/05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b</text:p>
          </table:table-cell>
          <table:table-cell table:style-name="ce79" office:value-type="date" office:date-value="2026-07-06">
            <text:p>07/06/26</text:p>
          </table:table-cell>
        </table:table-row>
        <table:table-row table:style-name="ro1">
          <table:table-cell office:value-type="string">
            <text:p><text:s/>me.m08.d31_en_US_oca.meVE.AposGlory <text:s/></text:p>
          </table:table-cell>
          <table:table-cell office:value-type="date" office:date-value="2026-07-06">
            <text:p>07/0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3" office:value-type="string">
            <text:p><text:s/>me.m09.d0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Stichera0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08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14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7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2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9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10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1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6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0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13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2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0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0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VE.Apolytikion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Apos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BC_en_US_oca.meVE.LityBoth <text:s/></text:p>
          </table:table-cell>
          <table:table-cell table:style-name="ce78"/>
          <table:table-cell table:style-name="ce80" table:number-columns-repeated="4"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Matins Idiomela" table:style-name="ta1" table:print="false">
        <office:forms form:automatic-focus="false" form:apply-design-mode="false"/>
        <table:table-column table:style-name="co17" table:default-cell-style-name="Default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43])" office:value-type="float" office:value="6">
            <text:p>6</text:p>
          </table:table-cell>
          <table:table-cell table:style-name="ce13"/>
          <table:table-cell table:style-name="ce14" table:formula="of:=41-[.D2]" office:value-type="float" office:value="35">
            <text:p>35</text:p>
          </table:table-cell>
        </table:table-row>
        <table:table-row table:style-name="ro1">
          <table:table-cell table:style-name="ce73" office:value-type="string">
            <text:p><text:s/>me.m01.d02_en_US_oca.meMA.Aposticha1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2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3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10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6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8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9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3.d09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7.d02_en_US_oca.meMA.LaudsGlory <text:s/></text:p>
          </table:table-cell>
          <table:table-cell table:style-name="ce78" office:value-type="date" office:date-value="2026-06-26">
            <text:p>06/26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1">
          <table:table-cell office:value-type="string">
            <text:p><text:s/>me.m08.d01_en_US_oca.meMA.Lauds4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5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6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Glory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73" office:value-type="string">
            <text:p><text:s/>me.m08.d17_en_US_oca.meMA.AposGlory <text:s/></text:p>
          </table:table-cell>
          <table:table-cell table:style-name="ce78" office:value-type="date" office:date-value="2026-07-04">
            <text:p>07/04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1">
          <table:table-cell office:value-type="string">
            <text:p><text:s/>me.m09.d03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2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3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9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21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2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02_en_US_oca.meMA.Aposticha4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11_en_US_oca.meMA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17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2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2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9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3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Kontakia Oikos Hypakoe" table:style-name="ta1" table:print="false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13"/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49])" office:value-type="float" office:value="0">
            <text:p>0</text:p>
          </table:table-cell>
          <table:table-cell table:style-name="ce13"/>
          <table:table-cell table:style-name="ce14" table:formula="of:=47-[.D2]" office:value-type="float" office:value="47">
            <text:p>47</text:p>
          </table:table-cell>
        </table:table-row>
        <table:table-row table:style-name="ro1">
          <table:table-cell office:value-type="string">
            <text:p><text:s/>me.m01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4.d3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9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FF_en_US_oca.meMA.Hypakoe.text <text:s/></text:p>
          </table:table-cell>
          <table:table-cell table:number-columns-repeated="5"/>
        </table:table-row>
      </table:table>
      <table:table table:name="Menaion_Vespers_metered" table:style-name="ta2" table:print="false">
        <office:forms form:automatic-focus="false" form:apply-design-mode="false"/>
        <table:table-column table:style-name="co6" table:default-cell-style-name="ce25"/>
        <table:table-column table:style-name="co7" table:number-columns-repeated="4" table:default-cell-style-name="ce48"/>
        <table:table-column table:style-name="co8" table:default-cell-style-name="Excel_20_Built-in_20_Normal"/>
        <table:table-column table:style-name="co9" table:default-cell-style-name="ce48"/>
        <table:table-column table:style-name="co8" table:number-columns-repeated="1017" table:default-cell-style-name="Excel_20_Built-in_20_Normal"/>
        <table:table-row table:style-name="ro2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855])" office:value-type="float" office:value="853">
            <text:p>853</text:p>
          </table:table-cell>
          <table:table-cell table:style-name="ce59" office:value-type="string">
            <text:p>Of 853</text:p>
          </table:table-cell>
          <table:table-cell table:style-name="ce14" table:formula="of:=853-[.D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me.m01.d01_en_US_oca.meVE.Stichera03 </text:p>
          </table:table-cell>
          <table:table-cell table:style-name="ce26" office:value-type="date" office:date-value="2024-11-26">
            <text:p>11/2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5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1 </text:p>
          </table:table-cell>
          <table:table-cell table:style-name="ce28" office:value-type="date" office:date-value="2024-11-27">
            <text:p>11/27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1 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1 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1 </text:p>
          </table:table-cell>
          <table:table-cell table:style-name="ce26" office:value-type="date" office:date-value="2024-12-29">
            <text:p>12/2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1 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1 </text:p>
          </table:table-cell>
          <table:table-cell table:style-name="ce31" office:value-type="date" office:date-value="2025-01-02">
            <text:p>01/02/25</text:p>
          </table:table-cell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1 </text:p>
          </table:table-cell>
          <table:table-cell table:style-name="ce33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3 </text:p>
          </table:table-cell>
          <table:table-cell table:style-name="ce34" office:value-type="date" office:date-value="2025-01-06">
            <text:p>01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1 </text:p>
          </table:table-cell>
          <table:table-cell table:style-name="ce35" office:value-type="date" office:date-value="2024-01-07">
            <text:p>01/07/24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1 </text:p>
          </table:table-cell>
          <table:table-cell table:style-name="ce26" office:value-type="date" office:date-value="2024-12-16">
            <text:p>12/1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2 </text:p>
          </table:table-cell>
          <table:table-cell table:style-name="ce26" office:value-type="date" office:date-value="2024-12-14">
            <text:p>12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1 </text:p>
          </table:table-cell>
          <table:table-cell table:style-name="ce28" office:value-type="date" office:date-value="2024-12-18">
            <text:p>12/1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1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1 </text:p>
          </table:table-cell>
          <table:table-cell table:style-name="ce34" office:value-type="date" office:date-value="2025-01-08">
            <text:p>01/0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4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4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3_en_US_dedes.meVE.SticStavrotheotokion </text:p>
          </table:table-cell>
          <table:table-cell table:style-name="ce26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heotokion </text:p>
          </table:table-cell>
          <table:table-cell table:style-name="ce28" office:value-type="date" office:date-value="2024-12-04">
            <text:p>12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1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1 </text:p>
          </table:table-cell>
          <table:table-cell table:style-name="ce28" office:value-type="date" office:date-value="2024-12-03">
            <text:p>12/0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5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01.d26_en_US_oca.meVE.Stichera01 </text:p>
          </table:table-cell>
          <table:table-cell table:style-name="ce28" office:value-type="date" office:date-value="2024-11-28">
            <text:p>11/2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2 </text:p>
          </table:table-cell>
          <table:table-cell table:style-name="ce28" office:value-type="date" office:date-value="2024-11-30">
            <text:p>11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1 </text:p>
          </table:table-cell>
          <table:table-cell table:style-name="ce28" office:value-type="date" office:date-value="2024-12-20">
            <text:p>12/2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2 </text:p>
          </table:table-cell>
          <table:table-cell table:style-name="ce28" office:value-type="date" office:date-value="2024-12-21">
            <text:p>12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7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9" office:value-type="string">
            <text:p>me.m01.d30_en_US_oca.meVE.Aposticha1 </text:p>
          </table:table-cell>
          <table:table-cell table:style-name="ce26" office:value-type="date" office:date-value="2024-12-02">
            <text:p>12/0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1 </text:p>
          </table:table-cell>
          <table:table-cell table:style-name="ce26" office:value-type="date" office:date-value="2024-12-01">
            <text:p>12/0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31_en_US_goadedes.meVE.SticTheotokion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1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1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4 </text:p>
          </table:table-cell>
          <table:table-cell table:style-name="ce26" office:value-type="date" office:date-value="2024-12-06">
            <text:p>12/06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5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Stavrotheotokion2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Theotokion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3_en_US_oca.meVE.AposStavrotheotokion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AposTheotokion 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SticTheotokion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dedes.meVE.SticTheotokion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1_en_US_barrett.meVE.SticTheotokion </text:p>
          </table:table-cell>
          <table:table-cell table:style-name="ce38" office:value-type="date" office:date-value="2025-01-14">
            <text:p>01/1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1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6_en_US_dedes.meVE.SticStavrotheotokion </text:p>
          </table:table-cell>
          <table:table-cell table:style-name="ce38" office:value-type="date" office:date-value="2025-01-26">
            <text:p>01/2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1</text:p>
          </table:table-cell>
          <table:table-cell table:style-name="ce39" office:value-type="date" office:date-value="2025-01-26">
            <text:p>01/26/25</text:p>
          </table:table-cell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1 </text:p>
          </table:table-cell>
          <table:table-cell table:style-name="ce26" office:value-type="date" office:date-value="2025-01-15">
            <text:p>01/1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dedes.meVE.SticStavrotheotokion</text:p>
          </table:table-cell>
          <table:table-cell table:style-name="ce26" office:value-type="date" office:date-value="2025-10-01">
            <text:p>10/01/25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1 </text:p>
          </table:table-cell>
          <table:table-cell table:style-name="ce41" office:value-type="date" office:date-value="2025-10-20">
            <text:p>10/20/25</text:p>
          </table:table-cell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2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3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4.d11_en_US_dedes.meVE.SticStavrotheotokion </text:p>
          </table:table-cell>
          <table:table-cell table:style-name="ce43" office:value-type="date" office:date-value="2025-04-01">
            <text:p>04/01/25</text:p>
          </table:table-cell>
          <table:table-cell table:style-name="ce13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1 </text:p>
          </table:table-cell>
          <table:table-cell table:style-name="ce7" office:value-type="date" office:date-value="2026-06-18">
            <text:p>06/18/26</text:p>
          </table:table-cell>
          <table:table-cell table:style-name="ce27" office:value-type="string">
            <text:p>goadedes</text:p>
          </table:table-cell>
          <table:table-cell table:style-name="ce30"/>
          <table:table-cell table:style-name="ce13"/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12_en_US_dedes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1 </text:p>
          </table:table-cell>
          <table:table-cell table:style-name="ce43" office:value-type="date" office:date-value="2026-06-18">
            <text:p>06/18/26</text:p>
          </table:table-cell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2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3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0_en_US_oca.meVE.Stichera01 </text:p>
          </table:table-cell>
          <table:table-cell table:style-name="ce28" office:value-type="date" office:date-value="2025-10-24">
            <text:p>10/24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5_en_US_oca.meVE.Stichera04 </text:p>
          </table:table-cell>
          <table:table-cell table:style-name="ce26" office:value-type="date" office:date-value="2026-06-19">
            <text:p>06/19/26</text:p>
          </table:table-cell>
          <table:table-cell table:style-name="ce27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5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6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1 </text:p>
          </table:table-cell>
          <table:table-cell table:style-name="ce43" office:value-type="date" office:date-value="2026-06-19">
            <text:p>06/19/26</text:p>
          </table:table-cell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2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3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7_en_US_oca.meVE.Stichera01 </text:p>
          </table:table-cell>
          <table:table-cell table:style-name="ce28" office:value-type="date" office:date-value="2025-10-27">
            <text:p>10/27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Apolytikion1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1 </text:p>
          </table:table-cell>
          <table:table-cell table:style-name="ce26" office:value-type="date" office:date-value="2025-01-16">
            <text:p>01/16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1 </text:p>
          </table:table-cell>
          <table:table-cell table:style-name="ce28" office:value-type="date" office:date-value="2025-01-16">
            <text:p>01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1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2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08_en_US_oca.meVE.Stichera04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5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6 </text:p>
          </table:table-cell>
          <table:table-cell table:style-name="ce4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5.d09_en_US_oca.meVE.Stichera01 </text:p>
          </table:table-cell>
          <table:table-cell table:style-name="ce28" office:value-type="date" office:date-value="2025-01-29">
            <text:p>01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1 </text:p>
          </table:table-cell>
          <table:table-cell table:style-name="ce26" office:value-type="date" office:date-value="2025-01-29">
            <text:p>01/29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1 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4 </text:p>
          </table:table-cell>
          <table:table-cell table:style-name="ce28" office:value-type="date" office:date-value="2025-01-30">
            <text:p>01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1 </text:p>
          </table:table-cell>
          <table:table-cell table:style-name="ce26" office:value-type="date" office:date-value="2025-01-30">
            <text:p>01/30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1 </text:p>
          </table:table-cell>
          <table:table-cell table:style-name="ce26" office:value-type="date" office:date-value="2025-01-31">
            <text:p>01/3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Apolytik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dedes.meVE.Stichera01 </text:p>
          </table:table-cell>
          <table:table-cell table:style-name="ce26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29_en_US_oca.meVE.Stichera01 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5.d31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dedes.meVE.SticTheotokion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6.d01_en_US_oca.meVE.Stichera01 </text:p>
          </table:table-cell>
          <table:table-cell table:style-name="ce47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6.d02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1 </text:p>
          </table:table-cell>
          <table:table-cell table:style-name="ce28" office:value-type="date" office:date-value="2025-02-04">
            <text:p>02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4 </text:p>
          </table:table-cell>
          <table:table-cell table:style-name="ce34" office:value-type="date" office:date-value="2025-02-05">
            <text:p>02/05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1 </text:p>
          </table:table-cell>
          <table:table-cell table:style-name="ce37" office:value-type="date" office:date-value="2025-02-05">
            <text:p>02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1 </text:p>
          </table:table-cell>
          <table:table-cell table:style-name="ce34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1 </text:p>
          </table:table-cell>
          <table:table-cell table:style-name="ce37" office:value-type="date" office:date-value="2025-02-06">
            <text:p>02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4 </text:p>
          </table:table-cell>
          <table:table-cell table:style-name="ce37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1 </text:p>
          </table:table-cell>
          <table:table-cell table:style-name="ce34" office:value-type="date" office:date-value="2025-02-06">
            <text:p>02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1 </text:p>
          </table:table-cell>
          <table:table-cell table:style-name="ce37" office:value-type="date" office:date-value="2025-01-07">
            <text:p>01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1 </text:p>
          </table:table-cell>
          <table:table-cell table:style-name="ce34" office:value-type="date" office:date-value="2025-11-03">
            <text:p>11/0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4 </text:p>
          </table:table-cell>
          <table:table-cell table:style-name="ce26" office:value-type="date" office:date-value="2025-11-04">
            <text:p>11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1 </text:p>
          </table:table-cell>
          <table:table-cell table:style-name="ce28" office:value-type="date" office:date-value="2025-02-10">
            <text:p>02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4 </text:p>
          </table:table-cell>
          <table:table-cell table:style-name="ce26" office:value-type="date" office:date-value="2025-02-10">
            <text:p>02/1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1 </text:p>
          </table:table-cell>
          <table:table-cell table:style-name="ce28" office:value-type="date" office:date-value="2025-02-12">
            <text:p>02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4 </text:p>
          </table:table-cell>
          <table:table-cell table:style-name="ce26" office:value-type="date" office:date-value="2025-02-12">
            <text:p>02/12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1 </text:p>
          </table:table-cell>
          <table:table-cell table:style-name="ce28" office:value-type="date" office:date-value="2025-02-13">
            <text:p>02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2 </text:p>
          </table:table-cell>
          <table:table-cell table:style-name="ce26" office:value-type="date" office:date-value="2025-02-14">
            <text:p>02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1 </text:p>
          </table:table-cell>
          <table:table-cell table:style-name="ce28" office:value-type="date" office:date-value="2025-02-14">
            <text:p>02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e.m06.d30_en_US_oca.meVE.Stichera06 </text:p>
          </table:table-cell>
          <table:table-cell table:style-name="ce49"/>
          <table:table-cell table:style-name="ce29" office:value-type="string">
            <text:p>goadedes</text:p>
          </table:table-cell>
          <table:table-cell table:style-name="ce4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60"/>
          <table:table-cell table:number-columns-repeated="1018"/>
        </table:table-row>
        <table:table-row table:style-name="ro2">
          <table:table-cell table:style-name="ce19" office:value-type="string">
            <text:p>me.m07.d01_en_US_oca.meVE.Stichera02 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7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1 </text:p>
          </table:table-cell>
          <table:table-cell table:style-name="ce28" office:value-type="date" office:date-value="2025-04-02">
            <text:p>04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3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1 </text:p>
          </table:table-cell>
          <table:table-cell table:style-name="ce47" office:value-type="date" office:date-value="2025-04-03">
            <text:p>04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1 </text:p>
          </table:table-cell>
          <table:table-cell table:style-name="ce28" office:value-type="date" office:date-value="2025-04-04">
            <text:p>04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1 </text:p>
          </table:table-cell>
          <table:table-cell table:style-name="ce47" office:value-type="date" office:date-value="2025-04-07">
            <text:p>04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1 </text:p>
          </table:table-cell>
          <table:table-cell table:style-name="ce28" office:value-type="date" office:date-value="2025-04-07">
            <text:p>04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2 </text:p>
          </table:table-cell>
          <table:table-cell/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3 </text:p>
          </table:table-cell>
          <table:table-cell/>
          <table:table-cell table:style-name="ce13" office:value-type="string">
            <text:p>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1 </text:p>
          </table:table-cell>
          <table:table-cell table:style-name="ce28" office:value-type="date" office:date-value="2025-04-08">
            <text:p>04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1 </text:p>
          </table:table-cell>
          <table:table-cell table:style-name="ce47" office:value-type="date" office:date-value="2025-04-09">
            <text:p>04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1 </text:p>
          </table:table-cell>
          <table:table-cell table:style-name="ce47" office:value-type="date" office:date-value="2025-04-11">
            <text:p>04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1 </text:p>
          </table:table-cell>
          <table:table-cell table:style-name="ce28" office:value-type="date" office:date-value="2025-04-11">
            <text:p>04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1 </text:p>
          </table:table-cell>
          <table:table-cell table:style-name="ce47" office:value-type="date" office:date-value="2025-04-13">
            <text:p>04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1 </text:p>
          </table:table-cell>
          <table:table-cell table:style-name="ce28" office:value-type="date" office:date-value="2025-04-13">
            <text:p>04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1 </text:p>
          </table:table-cell>
          <table:table-cell table:style-name="ce28" office:value-type="date" office:date-value="2025-04-15">
            <text:p>04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1 </text:p>
          </table:table-cell>
          <table:table-cell table:style-name="ce28" office:value-type="date" office:date-value="2025-04-16">
            <text:p>04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1 </text:p>
          </table:table-cell>
          <table:table-cell table:style-name="ce47" office:value-type="date" office:date-value="2025-05-02">
            <text:p>05/0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1 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1 </text:p>
          </table:table-cell>
          <table:table-cell table:style-name="ce28" office:value-type="date" office:date-value="2025-05-06">
            <text:p>05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4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0_en_US_oca.meVE.Stichera01 </text:p>
          </table:table-cell>
          <table:table-cell table:style-name="ce28" office:value-type="date" office:date-value="2026-01-05">
            <text:p>01/05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5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6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1_en_US_oca.meVE.Stichera01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1 </text:p>
          </table:table-cell>
          <table:table-cell table:style-name="ce28" office:value-type="date" office:date-value="2025-05-07">
            <text:p>05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1 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dedes.meVE.Stichera04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5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6 </text:p>
          </table:table-cell>
          <table:table-cell table:style-name="ce50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6_en_US_dedes.meVE.Aposticha1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7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8_en_US_oca.meVE.Stichera01 </text:p>
          </table:table-cell>
          <table:table-cell table:style-name="ce47" office:value-type="date" office:date-value="2025-05-09">
            <text:p>05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1 </text:p>
          </table:table-cell>
          <table:table-cell table:style-name="ce28" office:value-type="date" office:date-value="2025-05-12">
            <text:p>05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1 </text:p>
          </table:table-cell>
          <table:table-cell table:style-name="ce47" office:value-type="date" office:date-value="2025-05-13">
            <text:p>05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1 </text:p>
          </table:table-cell>
          <table:table-cell table:style-name="ce28" office:value-type="date" office:date-value="2025-05-13">
            <text:p>05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1 </text:p>
          </table:table-cell>
          <table:table-cell table:style-name="ce47" office:value-type="date" office:date-value="2025-05-14">
            <text:p>05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1 </text:p>
          </table:table-cell>
          <table:table-cell table:style-name="ce28" office:value-type="date" office:date-value="2025-05-14">
            <text:p>05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1 </text:p>
          </table:table-cell>
          <table:table-cell table:style-name="ce28" office:value-type="date" office:date-value="2025-05-15">
            <text:p>05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1 </text:p>
          </table:table-cell>
          <table:table-cell table:style-name="ce28" office:value-type="date" office:date-value="2025-05-16">
            <text:p>05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4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1 </text:p>
          </table:table-cell>
          <table:table-cell table:style-name="ce51" office:value-type="date" office:date-value="2025-05-19">
            <text:p>05/1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Aposticha1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2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3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9.d07_en_US_oca.meVE.Stichera01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2 </text:p>
          </table:table-cell>
          <table:table-cell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3 </text:p>
          </table:table-cell>
          <table:table-cell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4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5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6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4" office:value-type="string">
            <text:p>me.m09.d09_en_US_oca.meVE.Aposticha1 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1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Glory 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1 </text:p>
          </table:table-cell>
          <table:table-cell table:style-name="ce53" office:value-type="date" office:date-value="2025-06-09">
            <text:p>06/0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1 </text:p>
          </table:table-cell>
          <table:table-cell table:style-name="ce53" office:value-type="date" office:date-value="2025-06-11">
            <text:p>06/11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4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dedes.meVE.Aposticha2 </text:p>
          </table:table-cell>
          <table:table-cell table:style-name="ce47" office:value-type="date" office:date-value="2025-06-11">
            <text:p>06/11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4 </text:p>
          </table:table-cell>
          <table:table-cell table:style-name="ce53" office:value-type="date" office:date-value="2025-06-12">
            <text:p>06/12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1 </text:p>
          </table:table-cell>
          <table:table-cell table:style-name="ce47" office:value-type="date" office:date-value="2025-06-10">
            <text:p>06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4 </text:p>
          </table:table-cell>
          <table:table-cell table:style-name="ce47" office:value-type="date" office:date-value="2025-06-12">
            <text:p>06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1 </text:p>
          </table:table-cell>
          <table:table-cell table:style-name="ce53" office:value-type="date" office:date-value="2025-06-13">
            <text:p>06/13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1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4 </text:p>
          </table:table-cell>
          <table:table-cell table:style-name="ce47" office:value-type="date" office:date-value="2025-06-13">
            <text:p>06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1 </text:p>
          </table:table-cell>
          <table:table-cell table:style-name="ce53" office:value-type="date" office:date-value="2025-06-16">
            <text:p>06/16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1 </text:p>
          </table:table-cell>
          <table:table-cell table:style-name="ce53" office:value-type="date" office:date-value="2025-06-14">
            <text:p>06/14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1 </text:p>
          </table:table-cell>
          <table:table-cell table:style-name="ce47" office:value-type="date" office:date-value="2025-06-16">
            <text:p>06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1 </text:p>
          </table:table-cell>
          <table:table-cell table:style-name="ce53" office:value-type="date" office:date-value="2025-06-17">
            <text:p>06/17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1 </text:p>
          </table:table-cell>
          <table:table-cell table:style-name="ce47" office:value-type="date" office:date-value="2025-06-18">
            <text:p>06/1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1 </text:p>
          </table:table-cell>
          <table:table-cell table:style-name="ce53" office:value-type="date" office:date-value="2025-06-18">
            <text:p>06/18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1_en_US_dedes.meVE.SticTheotokion </text:p>
          </table:table-cell>
          <table:table-cell table:style-name="ce47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2_en_US_dedes.meVE.AposTheotokion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3_en_US_dedes.meVE.AposTheotokion </text:p>
          </table:table-cell>
          <table:table-cell table:style-name="ce47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6_en_US_oca.meVE.Aposticha1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1 </text:p>
          </table:table-cell>
          <table:table-cell table:style-name="ce47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AposTheotokion </text:p>
          </table:table-cell>
          <table:table-cell table:style-name="ce37" office:value-type="date" office:date-value="2025-07-25">
            <text:p>07/2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AposStavrotheotokion </text:p>
          </table:table-cell>
          <table:table-cell table:style-name="ce47" office:value-type="date" office:date-value="2025-07-25">
            <text:p>07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1 </text:p>
          </table:table-cell>
          <table:table-cell table:style-name="ce37" office:value-type="date" office:date-value="2025-07-28">
            <text:p>07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1 </text:p>
          </table:table-cell>
          <table:table-cell table:style-name="ce47" office:value-type="date" office:date-value="2025-07-28">
            <text:p>07/2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1 </text:p>
          </table:table-cell>
          <table:table-cell table:style-name="ce37" office:value-type="date" office:date-value="2025-07-29">
            <text:p>07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1 </text:p>
          </table:table-cell>
          <table:table-cell table:style-name="ce47" office:value-type="date" office:date-value="2025-07-30">
            <text:p>07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dedes.meVE.Stichera04 </text:p>
          </table:table-cell>
          <table:table-cell table:style-name="ce37" office:value-type="date" office:date-value="2026-05-28">
            <text:p>05/28/26</text:p>
          </table:table-cell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19_en_US_oca.meVE.Stichera01 </text:p>
          </table:table-cell>
          <table:table-cell table:style-name="ce37" office:value-type="date" office:date-value="2025-07-30">
            <text:p>07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1 </text:p>
          </table:table-cell>
          <table:table-cell table:style-name="ce47" office:value-type="date" office:date-value="2025-07-31">
            <text:p>07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1 </text:p>
          </table:table-cell>
          <table:table-cell table:style-name="ce37" office:value-type="date" office:date-value="25-07-30">
            <text:p>08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1 </text:p>
          </table:table-cell>
          <table:table-cell table:style-name="ce47" office:value-type="date" office:date-value="2025-08-01">
            <text:p>08/0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1 </text:p>
          </table:table-cell>
          <table:table-cell table:style-name="ce37" office:value-type="date" office:date-value="2025-08-04">
            <text:p>08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1 </text:p>
          </table:table-cell>
          <table:table-cell table:style-name="ce47" office:value-type="date" office:date-value="2025-08-04">
            <text:p>08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4 </text:p>
          </table:table-cell>
          <table:table-cell table:style-name="ce37" office:value-type="date" office:date-value="2025-08-05">
            <text:p>08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28_en_US_dedes.meVE.Stichera01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2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3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me.m10.28_en_US_dedes.meVE.Stichera04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5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6</text:p>
          </table:table-cell>
          <table:table-cell table:style-name="ce50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29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1 </text:p>
          </table:table-cell>
          <table:table-cell table:style-name="ce47" office:value-type="date" office:date-value="2025-08-07">
            <text:p>08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1 </text:p>
          </table:table-cell>
          <table:table-cell table:style-name="ce47" office:value-type="date" office:date-value="2025-08-08">
            <text:p>08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dedes.meVE.Apolytikion1</text:p>
          </table:table-cell>
          <table:table-cell table:style-name="ce47" office:value-type="date" office:date-value="2025-08-09">
            <text:p>08/09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1_en_US_oca.meVE.Stichera02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4_en_US_dedes.meVE.SticTheotokion </text:p>
          </table:table-cell>
          <table:table-cell table:style-name="ce38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1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2 </text:p>
          </table:table-cell>
          <table:table-cell table:style-name="ce26" office:value-type="date" office:date-value="2024-10-31">
            <text:p>10/31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1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2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3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4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5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6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 office:value-type="float" office:value="8">
            <text:p>8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dedes.meVE.SticStavrotheotokion</text:p>
          </table:table-cell>
          <table:table-cell table:style-name="ce34" office:value-type="date" office:date-value="2026-06-17">
            <text:p>06/17/26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1.d07_en_US_oca.meVE.AposStavrotheotokion</text:p>
          </table:table-cell>
          <table:table-cell table:style-name="ce47" office:value-type="date" office:date-value="2025-03-01">
            <text:p>03/01/25</text:p>
          </table:table-cell>
          <table:table-cell table:style-name="ce58" office:value-type="string">
            <text:p>goadedes</text:p>
          </table:table-cell>
          <table:table-cell table:style-name="ce58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4_en_US_oca.meVE.Aposticha1 </text:p>
          </table:table-cell>
          <table:table-cell table:style-name="ce26" office:value-type="date" office:date-value="2024-11-03">
            <text:p>11/03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3 </text:p>
          </table:table-cell>
          <table:table-cell table:style-name="ce26" office:value-type="date" office:date-value="2024-11-02">
            <text:p>11/02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5_en_US_dedes.meVE.Aposticha1 </text:p>
          </table:table-cell>
          <table:table-cell table:style-name="ce28" office:value-type="date" office:date-value="2024-11-04">
            <text:p>11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Aposticha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0">
            <text:p>10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1 </text:p>
          </table:table-cell>
          <table:table-cell table:style-name="ce26" office:value-type="date" office:date-value="2024-11-05">
            <text:p>11/05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1 </text:p>
          </table:table-cell>
          <table:table-cell table:style-name="ce37" office:value-type="date" office:date-value="2024-11-06">
            <text:p>11/06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4 </text:p>
          </table:table-cell>
          <table:table-cell table:style-name="ce26" office:value-type="date" office:date-value="2024-11-07">
            <text:p>11/07/24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3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2">
            <text:p>1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1 </text:p>
          </table:table-cell>
          <table:table-cell table:style-name="ce26" office:value-type="date" office:date-value="2024-11-10">
            <text:p>11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2 </text:p>
          </table:table-cell>
          <table:table-cell table:style-name="ce26" office:value-type="date" office:date-value="2024-11-09">
            <text:p>11/0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4 </text:p>
          </table:table-cell>
          <table:table-cell table:style-name="ce28" office:value-type="date" office:date-value="2024-11-11">
            <text:p>11/1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1 </text:p>
          </table:table-cell>
          <table:table-cell table:style-name="ce26" office:value-type="date" office:date-value="2024-11-12">
            <text:p>11/1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1 </text:p>
          </table:table-cell>
          <table:table-cell table:style-name="ce28" office:value-type="date" office:date-value="2024-11-13">
            <text:p>11/1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2 </text:p>
          </table:table-cell>
          <table:table-cell table:style-name="ce26" office:value-type="date" office:date-value="2024-11-14">
            <text:p>11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dedes.meVE.Stichera04 </text:p>
          </table:table-cell>
          <table:table-cell table:style-name="ce47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6 </text:p>
          </table:table-cell>
          <table:table-cell table:style-name="ce47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7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3 </text:p>
          </table:table-cell>
          <table:table-cell table:style-name="ce28" office:value-type="date" office:date-value="2025-08-13">
            <text:p>08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1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2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1 </text:p>
          </table:table-cell>
          <table:table-cell table:style-name="ce28" office:value-type="date" office:date-value="2024-11-21">
            <text:p>11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1 </text:p>
          </table:table-cell>
          <table:table-cell table:style-name="ce47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1 </text:p>
          </table:table-cell>
          <table:table-cell table:style-name="ce26" office:value-type="date" office:date-value="2024-11-21">
            <text:p>11/21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2 </text:p>
          </table:table-cell>
          <table:table-cell table:style-name="ce26" office:value-type="date" office:date-value="2025-08-13">
            <text:p>08/1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4 </text:p>
          </table:table-cell>
          <table:table-cell table:style-name="ce26" office:value-type="date" office:date-value="2025-08-14">
            <text:p>08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4_en_US_dedes.meVE.Stichera01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2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3 </text:p>
          </table:table-cell>
          <table:table-cell table:style-name="ce54" office:value-type="string">
            <text:p>not used</text:p>
          </table:table-cell>
          <table:table-cell table:style-name="ce54"/>
          <table:table-cell table:style-name="ce5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4 </text:p>
          </table:table-cell>
          <table:table-cell table:style-name="ce55" office:value-type="date" office:date-value="2026-06-03">
            <text:p>06/0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5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6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16_en_US_oca.meVE.Stichera01 </text:p>
          </table:table-cell>
          <table:table-cell table:style-name="ce47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1 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4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1 </text:p>
          </table:table-cell>
          <table:table-cell table:style-name="ce47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21_en_US_dedes.meVE.Stichera04 </text:p>
          </table:table-cell>
          <table:table-cell table:style-name="ce47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21_en_US_oca.meVE.Stichera01 </text:p>
          </table:table-cell>
          <table:table-cell table:style-name="ce47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12.d22_en_US_dedes.meVE.Stichera04 </text:p>
          </table:table-cell>
          <table:table-cell table:style-name="ce26" office:value-type="date" office:date-value="2025-08-25">
            <text:p>08/2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1 </text:p>
          </table:table-cell>
          <table:table-cell table:style-name="ce47" office:value-type="date" office:date-value="2025-08-30">
            <text:p>08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1 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1 </text:p>
          </table:table-cell>
          <table:table-cell table:style-name="ce26" office:value-type="date" office:date-value="2025-09-05">
            <text:p>09/0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1 </text:p>
          </table:table-cell>
          <table:table-cell table:style-name="ce26" office:value-type="date" office:date-value="2025-09-07">
            <text:p>09/07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goadedes.meVE.Stichera04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2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 table:number-rows-repeated="1047282">
          <table:table-cell table:number-columns-repeated="1024"/>
        </table:table-row>
        <table:table-row table:style-name="ro4" table:number-rows-repeated="4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nion_Matins_metered" table:style-name="ta3" table:print="false">
        <office:forms form:automatic-focus="false" form:apply-design-mode="false"/>
        <table:table-column table:style-name="co12" table:default-cell-style-name="ce25"/>
        <table:table-column table:style-name="co7" table:number-columns-repeated="2" table:default-cell-style-name="ce48"/>
        <table:table-column table:style-name="co13" table:default-cell-style-name="ce48"/>
        <table:table-column table:style-name="co14" table:default-cell-style-name="ce13"/>
        <table:table-column table:style-name="co8" table:number-columns-repeated="1019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246])" office:value-type="float" office:value="244">
            <text:p>244</text:p>
          </table:table-cell>
          <table:table-cell/>
          <table:table-cell table:style-name="ce14" table:formula="of:=244-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<text:s/>me.m01.d02_en_US_oca.meMA.Kathisma11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Exaposteilarion1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Glory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1</text:p>
          </table:table-cell>
          <table:table-cell table:style-name="ce28" office:value-type="date" office:date-value="2024-12-31">
            <text:p>12/3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1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Exaposteilarion2</text:p>
          </table:table-cell>
          <table:table-cell table:style-name="ce37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1</text:p>
          </table:table-cell>
          <table:table-cell table:style-name="ce35" office:value-type="date" office:date-value="2025-01-05">
            <text:p>01/05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dedes.meMA.Kathisma2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Exaposteilarion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4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Glory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Both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8_en_US_oca.meMA.Kathisma21</text:p>
          </table:table-cell>
          <table:table-cell table:style-name="ce26" office:value-type="date" office:date-value="2025-01-02">
            <text:p>01/02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11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11</text:p>
          </table:table-cell>
          <table:table-cell table:style-name="ce26" office:value-type="date" office:date-value="2025-01-03">
            <text:p>01/03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1</text:p>
          </table:table-cell>
          <table:table-cell table:style-name="ce28" office:value-type="date" office:date-value="2024-01-03">
            <text:p>01/03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2</text:p>
          </table:table-cell>
          <table:table-cell table:style-name="ce37" office:value-type="date" office:date-value="2025-01-04">
            <text:p>01/04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Kathisma21</text:p>
          </table:table-cell>
          <table:table-cell table:style-name="ce47" office:value-type="date" office:date-value="2025-01-06">
            <text:p>01/06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1</text:p>
          </table:table-cell>
          <table:table-cell table:style-name="ce26" office:value-type="date" office:date-value="2025-01-04">
            <text:p>01/0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5_en_US_oca.meMA.Exaposteilarion3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1</text:p>
          </table:table-cell>
          <table:table-cell table:style-name="ce26" office:value-type="date" office:date-value="2024-12-12">
            <text:p>12/12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21_en_US_dedes.meMA.Exaposteilarion2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11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21</text:p>
          </table:table-cell>
          <table:table-cell table:style-name="ce34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5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6_en_US_oca.meMA.Kathisma1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dedes.meMA.Kathisma11</text:p>
          </table:table-cell>
          <table:table-cell table:style-name="ce28" office:value-type="date" office:date-value="2024-12-10">
            <text:p>12/1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Exaposteilarion1</text:p>
          </table:table-cell>
          <table:table-cell table:style-name="ce28" office:value-type="date" office:date-value="2024-12-11">
            <text:p>12/1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02.d17_en_US_dedes.meMA.AposTheotokion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2.d26_en_US_andronache.alt1.meMA.Kathisma11</text:p>
          </table:table-cell>
          <table:table-cell table:style-name="ce67" office:value-type="date" office:date-value="2025-01-27">
            <text:p>01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Kathisma2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WHAT ABOUT KONTAKIA?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<text:s/>me.m02.d26_en_US_andronache.alt1.meMA.Exaposteilarion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9" office:value-type="string">
            <text:p><text:s/>me.m05.d15_en_US_oca.meMA.Exaposteilarion1</text:p>
          </table:table-cell>
          <table:table-cell table:style-name="ce26" office:value-type="date" office:date-value="2025-01-27">
            <text:p>01/27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5.d2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8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6" office:value-type="string">
            <text:p>me.m07.d24_en_US_dedes.meMA.LaudsStavrotheotokion</text:p>
          </table:table-cell>
          <table:table-cell table:style-name="ce68" office:value-type="date" office:date-value="2026-06-30">
            <text:p>06/30/26</text:p>
          </table:table-cell>
          <table:table-cell table:style-name="ce72" office:value-type="string">
            <text:p>goadedes</text:p>
          </table:table-cell>
          <table:table-cell table:style-name="ce7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08.d01_en_US_oca.meMA.Exaposteilarion1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09_en_US_oca.meMA.Kathisma21</text:p>
          </table:table-cell>
          <table:table-cell table:style-name="ce51" office:value-type="date" office:date-value="2025-05-05">
            <text:p>05/05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11</text:p>
          </table:table-cell>
          <table:table-cell table:style-name="ce47" office:value-type="date" office:date-value="2025-06-20">
            <text:p>06/20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Exaposteilarion1</text:p>
          </table:table-cell>
          <table:table-cell table:style-name="ce47" office:value-type="date" office:date-value="2025-05-20">
            <text:p>05/20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11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21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3_en_US_oca.meMA.LaudsBoth</text:p>
          </table:table-cell>
          <table:table-cell table:style-name="ce47" office:value-type="date" office:date-value="2025-06-04">
            <text:p>06/04/25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1</text:p>
          </table:table-cell>
          <table:table-cell table:style-name="ce53" office:value-type="date" office:date-value="2025-06-04">
            <text:p>06/04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11</text:p>
          </table:table-cell>
          <table:table-cell table:style-name="ce47" office:value-type="date" office:date-value="2025-06-05">
            <text:p>06/05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7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24" office:value-type="string">
            <text:p><text:s/>me.m09.d18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ExapStavrotheotokion</text:p>
          </table:table-cell>
          <table:table-cell table:style-name="ce47" office:value-type="date" office:date-value="2026-06-23">
            <text:p>06/23/26</text:p>
          </table:table-cell>
          <table:table-cell table:style-name="Default" office:value-type="string">
            <text:p>goadede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4" office:value-type="string">
            <text:p><text:s/>me.m09.d23_en_US_oca.meMA.Kathisma21</text:p>
          </table:table-cell>
          <table:table-cell table:style-name="ce53" office:value-type="date" office:date-value="2025-06-06">
            <text:p>06/06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me.m09.d24_en_US_dedes.meMA.AposTheotokion</text:p>
          </table:table-cell>
          <table:table-cell table:style-name="ce53" office:value-type="date" office:date-value="2025-07-24">
            <text:p>07/24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8_en_US_oca.meMA.Kathisma11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0.d01_en_US_dedes.meMA.AposTheotokion</text:p>
          </table:table-cell>
          <table:table-cell table:style-name="ce47" office:value-type="date" office:date-value="2023-06-17">
            <text:p>06/17/23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<text:s/>me.m10.d06_en_US_oca.meMA.Kathisma21</text:p>
          </table:table-cell>
          <table:table-cell table:style-name="ce53" office:value-type="date" office:date-value="2025-08-11">
            <text:p>08/11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09_en_US_oca.meMA.Exaposteilarion1</text:p>
          </table:table-cell>
          <table:table-cell table:style-name="ce47" office:value-type="date" office:date-value="2024-10-24">
            <text:p>10/24/24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1_en_US_oca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T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1</text:p>
          </table:table-cell>
          <table:table-cell table:style-name="ce26" office:value-type="date" office:date-value="2024-10-25">
            <text:p>10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3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1</text:p>
          </table:table-cell>
          <table:table-cell table:style-name="ce28" office:value-type="date" office:date-value="2024-10-26">
            <text:p>10/26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T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1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11</text:p>
          </table:table-cell>
          <table:table-cell table:style-name="ce26" office:value-type="date" office:date-value="2024-11-13">
            <text:p>11/13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2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osteilarion1</text:p>
          </table:table-cell>
          <table:table-cell table:style-name="ce28" office:value-type="date" office:date-value="2024-11-15">
            <text:p>11/15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osteilarion1</text:p>
          </table:table-cell>
          <table:table-cell table:style-name="ce34" office:value-type="date" office:date-value="2025-08-14">
            <text:p>08/1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Theotokion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oca.meMA.Exaposteilarion1</text:p>
          </table:table-cell>
          <table:table-cell table:style-name="ce28" office:value-type="date" office:date-value="2024-11-18">
            <text:p>11/18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osteilarion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Theotokion</text:p>
          </table:table-cell>
          <table:table-cell table:style-name="ce29"/>
          <table:table-cell table:style-name="ce29" office:value-type="string">
            <text:p>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Exaposteilarion1</text:p>
          </table:table-cell>
          <table:table-cell table:style-name="ce69"/>
          <table:table-cell table:style-name="ce69" office:value-type="string">
            <text:p>goadedes</text:p>
          </table:table-cell>
          <table:table-cell table:style-name="ce6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Aposticha1</text:p>
          </table:table-cell>
          <table:table-cell table:style-name="ce70" office:value-type="date" office:date-value="2026-06-23">
            <text:p>06/23/26</text:p>
          </table:table-cell>
          <table:table-cell table:style-name="ce69" office:value-type="string">
            <text:p>goa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2</text:p>
          </table:table-cell>
          <table:table-cell table:style-name="Default"/>
          <table:table-cell table:style-name="ce69" office:value-type="string">
            <text:p>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3</text:p>
          </table:table-cell>
          <table:table-cell table:style-name="ce69"/>
          <table:table-cell table:style-name="ce69" office:value-type="string">
            <text:p>dedes</text:p>
          </table:table-cell>
          <table:table-cell table:style-name="ce69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9" office:value-type="string">
            <text:p>me.m12.d17_en_US_dedes.alt1.meMA.Kathisma11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2.d17_en_US_dedes.alt1.meMA.Kathisma31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me.m12.d17_en_US_dedes.alt1.meMA.Kathisma32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0_en_US_oca.meMA.Kathisma11</text:p>
          </table:table-cell>
          <table:table-cell table:style-name="ce26" office:value-type="date" office:date-value="2025-08-22">
            <text:p>08/22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2</text:p>
          </table:table-cell>
          <table:table-cell table:style-name="ce26" office:value-type="date" office:date-value="2025-08-25">
            <text:p>08/2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5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1_en_US_oca.meMA.Kathisma11</text:p>
          </table:table-cell>
          <table:table-cell table:style-name="ce47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2_en_US_oca.meMA.Kathisma11</text:p>
          </table:table-cell>
          <table:table-cell table:style-name="ce39" office:value-type="date" office:date-value="2025-08-26">
            <text:p>08/26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Kathisma2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4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Glory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Both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1</text:p>
          </table:table-cell>
          <table:table-cell table:style-name="ce39" office:value-type="date" office:date-value="2025-08-27">
            <text:p>08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11</text:p>
          </table:table-cell>
          <table:table-cell table:style-name="ce26" office:value-type="date" office:date-value="2025-08-29">
            <text:p>08/29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1</text:p>
          </table:table-cell>
          <table:table-cell table:style-name="ce26" office:value-type="date" office:date-value="2025-08-30">
            <text:p>08/3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1</text:p>
          </table:table-cell>
          <table:table-cell table:style-name="ce47" office:value-type="date" office:date-value="2025-09-01">
            <text:p>09/01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meMA.Exaposteilarion2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1</text:p>
          </table:table-cell>
          <table:table-cell table:style-name="ce47" office:value-type="date" office:date-value="2025-09-02">
            <text:p>09/02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Kathisma11</text:p>
          </table:table-cell>
          <table:table-cell table:style-name="ce26" office:value-type="date" office:date-value="2026-06-17">
            <text:p>06/17/26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dedes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7">
            <text:p>7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Kathisma11</text:p>
          </table:table-cell>
          <table:table-cell table:style-name="ce47" office:value-type="date" office:date-value="2025-09-04">
            <text:p>09/04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1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1</text:p>
          </table:table-cell>
          <table:table-cell table:style-name="ce26" office:value-type="date" office:date-value="2025-09-05">
            <text:p>09/05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2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4">
          <table:table-cell office:value-type="string">
            <text:p>me.m11.d01 Canon 1</text:p>
          </table:table-cell>
          <table:table-cell table:style-name="ce47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4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Menaion Matins Idiomela'.A3:'Menaion Matins Idiomela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7">07/07/2026</text:date>, <text:time>10:0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07T10:03:40.95</dc:date>
    <dc:creator>Alex Dedes</dc:creator>
    <meta:generator>OpenOffice/4.1.16$Win32 OpenOffice.org_project/4116m3$Build-9816</meta:generator>
    <meta:editing-duration>P3DT3H34M30S</meta:editing-duration>
    <meta:editing-cycles>62</meta:editing-cycles>
    <meta:document-statistic meta:table-count="5" meta:cell-count="4240" meta:object-count="0"/>
  </office:meta>
</office:document-meta>
</file>