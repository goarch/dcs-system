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256in"/>
    </style:style>
    <style:style style:name="co7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7374in"/>
    </style:style>
    <style:style style:name="co9" style:family="table-column">
      <style:table-column-properties fo:break-before="auto" style:column-width="1.9965in"/>
    </style:style>
    <style:style style:name="co10" style:family="table-column">
      <style:table-column-properties fo:break-before="auto" style:column-width="2.211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0.396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3.8346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ta2" style:family="table" style:master-page-name="PageStyle_5f_Meanion_5f_Matins_5f_notmetered">
      <style:table-properties table:display="true" style:writing-mode="lr-tb"/>
    </style:style>
    <style:style style:name="ta3" style:family="table" style:master-page-name="PageStyle_5f_Compa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Menaion_5f_Vesper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3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8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3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enaion_Vespers_notmetered" table:style-name="ta5" table:print="false">
        <office:forms form:automatic-focus="false" form:apply-design-mode="false"/>
        <table:table-column table:style-name="co12" table:default-cell-style-name="ce10"/>
        <table:table-column table:style-name="co2" table:number-columns-repeated="4" table:default-cell-style-name="ce31"/>
        <table:table-column table:style-name="co3" table:default-cell-style-name="Excel_20_Built-in_20_Normal"/>
        <table:table-column table:style-name="co13" table:default-cell-style-name="ce31"/>
        <table:table-column table:style-name="co3" table:number-columns-repeated="1017" table:default-cell-style-name="Excel_20_Built-in_20_Normal"/>
        <table:table-row table:style-name="ro11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style-name="ce11"/>
          <table:table-cell table:number-columns-repeated="1017"/>
        </table:table-row>
        <table:table-row table:style-name="ro11">
          <table:table-cell table:style-name="ce1"/>
          <table:table-cell table:style-name="ce11"/>
          <table:table-cell table:style-name="ce11" office:value-type="string">
            <text:p>Total so far:</text:p>
          </table:table-cell>
          <table:table-cell table:style-name="ce42" table:formula="of:=SUM([.D3:.D855])" office:value-type="float" office:value="798">
            <text:p>798</text:p>
          </table:table-cell>
          <table:table-cell table:style-name="ce75" office:value-type="string">
            <text:p>of 852</text:p>
          </table:table-cell>
          <table:table-cell table:style-name="ce45" table:formula="of:=852-[.D2]" office:value-type="float" office:value="54">
            <text:p>54</text:p>
          </table:table-cell>
          <table:table-cell table:number-columns-repeated="1018"/>
        </table:table-row>
        <table:table-row table:style-name="ro11">
          <table:table-cell table:style-name="ce2" office:value-type="string">
            <text:p>me.m01.d01_en_US_oca.meVE.Stichera03 </text:p>
          </table:table-cell>
          <table:table-cell table:style-name="ce12" office:value-type="date" office:date-value="2024-11-26">
            <text:p>11/2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01_en_US_oca.meVE.Stichera05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1 </text:p>
          </table:table-cell>
          <table:table-cell table:style-name="ce14" office:value-type="date" office:date-value="2024-11-27">
            <text:p>11/27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1 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1 </text:p>
          </table:table-cell>
          <table:table-cell table:style-name="ce14" office:value-type="date" office:date-value="2024-12-30">
            <text:p>12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1 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1 </text:p>
          </table:table-cell>
          <table:table-cell table:style-name="ce12" office:value-type="date" office:date-value="2024-12-29">
            <text:p>12/2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0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1 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08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1 </text:p>
          </table:table-cell>
          <table:table-cell table:style-name="ce60" office:value-type="date" office:date-value="2025-01-02">
            <text:p>01/02/25</text:p>
          </table:table-cell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Aposticha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1 </text:p>
          </table:table-cell>
          <table:table-cell table:style-name="ce62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2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1.d09_en_US_oca.meVE.Stichera03 </text:p>
          </table:table-cell>
          <table:table-cell table:style-name="ce61"/>
          <table:table-cell table:style-name="ce61" office:value-type="string">
            <text:p>goadedes</text:p>
          </table:table-cell>
          <table:table-cell table:style-name="ce61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Aposticha3 </text:p>
          </table:table-cell>
          <table:table-cell table:style-name="ce20" office:value-type="date" office:date-value="2025-01-06">
            <text:p>01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1 </text:p>
          </table:table-cell>
          <table:table-cell table:style-name="ce21" office:value-type="date" office:date-value="2024-01-07">
            <text:p>01/07/24</text:p>
          </table:table-cell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Aposticha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1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2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1.d12_en_US_oca.meVE.Stichera03 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1 </text:p>
          </table:table-cell>
          <table:table-cell table:style-name="ce20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3_en_US_oca.meVE.Aposticha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1 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1 </text:p>
          </table:table-cell>
          <table:table-cell table:style-name="ce12" office:value-type="date" office:date-value="2024-12-16">
            <text:p>12/16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Aposticha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2 </text:p>
          </table:table-cell>
          <table:table-cell table:style-name="ce12" office:value-type="date" office:date-value="2024-12-14">
            <text:p>12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17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1 </text:p>
          </table:table-cell>
          <table:table-cell table:style-name="ce14" office:value-type="date" office:date-value="2024-12-18">
            <text:p>12/1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18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1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1 </text:p>
          </table:table-cell>
          <table:table-cell table:style-name="ce20" office:value-type="date" office:date-value="2025-01-08">
            <text:p>01/0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4 </text:p>
          </table:table-cell>
          <table:table-cell table:style-name="ce20" office:value-type="date" office:date-value="2025-01-09">
            <text:p>01/09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0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4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1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23_en_US_dedes.meVE.SticStavrotheotokion </text:p>
          </table:table-cell>
          <table:table-cell table:style-name="ce12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heotokion </text:p>
          </table:table-cell>
          <table:table-cell table:style-name="ce14" office:value-type="date" office:date-value="2024-12-04">
            <text:p>12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1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1 </text:p>
          </table:table-cell>
          <table:table-cell table:style-name="ce14" office:value-type="date" office:date-value="2024-12-03">
            <text:p>12/0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5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58" office:value-type="string">
            <text:p>me.m01.d25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01.d26_en_US_oca.meVE.Stichera01 </text:p>
          </table:table-cell>
          <table:table-cell table:style-name="ce14" office:value-type="date" office:date-value="2024-11-28">
            <text:p>11/2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2 </text:p>
          </table:table-cell>
          <table:table-cell table:style-name="ce14" office:value-type="date" office:date-value="2024-11-30">
            <text:p>11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01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1 </text:p>
          </table:table-cell>
          <table:table-cell table:style-name="ce14" office:value-type="date" office:date-value="2024-12-20">
            <text:p>12/2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2 </text:p>
          </table:table-cell>
          <table:table-cell table:style-name="ce14" office:value-type="date" office:date-value="2024-12-21">
            <text:p>12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27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8" office:value-type="string">
            <text:p>me.m01.d27_en_US_oca.meVE.Stichera04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5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8" office:value-type="string">
            <text:p>me.m01.d27_en_US_oca.meVE.Stichera06 </text:p>
          </table:table-cell>
          <table:table-cell table:style-name="ce22" office:value-type="string">
            <text:p>not used</text:p>
          </table:table-cell>
          <table:table-cell table:style-name="ce22" table:number-columns-repeated="2"/>
          <table:table-cell table:style-name="ce39"/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5" office:value-type="string">
            <text:p>me.m01.d30_en_US_oca.meVE.Aposticha1 </text:p>
          </table:table-cell>
          <table:table-cell table:style-name="ce12" office:value-type="date" office:date-value="2024-12-02">
            <text:p>12/0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1 </text:p>
          </table:table-cell>
          <table:table-cell table:style-name="ce12" office:value-type="date" office:date-value="2024-12-01">
            <text:p>12/01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1.d30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1.d31_en_US_goadedes.meVE.SticTheotokion </text:p>
          </table:table-cell>
          <table:table-cell table:style-name="ce23" office:value-type="date" office:date-value="2025-01-10">
            <text:p>01/10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4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1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5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1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4 </text:p>
          </table:table-cell>
          <table:table-cell table:style-name="ce12" office:value-type="date" office:date-value="2024-12-06">
            <text:p>12/06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5 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0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Stavrotheotokion2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08_en_US_oca.meVE.SticTheotokion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1 </text:p>
          </table:table-cell>
          <table:table-cell table:style-name="ce12" office:value-type="date" office:date-value="2025-01-13">
            <text:p>01/13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2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3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2_en_US_oca.meVE.Stichera04 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3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3_en_US_oca.meVE.AposStavrotheotokion </text:p>
          </table:table-cell>
          <table:table-cell table:style-name="ce14" office:value-type="date" office:date-value="2025-01-13">
            <text:p>01/13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AposTheotokion 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dedes.meVE.SticTheotokion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1 </text:p>
          </table:table-cell>
          <table:table-cell table:style-name="ce20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1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dedes.meVE.SticTheotokion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1_en_US_barrett.meVE.SticTheotokion </text:p>
          </table:table-cell>
          <table:table-cell table:style-name="ce63" office:value-type="date" office:date-value="2025-01-14">
            <text:p>01/1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1 </text:p>
          </table:table-cell>
          <table:table-cell table:style-name="ce23" office:value-type="date" office:date-value="2025-01-14">
            <text:p>01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2.d26_en_US_dedes.meVE.SticStavrotheotokion </text:p>
          </table:table-cell>
          <table:table-cell table:style-name="ce63" office:value-type="date" office:date-value="2025-01-26">
            <text:p>01/2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1</text:p>
          </table:table-cell>
          <table:table-cell table:style-name="ce25" office:value-type="date" office:date-value="2025-01-26">
            <text:p>01/26/25</text:p>
          </table:table-cell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Stichera0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me.m02.d26_en_US_andronache.alt1.meVE.Aposticha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2.d2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1 </text:p>
          </table:table-cell>
          <table:table-cell table:style-name="ce12" office:value-type="date" office:date-value="2025-01-15">
            <text:p>01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2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2.d28_en_US_oca.meVE.Stichera03 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1 </text:p>
          </table:table-cell>
          <table:table-cell table:style-name="ce23" office:value-type="date" office:date-value="2025-01-15">
            <text:p>01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3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dedes.meVE.SticStavrotheotokion</text:p>
          </table:table-cell>
          <table:table-cell table:style-name="ce12" office:value-type="date" office:date-value="2025-10-01">
            <text:p>10/01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1 </text:p>
          </table:table-cell>
          <table:table-cell table:style-name="ce64" office:value-type="date" office:date-value="2025-10-20">
            <text:p>10/20/25</text:p>
          </table:table-cell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2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03_en_US_oca.meVE.Stichera03 </text:p>
          </table:table-cell>
          <table:table-cell table:style-name="ce65"/>
          <table:table-cell table:style-name="ce13" office:value-type="string">
            <text:p>goadedes</text:p>
          </table:table-cell>
          <table:table-cell table:style-name="ce6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1_en_US_dedes.meVE.SticStavrotheotokion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1 </text:p>
          </table:table-cell>
          <table:table-cell table:style-name="ce21" office:value-type="date" office:date-value="2025-04-01">
            <text:p>04/01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12_en_US_dedes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2_en_US_dedes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13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0_en_US_oca.meVE.Stichera01 </text:p>
          </table:table-cell>
          <table:table-cell table:style-name="ce14" office:value-type="date" office:date-value="2025-10-24">
            <text:p>10/24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4.d25_en_US_oca.meVE.Stichera04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5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1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2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4.d26_en_US_oca.meVE.Stichera03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4.d27_en_US_oca.meVE.Stichera01 </text:p>
          </table:table-cell>
          <table:table-cell table:style-name="ce14" office:value-type="date" office:date-value="2025-10-27">
            <text:p>10/27/25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27_en_US_oca.meVE.Apolytikion1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1 </text:p>
          </table:table-cell>
          <table:table-cell table:style-name="ce12" office:value-type="date" office:date-value="2025-01-16">
            <text:p>01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4.d2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1 </text:p>
          </table:table-cell>
          <table:table-cell table:style-name="ce14" office:value-type="date" office:date-value="2025-01-16">
            <text:p>01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4.d3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1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1 </text:p>
          </table:table-cell>
          <table:table-cell table:style-name="ce12" office:value-type="date" office:date-value="2025-01-28">
            <text:p>01/28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2 </text:p>
          </table:table-cell>
          <table:table-cell table:style-name="ce14" office:value-type="date" office:date-value="2025-01-28">
            <text:p>01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08_en_US_oca.meVE.Stichera04 </text:p>
          </table:table-cell>
          <table:table-cell table:style-name="ce66" office:value-type="string">
            <text:p>not used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5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3" office:value-type="string">
            <text:p>me.m05.d08_en_US_oca.meVE.Stichera06 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" office:value-type="string">
            <text:p>me.m05.d09_en_US_oca.meVE.Stichera01 </text:p>
          </table:table-cell>
          <table:table-cell table:style-name="ce14" office:value-type="date" office:date-value="2025-01-29">
            <text:p>01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0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1 </text:p>
          </table:table-cell>
          <table:table-cell table:style-name="ce12" office:value-type="date" office:date-value="2025-01-29">
            <text:p>01/29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1 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4 </text:p>
          </table:table-cell>
          <table:table-cell table:style-name="ce14" office:value-type="date" office:date-value="2025-01-30">
            <text:p>01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1 </text:p>
          </table:table-cell>
          <table:table-cell table:style-name="ce12" office:value-type="date" office:date-value="2025-01-30">
            <text:p>01/30/25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3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1 </text:p>
          </table:table-cell>
          <table:table-cell table:style-name="ce14" office:value-type="date" office:date-value="2025-10-31">
            <text:p>10/3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4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1 </text:p>
          </table:table-cell>
          <table:table-cell table:style-name="ce12" office:value-type="date" office:date-value="2025-01-31">
            <text:p>01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5_en_US_oca.meVE.Apolytik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17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dedes.meVE.Stichera01 </text:p>
          </table:table-cell>
          <table:table-cell table:style-name="ce12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1 </text:p>
          </table:table-cell>
          <table:table-cell table:style-name="ce23" office:value-type="date" office:date-value="2025-01-31">
            <text:p>01/3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1 </text:p>
          </table:table-cell>
          <table:table-cell table:style-name="ce12" office:value-type="date" office:date-value="2025-02-03">
            <text:p>02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2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1 </text:p>
          </table:table-cell>
          <table:table-cell table:style-name="ce23" office:value-type="date" office:date-value="2025-02-03">
            <text:p>02/0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5.d2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5.d29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5.d29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5.d31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5.d31_en_US_dedes.meVE.SticTheotokion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6.d0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06.d0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06.d02_en_US_oca.meVE.Stichera01 </text:p>
          </table:table-cell>
          <table:table-cell table:style-name="ce12" office:value-type="date" office:date-value="2025-02-04">
            <text:p>02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1 </text:p>
          </table:table-cell>
          <table:table-cell table:style-name="ce14" office:value-type="date" office:date-value="2025-02-04">
            <text:p>02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3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4 </text:p>
          </table:table-cell>
          <table:table-cell table:style-name="ce20" office:value-type="date" office:date-value="2025-02-05">
            <text:p>02/05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1 </text:p>
          </table:table-cell>
          <table:table-cell table:style-name="ce23" office:value-type="date" office:date-value="2025-02-05">
            <text:p>02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05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1 </text:p>
          </table:table-cell>
          <table:table-cell table:style-name="ce20" office:value-type="date" office:date-value="2025-10-31">
            <text:p>10/31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1 </text:p>
          </table:table-cell>
          <table:table-cell table:style-name="ce23" office:value-type="date" office:date-value="2025-02-06">
            <text:p>02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4 </text:p>
          </table:table-cell>
          <table:table-cell table:style-name="ce23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1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1 </text:p>
          </table:table-cell>
          <table:table-cell table:style-name="ce20" office:value-type="date" office:date-value="2025-02-06">
            <text:p>02/06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1 </text:p>
          </table:table-cell>
          <table:table-cell table:style-name="ce23" office:value-type="date" office:date-value="2025-01-07">
            <text:p>01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3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1 </text:p>
          </table:table-cell>
          <table:table-cell table:style-name="ce20" office:value-type="date" office:date-value="2025-11-03">
            <text:p>11/03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4 </text:p>
          </table:table-cell>
          <table:table-cell table:style-name="ce12" office:value-type="date" office:date-value="2025-11-04">
            <text:p>11/04/25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4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1 </text:p>
          </table:table-cell>
          <table:table-cell table:style-name="ce14" office:value-type="date" office:date-value="2025-02-10">
            <text:p>02/1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4 </text:p>
          </table:table-cell>
          <table:table-cell table:style-name="ce12" office:value-type="date" office:date-value="2025-02-10">
            <text:p>02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18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0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1 </text:p>
          </table:table-cell>
          <table:table-cell table:style-name="ce14" office:value-type="date" office:date-value="2025-02-11">
            <text:p>02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1 </text:p>
          </table:table-cell>
          <table:table-cell table:style-name="ce12" office:value-type="date" office:date-value="2025-02-11">
            <text:p>02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1 </text:p>
          </table:table-cell>
          <table:table-cell table:style-name="ce14" office:value-type="date" office:date-value="2025-02-12">
            <text:p>02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4 </text:p>
          </table:table-cell>
          <table:table-cell table:style-name="ce12" office:value-type="date" office:date-value="2025-02-12">
            <text:p>02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5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1 </text:p>
          </table:table-cell>
          <table:table-cell table:style-name="ce14" office:value-type="date" office:date-value="2025-02-13">
            <text:p>02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2 </text:p>
          </table:table-cell>
          <table:table-cell table:style-name="ce12" office:value-type="date" office:date-value="2025-02-14">
            <text:p>02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6.d2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1 </text:p>
          </table:table-cell>
          <table:table-cell table:style-name="ce14" office:value-type="date" office:date-value="2025-02-14">
            <text:p>02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6.d30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9" office:value-type="string">
            <text:p>me.m06.d30_en_US_oca.meVE.Stichera06 </text:p>
          </table:table-cell>
          <table:table-cell table:style-name="ce68"/>
          <table:table-cell table:style-name="ce15" office:value-type="string">
            <text:p>goadedes</text:p>
          </table:table-cell>
          <table:table-cell table:style-name="ce68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76"/>
          <table:table-cell table:number-columns-repeated="1018"/>
        </table:table-row>
        <table:table-row table:style-name="ro11">
          <table:table-cell table:style-name="ce5" office:value-type="string">
            <text:p>me.m07.d01_en_US_oca.meVE.Stichera02 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07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1 </text:p>
          </table:table-cell>
          <table:table-cell table:style-name="ce14" office:value-type="date" office:date-value="2025-04-02">
            <text:p>04/0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2_en_US_oca.meVE.Stichera03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1 </text:p>
          </table:table-cell>
          <table:table-cell table:style-name="ce33" office:value-type="date" office:date-value="2025-04-03">
            <text:p>04/0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1 </text:p>
          </table:table-cell>
          <table:table-cell table:style-name="ce14" office:value-type="date" office:date-value="2025-04-04">
            <text:p>04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0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1 </text:p>
          </table:table-cell>
          <table:table-cell table:style-name="ce33" office:value-type="date" office:date-value="2025-04-07">
            <text:p>04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1 </text:p>
          </table:table-cell>
          <table:table-cell table:style-name="ce14" office:value-type="date" office:date-value="2025-04-07">
            <text:p>04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2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2 </text:p>
          </table:table-cell>
          <table:table-cell/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3_en_US_oca.meVE.Aposticha3 </text:p>
          </table:table-cell>
          <table:table-cell/>
          <table:table-cell table:style-name="ce39" office:value-type="string">
            <text:p>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1 </text:p>
          </table:table-cell>
          <table:table-cell table:style-name="ce14" office:value-type="date" office:date-value="2025-04-08">
            <text:p>04/0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1 </text:p>
          </table:table-cell>
          <table:table-cell table:style-name="ce33" office:value-type="date" office:date-value="2025-04-08">
            <text:p>04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1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1 </text:p>
          </table:table-cell>
          <table:table-cell table:style-name="ce33" office:value-type="date" office:date-value="2025-04-09">
            <text:p>04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1 </text:p>
          </table:table-cell>
          <table:table-cell table:style-name="ce14" office:value-type="date" office:date-value="2025-04-09">
            <text:p>04/0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6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1 </text:p>
          </table:table-cell>
          <table:table-cell table:style-name="ce33" office:value-type="date" office:date-value="2025-04-11">
            <text:p>04/1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1 </text:p>
          </table:table-cell>
          <table:table-cell table:style-name="ce14" office:value-type="date" office:date-value="2025-04-11">
            <text:p>04/1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2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1 </text:p>
          </table:table-cell>
          <table:table-cell table:style-name="ce33" office:value-type="date" office:date-value="2025-04-13">
            <text:p>04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1 </text:p>
          </table:table-cell>
          <table:table-cell table:style-name="ce14" office:value-type="date" office:date-value="2025-04-13">
            <text:p>04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7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1 </text:p>
          </table:table-cell>
          <table:table-cell table:style-name="ce14" office:value-type="date" office:date-value="2025-04-15">
            <text:p>04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3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1 </text:p>
          </table:table-cell>
          <table:table-cell table:style-name="ce33" office:value-type="date" office:date-value="2025-04-15">
            <text:p>04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1 </text:p>
          </table:table-cell>
          <table:table-cell table:style-name="ce14" office:value-type="date" office:date-value="2025-04-16">
            <text:p>04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5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1 </text:p>
          </table:table-cell>
          <table:table-cell table:style-name="ce33" office:value-type="date" office:date-value="2025-05-02">
            <text:p>05/0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1 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1 </text:p>
          </table:table-cell>
          <table:table-cell table:style-name="ce14" office:value-type="date" office:date-value="2025-05-06">
            <text:p>05/0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09_en_US_oca.meVE.Aposticha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4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0_en_US_oca.meVE.Stichera01 </text:p>
          </table:table-cell>
          <table:table-cell table:style-name="ce14" office:value-type="date" office:date-value="2026-01-05">
            <text:p>01/05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2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3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5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0_en_US_oca.meVE.Stichera06 </text:p>
          </table:table-cell>
          <table:table-cell table:style-name="ce67"/>
          <table:table-cell table:style-name="ce15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1_en_US_oca.meVE.Stichera01 </text:p>
          </table:table-cell>
          <table:table-cell table:style-name="ce33" office:value-type="date" office:date-value="2025-05-06">
            <text:p>05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1 </text:p>
          </table:table-cell>
          <table:table-cell table:style-name="ce14" office:value-type="date" office:date-value="2025-05-07">
            <text:p>05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4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1 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6_en_US_dedes.meVE.Stichera04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5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Stichera06 </text:p>
          </table:table-cell>
          <table:table-cell table:style-name="ce69" office:value-type="string">
            <text:p>NA EP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me.m08.d16_en_US_dedes.meVE.Aposticha1</text:p>
          </table:table-cell>
          <table:table-cell table:style-name="ce33" office:value-type="date" office:date-value="2025-05-08">
            <text:p>05/08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7_en_US_oca.meVE.Stichera04 </text:p>
          </table:table-cell>
          <table:table-cell table:style-name="ce14" office:value-type="date" office:date-value="2026-01-07">
            <text:p>01/07/26</text:p>
          </table:table-cell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number-columns-repeated="1020"/>
        </table:table-row>
        <table:table-row table:style-name="ro11">
          <table:table-cell table:style-name="ce6" office:value-type="string">
            <text:p>me.m08.d17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8.d18_en_US_oca.meVE.Stichera01 </text:p>
          </table:table-cell>
          <table:table-cell table:style-name="ce33" office:value-type="date" office:date-value="2025-05-09">
            <text:p>05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1 </text:p>
          </table:table-cell>
          <table:table-cell table:style-name="ce14" office:value-type="date" office:date-value="2025-05-12">
            <text:p>05/12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19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1 </text:p>
          </table:table-cell>
          <table:table-cell table:style-name="ce33" office:value-type="date" office:date-value="2025-05-13">
            <text:p>05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1 </text:p>
          </table:table-cell>
          <table:table-cell table:style-name="ce14" office:value-type="date" office:date-value="2025-05-13">
            <text:p>05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1 </text:p>
          </table:table-cell>
          <table:table-cell table:style-name="ce33" office:value-type="date" office:date-value="2025-05-14">
            <text:p>05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1 </text:p>
          </table:table-cell>
          <table:table-cell table:style-name="ce14" office:value-type="date" office:date-value="2025-05-14">
            <text:p>05/1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4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1 </text:p>
          </table:table-cell>
          <table:table-cell table:style-name="ce14" office:value-type="date" office:date-value="2025-05-15">
            <text:p>05/1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27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1 </text:p>
          </table:table-cell>
          <table:table-cell table:style-name="ce33" office:value-type="date" office:date-value="2025-05-15">
            <text:p>05/1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1 </text:p>
          </table:table-cell>
          <table:table-cell table:style-name="ce14" office:value-type="date" office:date-value="2025-05-16">
            <text:p>05/16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2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08.d31_en_US_oca.meVE.Stichera03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4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1 </text:p>
          </table:table-cell>
          <table:table-cell table:style-name="ce35" office:value-type="date" office:date-value="2025-05-19">
            <text:p>05/1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Aposticha1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2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Aposticha3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09.d07_en_US_oca.meVE.Stichera01 </text:p>
          </table:table-cell>
          <table:table-cell table:style-name="ce33" office:value-type="date" office:date-value="2025-05-19">
            <text:p>05/1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2 </text:p>
          </table:table-cell>
          <table:table-cell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3 </text:p>
          </table:table-cell>
          <table:table-cell/>
          <table:table-cell table:style-name="ce39" office:value-type="string">
            <text:p>goadedes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07_en_US_oca.meVE.Stichera04 </text:p>
          </table:table-cell>
          <table:table-cell table:style-name="ce33" office:value-type="date" office:date-value="2026-01-08">
            <text:p>01/08/26</text:p>
          </table:table-cell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5 </text:p>
          </table:table-cell>
          <table:table-cell/>
          <table:table-cell table:style-name="ce39"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09.d07_en_US_oca.meVE.Stichera06 </text:p>
          </table:table-cell>
          <table:table-cell/>
          <table:table-cell table:style-name="ce39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9" office:value-type="string">
            <text:p>me.m09.d09_en_US_oca.meVE.Aposticha1 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09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Glory 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1 </text:p>
          </table:table-cell>
          <table:table-cell table:style-name="ce37" office:value-type="date" office:date-value="2025-06-09">
            <text:p>06/09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1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4 </text:p>
          </table:table-cell>
          <table:table-cell table:style-name="ce33" office:value-type="date" office:date-value="2025-06-09">
            <text:p>06/09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1 </text:p>
          </table:table-cell>
          <table:table-cell table:style-name="ce37" office:value-type="date" office:date-value="2025-06-11">
            <text:p>06/11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4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6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dedes.meVE.Aposticha2 </text:p>
          </table:table-cell>
          <table:table-cell table:style-name="ce33" office:value-type="date" office:date-value="2025-06-11">
            <text:p>06/11/25</text:p>
          </table:table-cell>
          <table:table-cell table:style-name="ce39" office:value-type="string">
            <text:p>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1 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4 </text:p>
          </table:table-cell>
          <table:table-cell table:style-name="ce37" office:value-type="date" office:date-value="2025-06-12">
            <text:p>06/12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5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18_en_US_oca.meVE.Stichera06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1 </text:p>
          </table:table-cell>
          <table:table-cell table:style-name="ce33" office:value-type="date" office:date-value="2025-06-10">
            <text:p>06/1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4 </text:p>
          </table:table-cell>
          <table:table-cell table:style-name="ce33" office:value-type="date" office:date-value="2025-06-12">
            <text:p>06/12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1 </text:p>
          </table:table-cell>
          <table:table-cell table:style-name="ce37" office:value-type="date" office:date-value="2025-06-13">
            <text:p>06/13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dedes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1</text:p>
          </table:table-cell>
          <table:table-cell table:style-name="ce37" office:value-type="date" office:date-value="2025-06-10">
            <text:p>06/10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0_en_US_oca.meVE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4 </text:p>
          </table:table-cell>
          <table:table-cell table:style-name="ce33" office:value-type="date" office:date-value="2025-06-13">
            <text:p>06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1 </text:p>
          </table:table-cell>
          <table:table-cell table:style-name="ce37" office:value-type="date" office:date-value="2025-06-16">
            <text:p>06/16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1 </text:p>
          </table:table-cell>
          <table:table-cell table:style-name="ce37" office:value-type="date" office:date-value="2025-06-14">
            <text:p>06/14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3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1 </text:p>
          </table:table-cell>
          <table:table-cell table:style-name="ce33" office:value-type="date" office:date-value="2025-06-16">
            <text:p>06/16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1 </text:p>
          </table:table-cell>
          <table:table-cell table:style-name="ce37" office:value-type="date" office:date-value="2025-06-17">
            <text:p>06/17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27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1 </text:p>
          </table:table-cell>
          <table:table-cell table:style-name="ce33" office:value-type="date" office:date-value="2025-06-18">
            <text:p>06/1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1 </text:p>
          </table:table-cell>
          <table:table-cell table:style-name="ce37" office:value-type="date" office:date-value="2025-06-18">
            <text:p>06/18/25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9" office:value-type="string">
            <text:p>me.m09.d30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1_en_US_dedes.meVE.SticTheotokion </text:p>
          </table:table-cell>
          <table:table-cell table:style-name="ce33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2_en_US_dedes.meVE.AposTheotokion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3_en_US_dedes.meVE.AposTheotokion </text:p>
          </table:table-cell>
          <table:table-cell table:style-name="ce33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1">
          <table:table-cell table:style-name="ce3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4"/>
          <table:table-cell table:number-columns-repeated="1020"/>
        </table:table-row>
        <table:table-row table:style-name="ro11">
          <table:table-cell table:style-name="ce3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74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06_en_US_oca.meVE.Aposticha1 </text:p>
          </table:table-cell>
          <table:table-cell table:style-name="ce14" office:value-type="date" office:date-value="2025-07-24">
            <text:p>07/2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1 </text:p>
          </table:table-cell>
          <table:table-cell table:style-name="ce3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AposTheotokion </text:p>
          </table:table-cell>
          <table:table-cell table:style-name="ce23" office:value-type="date" office:date-value="2025-07-25">
            <text:p>07/2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09_en_US_dedes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AposStavrotheotokion </text:p>
          </table:table-cell>
          <table:table-cell table:style-name="ce33" office:value-type="date" office:date-value="2025-07-25">
            <text:p>07/25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1 </text:p>
          </table:table-cell>
          <table:table-cell table:style-name="ce23" office:value-type="date" office:date-value="2025-07-28">
            <text:p>07/28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1 </text:p>
          </table:table-cell>
          <table:table-cell table:style-name="ce33" office:value-type="date" office:date-value="2025-07-28">
            <text:p>07/2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1 </text:p>
          </table:table-cell>
          <table:table-cell table:style-name="ce23" office:value-type="date" office:date-value="2025-07-29">
            <text:p>07/29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1 </text:p>
          </table:table-cell>
          <table:table-cell table:style-name="ce33" office:value-type="date" office:date-value="2025-07-30">
            <text:p>07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dedes.meVE.Stichera04 </text:p>
          </table:table-cell>
          <table:table-cell table:style-name="ce23" office:value-type="date" office:date-value="2026-05-28">
            <text:p>05/28/26</text:p>
          </table:table-cell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number-columns-repeated="1020"/>
        </table:table-row>
        <table:table-row table:style-name="ro11">
          <table:table-cell table:style-name="ce6" office:value-type="string">
            <text:p>me.m10.d19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6" office:value-type="string">
            <text:p>me.m10.d19_en_US_oca.meVE.Stichera01 </text:p>
          </table:table-cell>
          <table:table-cell table:style-name="ce23" office:value-type="date" office:date-value="2025-07-30">
            <text:p>07/30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1 </text:p>
          </table:table-cell>
          <table:table-cell table:style-name="ce33" office:value-type="date" office:date-value="2025-07-31">
            <text:p>07/3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1 </text:p>
          </table:table-cell>
          <table:table-cell table:style-name="ce23" office:value-type="date" office:date-value="25-07-30">
            <text:p>08/01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1 </text:p>
          </table:table-cell>
          <table:table-cell table:style-name="ce33" office:value-type="date" office:date-value="2025-08-01">
            <text:p>08/01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1 </text:p>
          </table:table-cell>
          <table:table-cell table:style-name="ce23" office:value-type="date" office:date-value="2025-08-04">
            <text:p>08/04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4_en_US_dedes.meVE.SticStavro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1 </text:p>
          </table:table-cell>
          <table:table-cell table:style-name="ce33" office:value-type="date" office:date-value="2025-08-04">
            <text:p>08/0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4 </text:p>
          </table:table-cell>
          <table:table-cell table:style-name="ce23" office:value-type="date" office:date-value="2025-08-05">
            <text:p>08/05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7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28_en_US_dedes.meVE.Stichera01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2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3</text:p>
          </table:table-cell>
          <table:table-cell table:style-name="ce69"/>
          <table:table-cell table:number-columns-repeated="1022"/>
        </table:table-row>
        <table:table-row table:style-name="ro12">
          <table:table-cell table:style-name="ce3" office:value-type="string">
            <text:p>me.m10.28_en_US_dedes.meVE.Stichera04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5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3" office:value-type="string">
            <text:p>me.m10.28_en_US_dedes.meVE.Stichera06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" office:value-type="string">
            <text:p>me.m10.d29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2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1 </text:p>
          </table:table-cell>
          <table:table-cell table:style-name="ce33" office:value-type="date" office:date-value="2025-08-07">
            <text:p>08/07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1 </text:p>
          </table:table-cell>
          <table:table-cell table:style-name="ce23" office:value-type="date" office:date-value="2025-08-07">
            <text:p>08/07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me.m10.d3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1 </text:p>
          </table:table-cell>
          <table:table-cell table:style-name="ce33" office:value-type="date" office:date-value="2025-08-08">
            <text:p>08/08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0.dHF_en_US_dedes.meVE.Apolytikion1</text:p>
          </table:table-cell>
          <table:table-cell table:style-name="ce33" office:value-type="date" office:date-value="2025-08-09">
            <text:p>08/09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1_en_US_oca.meVE.Stichera02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4_en_US_dedes.meVE.SticTheotokion </text:p>
          </table:table-cell>
          <table:table-cell table:style-name="ce63" office:value-type="date" office:date-value="2025-07-24">
            <text:p>07/24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1 </text:p>
          </table:table-cell>
          <table:table-cell table:style-name="ce14" office:value-type="date" office:date-value="2024-10-30">
            <text:p>10/3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/>
          <table:table-cell table:style-name="ce10"/>
          <table:table-cell table:number-columns-repeated="1017"/>
        </table:table-row>
        <table:table-row table:style-name="ro11">
          <table:table-cell table:style-name="ce3" office:value-type="string">
            <text:p>me.m11.d05_en_US_oca.meVE.Stichera02 </text:p>
          </table:table-cell>
          <table:table-cell table:style-name="ce12" office:value-type="date" office:date-value="2024-10-31">
            <text:p>10/31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1</text:p>
          </table:table-cell>
          <table:table-cell table:style-name="ce16"/>
          <table:table-cell table:style-name="ce72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2</text:p>
          </table:table-cell>
          <table:table-cell table:style-name="ce16"/>
          <table:table-cell table:style-name="ce72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3</text:p>
          </table:table-cell>
          <table:table-cell table:style-name="ce16"/>
          <table:table-cell table:style-name="ce72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4</text:p>
          </table:table-cell>
          <table:table-cell table:style-name="ce16"/>
          <table:table-cell table:style-name="ce72" office:value-type="string">
            <text:p>goadedes</text:p>
          </table:table-cell>
          <table:table-cell table:style-name="ce7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5</text:p>
          </table:table-cell>
          <table:table-cell table:style-name="ce16"/>
          <table:table-cell table:style-name="ce72" office:value-type="string">
            <text:p>goadedes</text:p>
          </table:table-cell>
          <table:table-cell table:style-name="ce72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hera06</text:p>
          </table:table-cell>
          <table:table-cell table:style-name="ce16"/>
          <table:table-cell table:style-name="ce72" office:value-type="string">
            <text:p>goadedes</text:p>
          </table:table-cell>
          <table:table-cell table:style-name="ce72" office:value-type="float" office:value="8">
            <text:p>8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07_en_US_oca.meVE.SticStavrotheotokion</text:p>
          </table:table-cell>
          <table:table-cell table:style-name="ce16"/>
          <table:table-cell table:style-name="ce72" table:number-columns-repeated="2"/>
          <table:table-cell table:number-columns-repeated="1020"/>
        </table:table-row>
        <table:table-row table:style-name="ro11">
          <table:table-cell table:style-name="ce3" office:value-type="string">
            <text:p>me.m11.d07_en_US_oca.meVE.AposStavrotheotokion</text:p>
          </table:table-cell>
          <table:table-cell table:style-name="ce33" office:value-type="date" office:date-value="2025-03-01">
            <text:p>03/01/25</text:p>
          </table:table-cell>
          <table:table-cell table:style-name="ce73" office:value-type="string">
            <text:p>goadedes</text:p>
          </table:table-cell>
          <table:table-cell table:style-name="ce7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2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4_en_US_oca.meVE.Aposticha1 </text:p>
          </table:table-cell>
          <table:table-cell table:style-name="ce12" office:value-type="date" office:date-value="2024-11-03">
            <text:p>11/03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1 </text:p>
          </table:table-cell>
          <table:table-cell table:style-name="ce14" office:value-type="date" office:date-value="2024-11-01">
            <text:p>11/0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4_en_US_oca.meVE.Stichera03 </text:p>
          </table:table-cell>
          <table:table-cell table:style-name="ce12" office:value-type="date" office:date-value="2024-11-02">
            <text:p>11/02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style-name="ce10"/>
          <table:table-cell/>
          <table:table-cell table:style-name="ce10" table:number-columns-repeated="1017"/>
        </table:table-row>
        <table:table-row table:style-name="ro11">
          <table:table-cell table:style-name="ce3" office:value-type="string">
            <text:p>me.m11.d15_en_US_dedes.meVE.Aposticha1 </text:p>
          </table:table-cell>
          <table:table-cell table:style-name="ce14" office:value-type="date" office:date-value="2024-11-04">
            <text:p>11/04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5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Aposticha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16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6_en_US_oca.meVE.SticTheotokion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0">
            <text:p>10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1 </text:p>
          </table:table-cell>
          <table:table-cell table:style-name="ce12" office:value-type="date" office:date-value="2024-11-05">
            <text:p>11/05/24</text:p>
          </table:table-cell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8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1 </text:p>
          </table:table-cell>
          <table:table-cell table:style-name="ce23" office:value-type="date" office:date-value="2024-11-06">
            <text:p>11/06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19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4 </text:p>
          </table:table-cell>
          <table:table-cell table:style-name="ce12" office:value-type="date" office:date-value="2024-11-07">
            <text:p>11/07/24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me.m11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me.m11.d23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3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12">
            <text:p>1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Aposticha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4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1 </text:p>
          </table:table-cell>
          <table:table-cell table:style-name="ce12" office:value-type="date" office:date-value="2024-11-10">
            <text:p>11/1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1 </text:p>
          </table:table-cell>
          <table:table-cell table:style-name="ce14" office:value-type="date" office:date-value="2024-11-08">
            <text:p>11/08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2 </text:p>
          </table:table-cell>
          <table:table-cell table:style-name="ce12" office:value-type="date" office:date-value="2024-11-09">
            <text:p>11/09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1.d26_en_US_goadedes.alt1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4 </text:p>
          </table:table-cell>
          <table:table-cell table:style-name="ce14" office:value-type="date" office:date-value="2024-11-11">
            <text:p>11/1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dedes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1.d28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1 </text:p>
          </table:table-cell>
          <table:table-cell table:style-name="ce12" office:value-type="date" office:date-value="2024-11-12">
            <text:p>11/12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1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1 </text:p>
          </table:table-cell>
          <table:table-cell table:style-name="ce14" office:value-type="date" office:date-value="2024-11-13">
            <text:p>11/13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3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2 </text:p>
          </table:table-cell>
          <table:table-cell table:style-name="ce12" office:value-type="date" office:date-value="2024-11-14">
            <text:p>11/14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5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dedes.meVE.Stichera04 </text:p>
          </table:table-cell>
          <table:table-cell table:style-name="ce33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dedes.meVE.Stichera06 </text:p>
          </table:table-cell>
          <table:table-cell table:style-name="ce33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3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me.m12.d07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7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5">
            <text:p>5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dedes.meVE.Stichera03 </text:p>
          </table:table-cell>
          <table:table-cell table:style-name="ce14" office:value-type="date" office:date-value="2025-08-13">
            <text:p>08/13/25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4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5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08_en_US_oca.meVE.Stichera06 </text:p>
          </table:table-cell>
          <table:table-cell table:style-name="ce67"/>
          <table:table-cell table:style-name="ce67" office:value-type="string">
            <text:p>goadedes</text:p>
          </table:table-cell>
          <table:table-cell table:style-name="ce67" office:value-type="float" office:value="4">
            <text:p>4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1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2 </text:p>
          </table:table-cell>
          <table:table-cell table:style-name="ce12" office:value-type="date" office:date-value="2024-11-20">
            <text:p>11/20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0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1 </text:p>
          </table:table-cell>
          <table:table-cell table:style-name="ce14" office:value-type="date" office:date-value="2024-11-21">
            <text:p>11/21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0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1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1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1 </text:p>
          </table:table-cell>
          <table:table-cell table:style-name="ce33" office:value-type="date" office:date-value="2025-08-13">
            <text:p>08/13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1 </text:p>
          </table:table-cell>
          <table:table-cell table:style-name="ce12" office:value-type="date" office:date-value="2024-11-21">
            <text:p>11/21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2 </text:p>
          </table:table-cell>
          <table:table-cell table:style-name="ce12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4 </text:p>
          </table:table-cell>
          <table:table-cell table:style-name="ce12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13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4_en_US_dedes.meVE.Stichera01 </text:p>
          </table:table-cell>
          <table:table-cell table:style-name="ce70"/>
          <table:table-cell table:style-name="ce71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2 </text:p>
          </table:table-cell>
          <table:table-cell table:style-name="ce70"/>
          <table:table-cell table:style-name="ce71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12.d14_en_US_dedes.meVE.Stichera03 </text:p>
          </table:table-cell>
          <table:table-cell table:style-name="ce70"/>
          <table:table-cell table:style-name="ce71" table:number-columns-repeated="2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4 </text:p>
          </table:table-cell>
          <table:table-cell table:style-name="ce71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5 </text:p>
          </table:table-cell>
          <table:table-cell table:style-name="ce71" table:number-columns-repeated="3"/>
          <table:table-cell table:number-columns-repeated="1020"/>
        </table:table-row>
        <table:table-row table:style-name="ro11">
          <table:table-cell table:style-name="ce2" office:value-type="string">
            <text:p>me.m12.d14_en_US_oca.meVE.Stichera06 </text:p>
          </table:table-cell>
          <table:table-cell table:style-name="ce71" table:number-columns-repeated="3"/>
          <table:table-cell table:number-columns-repeated="1020"/>
        </table:table-row>
        <table:table-row table:style-name="ro11">
          <table:table-cell table:style-name="ce3" office:value-type="string">
            <text:p>me.m12.d16_en_US_oca.meVE.Stichera01 </text:p>
          </table:table-cell>
          <table:table-cell table:style-name="ce33" office:value-type="date" office:date-value="2025-08-14">
            <text:p>08/14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1 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1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alt1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1 </text:p>
          </table:table-cell>
          <table:table-cell table:style-name="ce12" office:value-type="date" office:date-value="2025-08-19">
            <text:p>08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4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7_en_US_oca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1 </text:p>
          </table:table-cell>
          <table:table-cell table:style-name="ce33" office:value-type="date" office:date-value="2025-08-20">
            <text:p>08/2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1 </text:p>
          </table:table-cell>
          <table:table-cell table:style-name="ce12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19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21_en_US_dedes.meVE.Stichera04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5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dedes.meVE.Stichera06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Aposticha3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1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2 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me.m12.d21_en_US_oca.meVE.Stichera03 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me.m12.d22_en_US_dedes.meVE.Stichera04 </text:p>
          </table:table-cell>
          <table:table-cell table:style-name="ce12" office:value-type="date" office:date-value="2025-08-25">
            <text:p>08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1 </text:p>
          </table:table-cell>
          <table:table-cell table:style-name="ce12"/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5" office:value-type="string">
            <text:p>me.m12.d22_en_US_oca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1 </text:p>
          </table:table-cell>
          <table:table-cell table:style-name="ce33" office:value-type="date" office:date-value="2025-08-30">
            <text:p>08/30/25</text:p>
          </table:table-cell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1 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1 </text:p>
          </table:table-cell>
          <table:table-cell table:style-name="ce12" office:value-type="date" office:date-value="2025-09-05">
            <text:p>09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4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5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dedes.meVE.Stichera06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1 </text:p>
          </table:table-cell>
          <table:table-cell table:style-name="ce12" office:value-type="date" office:date-value="2025-09-07">
            <text:p>09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2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30_en_US_oca.meVE.Aposticha3 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1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2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AC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goadedes.meVE.Stichera04 </text:p>
          </table:table-cell>
          <table:table-cell table:style-name="ce14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5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me.m12.dBC_en_US_oca.meVE.Stichera06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6">
            <text:p>6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1 </text:p>
          </table:table-cell>
          <table:table-cell table:style-name="ce12" office:value-type="date" office:date-value="2024-11-18">
            <text:p>11/18/24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2 </text:p>
          </table:table-cell>
          <table:table-cell table:style-name="ce14" office:value-type="date" office:date-value="2024-11-19">
            <text:p>11/19/24</text:p>
          </table:table-cell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3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me.m12.dFF_en_US_oca.meVE.Stichera04 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table:style-name="ce39" office:value-type="string">
            <text:p>x</text:p>
          </table:table-cell>
          <table:table-cell table:number-columns-repeated="1019"/>
        </table:table-row>
        <table:table-row table:style-name="ro11" table:number-rows-repeated="1047282">
          <table:table-cell table:number-columns-repeated="1024"/>
        </table:table-row>
        <table:table-row table:style-name="ro3" table:number-rows-repeated="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ion_Matins_notmetered" table:style-name="ta2" table:print="false">
        <office:forms form:automatic-focus="false" form:apply-design-mode="false"/>
        <table:table-column table:style-name="co5" table:default-cell-style-name="ce10"/>
        <table:table-column table:style-name="co2" table:number-columns-repeated="2" table:default-cell-style-name="ce31"/>
        <table:table-column table:style-name="co6" table:default-cell-style-name="ce31"/>
        <table:table-column table:style-name="co7" table:default-cell-style-name="ce39"/>
        <table:table-column table:style-name="co3" table:number-columns-repeated="1019" table:default-cell-style-name="Excel_20_Built-in_20_Normal"/>
        <table:table-row table:style-name="ro5">
          <table:table-cell table:style-name="ce1" office:value-type="string">
            <text:p>Not Metered</text:p>
          </table:table-cell>
          <table:table-cell table:style-name="ce11" office:value-type="string">
            <text:p>date don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count</text:p>
          </table:table-cell>
          <table:table-cell/>
          <table:table-cell table:style-name="ce11" office:value-type="string">
            <text:p>remaining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11"/>
          <table:table-cell table:style-name="ce49" office:value-type="string">
            <text:p>Total so far:</text:p>
          </table:table-cell>
          <table:table-cell table:style-name="ce42" table:formula="of:=SUM([.D3:.D237])" office:value-type="float" office:value="214">
            <text:p>214</text:p>
          </table:table-cell>
          <table:table-cell/>
          <table:table-cell table:style-name="ce45" table:formula="of:=239-[.D2]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<text:s/>me.m01.d02_en_US_oca.meMA.Kathisma11</text:p>
          </table:table-cell>
          <table:table-cell table:style-name="ce12" office:value-type="date" office:date-value="2024-12-31">
            <text:p>12/31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Exaposteilarion1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Glory</text:p>
          </table:table-cell>
          <table:table-cell table:style-name="ce12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02_en_US_oca.meMA.LaudsBoth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1</text:p>
          </table:table-cell>
          <table:table-cell table:style-name="ce14" office:value-type="date" office:date-value="2024-12-31">
            <text:p>12/3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Kathisma2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3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1</text:p>
          </table:table-cell>
          <table:table-cell table:style-name="ce14" office:value-type="date" office:date-value="2025-01-01">
            <text:p>01/01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1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Exaposteilarion2</text:p>
          </table:table-cell>
          <table:table-cell table:style-name="ce23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04_en_US_oca.meMA.LaudsBoth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4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1</text:p>
          </table:table-cell>
          <table:table-cell table:style-name="ce21" office:value-type="date" office:date-value="2025-01-05">
            <text:p>01/05/25</text:p>
          </table:table-cell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1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Kathisma2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dedes.meMA.Kathisma2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Exaposteilarion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1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2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3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style-name="ce10" table:number-columns-repeated="1019"/>
        </table:table-row>
        <table:table-row table:style-name="ro5">
          <table:table-cell table:style-name="ce2" office:value-type="string">
            <text:p><text:s/>me.m01.d05_en_US_oca.meMA.Lauds4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Glory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<text:s/>me.m01.d05_en_US_oca.meMA.LaudsBoth</text:p>
          </table:table-cell>
          <table:table-cell table:style-name="ce22"/>
          <table:table-cell table:style-name="ce22" office:value-type="string">
            <text:p>goadedes</text:p>
          </table:table-cell>
          <table:table-cell table:style-name="ce22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08_en_US_oca.meMA.Kathisma21</text:p>
          </table:table-cell>
          <table:table-cell table:style-name="ce12" office:value-type="date" office:date-value="2025-01-02">
            <text:p>01/02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11</text:p>
          </table:table-cell>
          <table:table-cell table:style-name="ce14" office:value-type="date" office:date-value="2025-01-02">
            <text:p>01/02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Exaposteilarion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ticha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1.d09_en_US_oca.meMA.AposGlory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11</text:p>
          </table:table-cell>
          <table:table-cell table:style-name="ce12" office:value-type="date" office:date-value="2025-01-03">
            <text:p>01/03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1</text:p>
          </table:table-cell>
          <table:table-cell table:style-name="ce12" office:value-type="date" office:date-value="2024-12-30">
            <text:p>12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0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1</text:p>
          </table:table-cell>
          <table:table-cell table:style-name="ce14" office:value-type="date" office:date-value="2024-01-03">
            <text:p>01/03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2</text:p>
          </table:table-cell>
          <table:table-cell table:style-name="ce23" office:value-type="date" office:date-value="2025-01-04">
            <text:p>01/04/25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1_en_US_dedes.meMA.Lauds4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Kathisma21</text:p>
          </table:table-cell>
          <table:table-cell table:style-name="ce33" office:value-type="date" office:date-value="2025-01-06">
            <text:p>01/06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ticha3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1.d12_en_US_oca.meMA.AposGlory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1</text:p>
          </table:table-cell>
          <table:table-cell table:style-name="ce12" office:value-type="date" office:date-value="2025-01-04">
            <text:p>01/0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15_en_US_oca.meMA.Exaposteilarion3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1</text:p>
          </table:table-cell>
          <table:table-cell table:style-name="ce12" office:value-type="date" office:date-value="2024-12-12">
            <text:p>12/12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1.d17_en_US_oca.meMA.Exaposteilarion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1.d21_en_US_dedes.meMA.Exaposteilarion2</text:p>
          </table:table-cell>
          <table:table-cell table:style-name="ce14" office:value-type="date" office:date-value="2025-01-08">
            <text:p>01/08/25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11</text:p>
          </table:table-cell>
          <table:table-cell table:style-name="ce12" office:value-type="date" office:date-value="2024-12-10">
            <text:p>12/10/24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3_en_US_oca.meMA.Kathisma21</text:p>
          </table:table-cell>
          <table:table-cell table:style-name="ce20" office:value-type="date" office:date-value="2025-01-10">
            <text:p>01/1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5_en_US_oca.meMA.Kathisma2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2.d06_en_US_oca.meMA.Kathisma1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dedes.meMA.Kathisma11</text:p>
          </table:table-cell>
          <table:table-cell table:style-name="ce14" office:value-type="date" office:date-value="2024-12-10">
            <text:p>12/10/24</text:p>
          </table:table-cell>
          <table:table-cell table:style-name="ce15" office:value-type="string">
            <text:p>goadedes</text:p>
          </table:table-cell>
          <table:table-cell table:style-name="ce15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Exaposteilarion1</text:p>
          </table:table-cell>
          <table:table-cell table:style-name="ce14" office:value-type="date" office:date-value="2024-12-11">
            <text:p>12/11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2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s/>me.m02.d08_en_US_oca.meMA.Lauds3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me.m02.d17_en_US_dedes.meMA.AposTheotokion</text:p>
          </table:table-cell>
          <table:table-cell table:style-name="ce20" office:value-type="date" office:date-value="2025-01-14">
            <text:p>01/14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02.d26_en_US_andronache.alt1.meMA.Kathisma11</text:p>
          </table:table-cell>
          <table:table-cell table:style-name="ce47" office:value-type="date" office:date-value="2025-01-27">
            <text:p>01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Kathisma2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/>
          <table:table-cell table:style-name="ce10" office:value-type="string">
            <text:p>WHAT ABOUT KONTAKIA?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/>me.m02.d26_en_US_andronache.alt1.meMA.Exaposteilarion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1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2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>
            <text:p><text:s/>me.m02.d26_en_US_andronache.alt1.meMA.Lauds3</text:p>
          </table:table-cell>
          <table:table-cell table:style-name="ce26"/>
          <table:table-cell table:style-name="ce26" office:value-type="string">
            <text:p>goadedes</text:p>
          </table:table-cell>
          <table:table-cell table:style-name="ce26" office:value-type="float" office:value="6">
            <text:p>6</text:p>
          </table:table-cell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5" office:value-type="string">
            <text:p><text:s/>me.m05.d15_en_US_oca.meMA.Exaposteilarion1</text:p>
          </table:table-cell>
          <table:table-cell table:style-name="ce12" office:value-type="date" office:date-value="2025-01-27">
            <text:p>01/27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5.d2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4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06.d08_en_US_oca.meMA.Exaposteilarion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01_en_US_oca.meMA.Exaposteilarion1</text:p>
          </table:table-cell>
          <table:table-cell table:style-name="ce33" office:value-type="date" office:date-value="2025-05-05">
            <text:p>05/05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09_en_US_oca.meMA.Kathisma21</text:p>
          </table:table-cell>
          <table:table-cell table:style-name="ce35" office:value-type="date" office:date-value="2025-05-05">
            <text:p>05/05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11</text:p>
          </table:table-cell>
          <table:table-cell table:style-name="ce33" office:value-type="date" office:date-value="2025-06-20">
            <text:p>06/20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8.d21_en_US_oca.meMA.Exaposteilarion1</text:p>
          </table:table-cell>
          <table:table-cell table:style-name="ce33" office:value-type="date" office:date-value="2025-05-20">
            <text:p>05/20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11</text:p>
          </table:table-cell>
          <table:table-cell table:style-name="ce37" office:value-type="date" office:date-value="2025-05-20">
            <text:p>05/20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8.d22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3_en_US_oca.meMA.LaudsBoth</text:p>
          </table:table-cell>
          <table:table-cell table:style-name="ce33" office:value-type="date" office:date-value="2025-06-04">
            <text:p>06/04/25</text:p>
          </table:table-cell>
          <table:table-cell table:style-name="ce39" office:value-type="string">
            <text:p>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1</text:p>
          </table:table-cell>
          <table:table-cell table:style-name="ce37" office:value-type="date" office:date-value="2025-06-04">
            <text:p>06/04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16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11</text:p>
          </table:table-cell>
          <table:table-cell table:style-name="ce33" office:value-type="date" office:date-value="2025-06-05">
            <text:p>06/05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5">
          <table:table-cell table:style-name="ce9" office:value-type="string">
            <text:p><text:s/>me.m09.d18_en_US_oca.meMA.Aposticha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<text:s/>me.m09.d23_en_US_oca.meMA.Kathisma21</text:p>
          </table:table-cell>
          <table:table-cell table:style-name="ce37" office:value-type="date" office:date-value="2025-06-06">
            <text:p>06/06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e.m09.d24_en_US_dedes.meMA.AposTheotokion</text:p>
          </table:table-cell>
          <table:table-cell table:style-name="ce37" office:value-type="date" office:date-value="2025-07-24">
            <text:p>07/24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09.d28_en_US_oca.meMA.Kathisma11</text:p>
          </table:table-cell>
          <table:table-cell table:style-name="ce33" office:value-type="date" office:date-value="2025-06-06">
            <text:p>06/06/25</text:p>
          </table:table-cell>
          <table:table-cell table:style-name="ce39" office:value-type="string">
            <text:p>goadedes</text:p>
          </table:table-cell>
          <table:table-cell table:style-name="ce3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.m10.d01_en_US_dedes.meMA.AposTheotokion</text:p>
          </table:table-cell>
          <table:table-cell table:style-name="ce33"/>
          <table:table-cell table:style-name="ce39" table:number-columns-repeated="2"/>
          <table:table-cell table:number-columns-repeated="1020"/>
        </table:table-row>
        <table:table-row table:style-name="ro5">
          <table:table-cell table:style-name="ce9" office:value-type="string">
            <text:p><text:s/>me.m10.d06_en_US_oca.meMA.Kathisma21</text:p>
          </table:table-cell>
          <table:table-cell table:style-name="ce37" office:value-type="date" office:date-value="2025-08-11">
            <text:p>08/11/25</text:p>
          </table:table-cell>
          <table:table-cell table:style-name="ce36" office:value-type="string">
            <text:p>goadedes</text:p>
          </table:table-cell>
          <table:table-cell table:style-name="ce3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09_en_US_oca.meMA.Exaposteilarion1</text:p>
          </table:table-cell>
          <table:table-cell table:style-name="ce33" office:value-type="date" office:date-value="2024-10-24">
            <text:p>10/24/24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1_en_US_oca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16_en_US_dedes.meMA.Kathisma2T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0_en_US_dedes.meMA.Exaposteilarion2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1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oca.meMA.Kathisma21</text:p>
          </table:table-cell>
          <table:table-cell table:style-name="ce39"/>
          <table:table-cell table:style-name="ce39" office:value-type="string">
            <text:p>goadedes</text:p>
          </table:table-cell>
          <table:table-cell table:style-name="ce39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1</text:p>
          </table:table-cell>
          <table:table-cell table:style-name="ce12" office:value-type="date" office:date-value="2024-10-25">
            <text:p>10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2_en_US_dedes.meMA.Exaposteilarion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2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3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Exaposteilarion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1.d24_en_US_dedes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1</text:p>
          </table:table-cell>
          <table:table-cell table:style-name="ce14" office:value-type="date" office:date-value="2024-10-26">
            <text:p>10/26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Kathisma2T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1</text:p>
          </table:table-cell>
          <table:table-cell table:style-name="ce12" office:value-type="date" office:date-value="2024-10-30">
            <text:p>10/30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2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3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1.d26_en_US_goadedes.alt1.meMA.Lauds4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11</text:p>
          </table:table-cell>
          <table:table-cell table:style-name="ce12" office:value-type="date" office:date-value="2024-11-13">
            <text:p>11/13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Kathisma21</text:p>
          </table:table-cell>
          <table:table-cell table:style-name="ce13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5_en_US_oca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osteilarion1</text:p>
          </table:table-cell>
          <table:table-cell table:style-name="ce14" office:value-type="date" office:date-value="2024-11-15">
            <text:p>11/15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07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osteilarion1</text:p>
          </table:table-cell>
          <table:table-cell table:style-name="ce20" office:value-type="date" office:date-value="2025-08-14">
            <text:p>08/14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08_en_US_dedes.meMA.ExapTheotokion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oca.meMA.Exaposteilarion1</text:p>
          </table:table-cell>
          <table:table-cell table:style-name="ce14" office:value-type="date" office:date-value="2024-11-18">
            <text:p>11/18/24</text:p>
          </table:table-cell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0_en_US_dedes.meMA.ExapTheotokion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11_en_US_dedes.meMA.ExapTheotokion</text:p>
          </table:table-cell>
          <table:table-cell table:style-name="ce15"/>
          <table:table-cell table:style-name="ce15" office:value-type="string">
            <text:p>dedes</text:p>
          </table:table-cell>
          <table:table-cell table:style-name="ce15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17_en_US_oca.meMA.Exaposteilarion1</text:p>
          </table:table-cell>
          <table:table-cell table:style-name="ce15"/>
          <table:table-cell table:style-name="ce15" office:value-type="string">
            <text:p>goadedes</text:p>
          </table:table-cell>
          <table:table-cell table:style-name="ce15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1</text:p>
          </table:table-cell>
          <table:table-cell table:style-name="ce12" office:value-type="date" office:date-value="2024-11-25">
            <text:p>11/25/24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1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1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2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23</text:p>
          </table:table-cell>
          <table:table-cell table:style-name="ce16"/>
          <table:table-cell table:style-name="ce16" office:value-type="string">
            <text:p>goadedes</text:p>
          </table:table-cell>
          <table:table-cell table:style-name="ce16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me.m12.d17_en_US_dedes.alt1.meMA.Kathisma3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me.m12.d17_en_US_dedes.alt1.meMA.Kathisma32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0_en_US_oca.meMA.Kathisma11</text:p>
          </table:table-cell>
          <table:table-cell table:style-name="ce12" office:value-type="date" office:date-value="2025-08-22">
            <text:p>08/22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2</text:p>
          </table:table-cell>
          <table:table-cell table:style-name="ce12" office:value-type="date" office:date-value="2025-08-25">
            <text:p>08/25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5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0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1_en_US_oca.meMA.Kathisma11</text:p>
          </table:table-cell>
          <table:table-cell/>
          <table:table-cell table:style-name="ce10"/>
          <table:table-cell table:number-columns-repeated="1021"/>
        </table:table-row>
        <table:table-row table:style-name="ro5">
          <table:table-cell table:style-name="ce3" office:value-type="string">
            <text:p><text:s/>me.m12.d21_en_US_oca.meMA.Kathisma2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3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4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Glory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LaudsBoth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1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me.m12.d21_en_US_oca.meMA.Aposticha3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/>me.m12.d22_en_US_oca.meMA.Kathisma11</text:p>
          </table:table-cell>
          <table:table-cell table:style-name="ce25" office:value-type="date" office:date-value="2025-08-26">
            <text:p>08/26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Kathisma2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1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4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Glory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LaudsBoth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1</text:p>
          </table:table-cell>
          <table:table-cell table:style-name="ce25" office:value-type="date" office:date-value="2025-08-27">
            <text:p>08/27/25</text:p>
          </table:table-cell>
          <table:table-cell table:style-name="ce26" office:value-type="string">
            <text:p>goadedes</text:p>
          </table:table-cell>
          <table:table-cell table:style-name="ce2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2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2_en_US_oca.meMA.Aposticha3</text:p>
          </table:table-cell>
          <table:table-cell table:style-name="ce48"/>
          <table:table-cell table:style-name="ce48" office:value-type="string">
            <text:p>goadedes</text:p>
          </table:table-cell>
          <table:table-cell table:style-name="ce48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11</text:p>
          </table:table-cell>
          <table:table-cell table:style-name="ce12" office:value-type="date" office:date-value="2025-08-29">
            <text:p>08/29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LaudsBoth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1</text:p>
          </table:table-cell>
          <table:table-cell table:style-name="ce12" office:value-type="date" office:date-value="2025-08-30">
            <text:p>08/30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23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1</text:p>
          </table:table-cell>
          <table:table-cell table:style-name="ce33" office:value-type="date" office:date-value="2025-09-01">
            <text:p>09/01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meMA.Exaposteilarion2</text:p>
          </table:table-cell>
          <table:table-cell table:style-name="ce10"/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1</text:p>
          </table:table-cell>
          <table:table-cell table:style-name="ce33" office:value-type="date" office:date-value="2025-09-02">
            <text:p>09/02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<text:s/>me.m12.d28_en_US_oca.meMA.Kathisma1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dedes.meMA.Kathisma2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1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2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ticha3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Glory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5" office:value-type="string">
            <text:p><text:s/>me.m12.d28_en_US_oca.meMA.AposBoth</text:p>
          </table:table-cell>
          <table:table-cell table:style-name="ce13" table:number-columns-repeated="3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<text:s/>me.m12.d29_en_US_oca.meMA.Kathisma11</text:p>
          </table:table-cell>
          <table:table-cell table:style-name="ce33" office:value-type="date" office:date-value="2025-09-04">
            <text:p>09/04/25</text:p>
          </table:table-cell>
          <table:table-cell table:style-name="ce39" office:value-type="string">
            <text:p>goadedes</text:p>
          </table:table-cell>
          <table:table-cell table:style-name="ce39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1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4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s/>me.m12.d30_en_US_oca.meMA.Laud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1</text:p>
          </table:table-cell>
          <table:table-cell table:style-name="ce12" office:value-type="date" office:date-value="2025-09-05">
            <text:p>09/05/25</text:p>
          </table:table-cell>
          <table:table-cell table:style-name="ce16" office:value-type="string">
            <text:p>goadedes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2</text:p>
          </table:table-cell>
          <table:table-cell table:style-name="ce12" office:value-type="date" office:date-value="2025-09-08">
            <text:p>09/08/25</text:p>
          </table:table-cell>
          <table:table-cell table:style-name="ce16" office:value-type="string">
            <text:p>goadedes</text:p>
          </table:table-cell>
          <table:table-cell table:style-name="ce16"/>
          <table:table-cell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/>me.m12.d30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3">
          <table:table-cell office:value-type="string">
            <text:p>me.m11.d01 Canon 1</text:p>
          </table:table-cell>
          <table:table-cell table:style-name="ce33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e" table:style-name="ta3" table:print="false">
        <table:table-column table:style-name="co8" table:number-columns-repeated="3" table:default-cell-style-name="ce52"/>
        <table:table-column table:style-name="co9" table:default-cell-style-name="ce10"/>
        <table:table-column table:style-name="co3" table:default-cell-style-name="Excel_20_Built-in_20_Normal"/>
        <table:table-column table:style-name="co2" table:number-columns-repeated="1019" table:default-cell-style-name="ce52"/>
        <table:table-row table:style-name="ro5">
          <table:table-cell table:style-name="ce50" office:value-type="string">
            <text:p>Automelon</text:p>
          </table:table-cell>
          <table:table-cell table:style-name="ce50" office:value-type="string">
            <text:p>m06.d09</text:p>
          </table:table-cell>
          <table:table-cell table:style-name="ce50" office:value-type="string">
            <text:p>m07.d05</text:p>
          </table:table-cell>
          <table:table-cell table:number-columns-repeated="1021"/>
        </table:table-row>
        <table:table-row table:style-name="ro7"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· </text:p>
            <text:p/>
            <text:p>καὶ ἐν ἀγκάλαις ἔσχες, τὸν πάντα συνέχοντα, </text:p>
            <text:p/>
            <text:p>τὸν τροφοδότην πάντων, καὶ πλάστην καὶ Κύριον. </text:p>
            <text:p/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ράστως </text:p>
            <text:p/>
            <text:p>Μήτηρ Θεοῦ, τῷ κόσμῳ ἐκύησας, τὸν τὸν κόσμον </text:p>
            <text:p/>
            <text:p>κατέχοντα, </text:p>
            <text:p/>
            <text:p>καὶ ἐν ἀγκάλαις ἔσχες, τὸν πάντα συνέχοντα, </text:p>
            <text:p/>
            <text:p>καὶ ἐκ μαζῶν ἐθήλασας, τὸν πάντας ἐκτρέφοντα.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ὴ τὴν σὴν βοήθειαν τότε μοι δώρησαι· </text:p>
            <text:p/>
            <text:p>καὶ γὰρ δύνασαι, ὅσα θέλεις πανύμνητε.</text:p>
          </table:table-cell>
          <table:table-cell table:style-name="ce51" office:value-type="string">
            <text:p>Τὴν Σοφίαν καὶ Λόγον ἐν σῇ γαστρί, συλλαβοῦσα </text:p>
            <text:p/>
            <text:p>ἀφλέκτως </text:p>
            <text:p/>
            <text:p>Μήτηρ Θεοῦ, τῷ κόσμῳ ἐκύησας, τὸν τὸν κόσμον </text:p>
            <text:p/>
            <text:p>συνέχοντα, </text:p>
            <text:p/>
            <text:p>καὶ ἐκ μαζῶν ἐθήλασας, τὸν πάντας ἐκτρέφοντα, </text:p>
            <text:p/>
            <text:p>καὶ ἐν ἀγκάλαις ἔσχες, τὸν πάντα βαστάζοντα· </text:p>
            <text:p/>
            <text:p>ὅθεν δυσωπῶ σε, Παναγία Παρθένε, ῥυσθῆναι πταισμάτων μου, ὅταν μέλλω παρίστασθαι, πρὸ προσώπου τοῦ Κτίστου μου, Δέσποινα Παρθένε ἁγνή, τὴν σὴν βοήθειαν τότε μοι δώρησαι· </text:p>
            <text:p/>
            <text:p>σὲ γὰρ ἔχω ἐλπίδα ὁ δοῦλός σου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 table:print="false">
        <table:table-column table:style-name="co10" table:number-columns-repeated="1024" table:default-cell-style-name="ce54"/>
        <table:table-row table:style-name="ro8">
          <table:table-cell table:style-name="ce53" office:value-type="string">
            <text:p>Τὴν Σοφίαν καὶ Λόγον ἐν σῇ γαστρί, συλλαβοῦσα 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ἀφράστως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ἀφλέκτως </text:p>
          </table:table-cell>
          <table:table-cell table:style-name="ce53" office:value-type="string">
            <text:p>C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Μήτηρ Θεοῦ</text:p>
          </table:table-cell>
          <table:table-cell table:number-columns-repeated="4"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τῷ κόσμῳ ἐκύησας, τὸν τὸν κόσμον </text:p>
          </table:table-cell>
          <table:table-cell table:number-columns-repeated="2" table:style-name="ce53" office:value-type="string">
            <text:p>A</text:p>
          </table:table-cell>
          <table:table-cell table:style-name="ce53" office:value-type="string">
            <text:p>ἀφράστως ἀπεκύησας, τὸν τὰ π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6">
          <table:table-cell table:style-name="ce53" office:value-type="string">
            <text:p>κατέχοντα·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υνέχοντα,</text:p>
          </table:table-cell>
          <table:table-cell table:style-name="ce53" office:value-type="string">
            <text:p>ποιήσαντα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ἐν ἀγκάλαις ἔσχες, τὸν πάντα συνέχοντα, 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καὶ ἐκ μαζῶν ἐθήλασας, τὸν πάντας ἐκτρέφοντα, </text:p>
          </table:table-cell>
          <table:table-cell table:style-name="ce53" office:value-type="string">
            <text:p>καὶ ἐν ἀγκάλαις ἔσχες, τὸν πάντα κατέχοντα </text:p>
          </table:table-cell>
          <table:table-cell table:style-name="ce53" office:value-type="string">
            <text:p>A</text:p>
          </table:table-cell>
          <table:table-cell table:style-name="ce53" table:number-columns-repeated="1019"/>
        </table:table-row>
        <table:table-row table:style-name="ro9">
          <table:table-cell table:style-name="ce53" office:value-type="string">
            <text:p>τὸν τροφοδότην πάντων, καὶ πλάστην καὶ Κύριον. </text:p>
            <text:p/>
          </table:table-cell>
          <table:table-cell table:style-name="ce53" office:value-type="string">
            <text:p>καὶ ἐκ μαζῶν ἐθήλασας, τὸν πάντας ἐκτρέφοντα. </text:p>
          </table:table-cell>
          <table:table-cell table:style-name="ce53" office:value-type="string">
            <text:p>καὶ ἐν ἀγκάλαις ἔσχες, τὸν πάντα βαστάζοντα· </text:p>
          </table:table-cell>
          <table:table-cell table:style-name="ce53" office:value-type="string">
            <text:p>καὶ ἐκ μαζῶν ἐθήλασας, τὸν κόσμον ἐκτρέφοντα. </text:p>
          </table:table-cell>
          <table:table-cell table:style-name="ce53" office:value-type="string">
            <text:p>τὸν τροφοδότην πάντων, καὶ Πλάστην τῆς κτίσεως· </text:p>
            <text:p/>
          </table:table-cell>
          <table:table-cell table:number-columns-repeated="1019"/>
        </table:table-row>
        <table:table-row table:style-name="ro10">
          <table:table-cell table:style-name="ce53" office:value-type="string">
            <text:p>Ὅθεν δυσωπῶ σε, Παναγία Παρθένε, ῥυσθῆναι πταισμάτων μου, ὅταν μέλλω παρίστασθαι, πρὸ προσώπου τοῦ Κτίστου μου. Δέσποινα Παρθένε ἁγνή, τὴν σὴν βοήθειαν </text:p>
          </table:table-cell>
          <table:table-cell table:number-columns-repeated="3" table:style-name="ce53" office:value-type="string">
            <text:p>Α</text:p>
          </table:table-cell>
          <table:table-cell table:style-name="ce53" office:value-type="string">
            <text:p>Ὅθεν δυσωπῶ σε, Παναγία Παρθένε· Ἐν ὥρᾳ τῆς κρίσεως, ὅταν μέλλω παρίστασθαι, πρὸ προσώπου τοῦ Κτίστου μου. δώρησαί μοι τότε τὴν σήν, προστασίαν </text:p>
          </table:table-cell>
          <table:table-cell table:number-columns-repeated="1019"/>
        </table:table-row>
        <table:table-row table:style-name="ro6">
          <table:table-cell table:style-name="ce53" office:value-type="string">
            <text:p>τότε μοι δώρησαι·</text:p>
          </table:table-cell>
          <table:table-cell table:number-columns-repeated="2" table:style-name="ce53" office:value-type="string">
            <text:p>Α</text:p>
          </table:table-cell>
          <table:table-cell table:style-name="ce53" office:value-type="string">
            <text:p>τότε παράχσου μοι·</text:p>
          </table:table-cell>
          <table:table-cell table:style-name="ce53" office:value-type="string">
            <text:p>Δέσποινα πανάχραντε·</text:p>
          </table:table-cell>
          <table:table-cell table:style-name="ce53" table:number-columns-repeated="1019"/>
        </table:table-row>
        <table:table-row table:style-name="ro8">
          <table:table-cell table:style-name="ce53" office:value-type="string">
            <text:p>καὶ γὰρ δύνασαι, ὅσα θέλεις πανύμνητε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 ὁ δοῦλός σου.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σὲ γὰρ ἔχω ἐλπίδα, ὁ ἀνάξιος δοῦλός σου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m01.d17.Kathisma1T</text:p>
          </table:table-cell>
          <table:table-cell office:value-type="string">
            <text:p>m03.d06.Ode3T</text:p>
          </table:table-cell>
          <table:table-cell table:number-columns-repeated="1019"/>
        </table:table-row>
        <table:table-row table:style-name="ro5">
          <table:table-cell table:style-name="ce10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2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01T12:24:35.40</dc:date>
    <dc:creator>Alex Dedes</dc:creator>
    <meta:generator>OpenOffice/4.1.15$Win32 OpenOffice.org_project/4115m2$Build-9813</meta:generator>
    <meta:editing-duration>PT15H40M47S</meta:editing-duration>
    <meta:editing-cycles>7</meta:editing-cycles>
    <meta:document-statistic meta:table-count="4" meta:cell-count="3770" meta:object-count="0"/>
  </office:meta>
</office:document-meta>
</file>