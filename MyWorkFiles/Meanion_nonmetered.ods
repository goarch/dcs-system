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3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2.211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3.7492in"/>
    </style:style>
    <style:style style:name="co12" style:family="table-column">
      <style:table-column-properties fo:break-before="auto" style:column-width="0.5256in"/>
    </style:style>
    <style:style style:name="co13" style:family="table-column">
      <style:table-column-properties fo:break-before="auto" style:column-width="0.4508in"/>
    </style:style>
    <style:style style:name="ro5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3.834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style:style style:name="ta6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7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6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6" table:default-cell-style-name="ce10"/>
        <table:table-column table:style-name="co2" table:number-columns-repeated="4" table:default-cell-style-name="ce42"/>
        <table:table-column table:style-name="co3" table:default-cell-style-name="Excel_20_Built-in_20_Normal"/>
        <table:table-column table:style-name="co7" table:default-cell-style-name="ce42"/>
        <table:table-column table:style-name="co3" table:number-columns-repeated="1017" table:default-cell-style-name="Excel_20_Built-in_20_Normal"/>
        <table:table-row table:style-name="ro11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style-name="ce19"/>
          <table:table-cell table:number-columns-repeated="1017"/>
        </table:table-row>
        <table:table-row table:style-name="ro11">
          <table:table-cell table:style-name="ce9"/>
          <table:table-cell table:style-name="ce19"/>
          <table:table-cell table:style-name="ce19" office:value-type="string">
            <text:p>Total so far:</text:p>
          </table:table-cell>
          <table:table-cell table:style-name="ce60" table:formula="of:=SUM([.D3:.D855])" office:value-type="float" office:value="835">
            <text:p>835</text:p>
          </table:table-cell>
          <table:table-cell table:style-name="ce62" office:value-type="string">
            <text:p>Of 853</text:p>
          </table:table-cell>
          <table:table-cell table:style-name="ce63" table:formula="of:=853-[.D2]" office:value-type="float" office:value="18">
            <text:p>18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me.m01.d01_en_US_oca.meVE.Stichera03 </text:p>
          </table:table-cell>
          <table:table-cell table:style-name="ce20" office:value-type="date" office:date-value="2024-11-26">
            <text:p>11/2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01.d01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01.d01_en_US_oca.meVE.Stichera05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22" office:value-type="date" office:date-value="2024-11-27">
            <text:p>11/27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3_en_US_oca.meVE.Aposticha1 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22" office:value-type="date" office:date-value="2024-12-30">
            <text:p>12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07_en_US_oca.meVE.Aposticha1 </text:p>
          </table:table-cell>
          <table:table-cell table:style-name="ce20" office:value-type="date" office:date-value="2024-12-29">
            <text:p>12/2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0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0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08_en_US_oca.meVE.Aposticha1 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08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08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Aposticha1 </text:p>
          </table:table-cell>
          <table:table-cell table:style-name="ce25" office:value-type="date" office:date-value="2025-01-02">
            <text:p>01/02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Aposticha2 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Aposticha3 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Stichera01 </text:p>
          </table:table-cell>
          <table:table-cell table:style-name="ce27"/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Stichera02 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Stichera03 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Aposticha3 </text:p>
          </table:table-cell>
          <table:table-cell table:style-name="ce28" office:value-type="date" office:date-value="2025-01-06">
            <text:p>01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9" office:value-type="date" office:date-value="2024-01-07">
            <text:p>01/07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3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3_en_US_oca.meVE.Aposticha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3_en_US_oca.meVE.Aposticha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6_en_US_oca.meVE.Stichera01 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Aposticha1 </text:p>
          </table:table-cell>
          <table:table-cell table:style-name="ce20" office:value-type="date" office:date-value="2024-12-16">
            <text:p>12/1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Stichera02 </text:p>
          </table:table-cell>
          <table:table-cell table:style-name="ce20" office:value-type="date" office:date-value="2024-12-14">
            <text:p>12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dedes.meVE.Aposticha1 </text:p>
          </table:table-cell>
          <table:table-cell table:style-name="ce22" office:value-type="date" office:date-value="2024-12-18">
            <text:p>12/1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Aposticha1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4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1_en_US_dedes.meVE.Stichera04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1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1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1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3_en_US_dedes.meVE.SticStavrotheotokion </text:p>
          </table:table-cell>
          <table:table-cell table:style-name="ce20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AposTheotokion </text:p>
          </table:table-cell>
          <table:table-cell table:style-name="ce22" office:value-type="date" office:date-value="2024-12-04">
            <text:p>12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Aposticha1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Stichera01 </text:p>
          </table:table-cell>
          <table:table-cell table:style-name="ce22" office:value-type="date" office:date-value="2024-12-03">
            <text:p>12/0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5" office:value-type="string">
            <text:p>me.m01.d25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1">
          <table:table-cell table:style-name="ce15" office:value-type="string">
            <text:p>me.m01.d25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1">
          <table:table-cell table:style-name="ce15" office:value-type="string">
            <text:p>me.m01.d25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1" office:value-type="string">
            <text:p>me.m01.d26_en_US_oca.meVE.Stichera01 </text:p>
          </table:table-cell>
          <table:table-cell table:style-name="ce22" office:value-type="date" office:date-value="2024-11-28">
            <text:p>11/2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01.d26_en_US_oca.meVE.Stichera02 </text:p>
          </table:table-cell>
          <table:table-cell table:style-name="ce22" office:value-type="date" office:date-value="2024-11-30">
            <text:p>11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01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7_en_US_dedes.meVE.Aposticha1 </text:p>
          </table:table-cell>
          <table:table-cell table:style-name="ce22" office:value-type="date" office:date-value="2024-12-20">
            <text:p>12/2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7_en_US_dedes.meVE.Aposticha2 </text:p>
          </table:table-cell>
          <table:table-cell table:style-name="ce22" office:value-type="date" office:date-value="2024-12-21">
            <text:p>12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7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5" office:value-type="string">
            <text:p>me.m01.d27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15" office:value-type="string">
            <text:p>me.m01.d27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15" office:value-type="string">
            <text:p>me.m01.d27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13" office:value-type="string">
            <text:p>me.m01.d30_en_US_oca.meVE.Aposticha1 </text:p>
          </table:table-cell>
          <table:table-cell table:style-name="ce20" office:value-type="date" office:date-value="2024-12-02">
            <text:p>12/0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Stichera01 </text:p>
          </table:table-cell>
          <table:table-cell table:style-name="ce20" office:value-type="date" office:date-value="2024-12-01">
            <text:p>12/0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31_en_US_goadedes.meVE.SticTheotokion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4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5_en_US_oca.meVE.Aposticha1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Aposticha1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Stichera04 </text:p>
          </table:table-cell>
          <table:table-cell table:style-name="ce20" office:value-type="date" office:date-value="2024-12-06">
            <text:p>12/06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Stichera05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8_en_US_oca.meVE.SticStavrotheotokion2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8_en_US_oca.meVE.SticTheotokion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2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2_en_US_oca.meVE.Stichera0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2_en_US_oca.meVE.Stichera0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2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3_en_US_oca.meVE.AposStavrotheotokion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dedes.meVE.AposTheotokion 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dedes.meVE.SticTheotokion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9_en_US_dedes.meVE.SticTheotokion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9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32" office:value-type="date" office:date-value="2025-01-14">
            <text:p>01/1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3_en_US_oca.meVE.Stichera01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32" office:value-type="date" office:date-value="2025-01-26">
            <text:p>01/2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Stichera01</text:p>
          </table:table-cell>
          <table:table-cell table:style-name="ce33" office:value-type="date" office:date-value="2025-01-26">
            <text:p>01/26/25</text:p>
          </table:table-cell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Stichera0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Stichera0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Aposticha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Aposticha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Aposticha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7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28_en_US_oca.meVE.Stichera01 </text:p>
          </table:table-cell>
          <table:table-cell table:style-name="ce20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2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2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3.d23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3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3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03_en_US_dedes.meVE.SticStavrotheotokion</text:p>
          </table:table-cell>
          <table:table-cell table:style-name="ce20" office:value-type="date" office:date-value="2025-10-01">
            <text:p>10/01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03_en_US_oca.meVE.Stichera01 </text:p>
          </table:table-cell>
          <table:table-cell table:style-name="ce35" office:value-type="date" office:date-value="2025-10-20">
            <text:p>10/20/25</text:p>
          </table:table-cell>
          <table:table-cell table:style-name="ce21" office:value-type="string">
            <text:p>goadedes</text:p>
          </table:table-cell>
          <table:table-cell table:style-name="ce3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03_en_US_oca.meVE.Stichera02 </text:p>
          </table:table-cell>
          <table:table-cell table:style-name="ce36"/>
          <table:table-cell table:style-name="ce21" office:value-type="string">
            <text:p>goadedes</text:p>
          </table:table-cell>
          <table:table-cell table:style-name="ce3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03_en_US_oca.meVE.Stichera03 </text:p>
          </table:table-cell>
          <table:table-cell table:style-name="ce36"/>
          <table:table-cell table:style-name="ce21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37" office:value-type="date" office:date-value="2025-04-01">
            <text:p>04/01/25</text:p>
          </table:table-cell>
          <table:table-cell table:style-name="ce57"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me.m04.d12_en_US_dedes.meVE.Stichera01 </text:p>
          </table:table-cell>
          <table:table-cell table:style-name="ce38" table:number-columns-repeated="2"/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12_en_US_dedes.meVE.Stichera02 </text:p>
          </table:table-cell>
          <table:table-cell table:style-name="ce21" table:number-columns-repeated="3"/>
          <table:table-cell table:number-columns-repeated="1020"/>
        </table:table-row>
        <table:table-row table:style-name="ro11">
          <table:table-cell table:style-name="ce13" office:value-type="string">
            <text:p>me.m04.d12_en_US_dedes.meVE.Stichera03 </text:p>
          </table:table-cell>
          <table:table-cell table:style-name="ce21" table:number-columns-repeated="3"/>
          <table:table-cell table:number-columns-repeated="1020"/>
        </table:table-row>
        <table:table-row table:style-name="ro11">
          <table:table-cell table:style-name="ce16" office:value-type="string">
            <text:p>me.m04.d13_en_US_oca.meVE.Stichera01 </text:p>
          </table:table-cell>
          <table:table-cell table:style-name="ce39" table:number-columns-repeated="3"/>
          <table:table-cell table:number-columns-repeated="1020"/>
        </table:table-row>
        <table:table-row table:style-name="ro11">
          <table:table-cell table:style-name="ce16" office:value-type="string">
            <text:p>me.m04.d13_en_US_oca.meVE.Stichera02 </text:p>
          </table:table-cell>
          <table:table-cell table:style-name="ce39" table:number-columns-repeated="3"/>
          <table:table-cell table:number-columns-repeated="1020"/>
        </table:table-row>
        <table:table-row table:style-name="ro11">
          <table:table-cell table:style-name="ce16" office:value-type="string">
            <text:p>me.m04.d13_en_US_oca.meVE.Stichera03 </text:p>
          </table:table-cell>
          <table:table-cell table:style-name="ce39" table:number-columns-repeated="3"/>
          <table:table-cell table:number-columns-repeated="1020"/>
        </table:table-row>
        <table:table-row table:style-name="ro11">
          <table:table-cell table:style-name="ce14" office:value-type="string">
            <text:p>me.m04.d20_en_US_oca.meVE.Stichera01 </text:p>
          </table:table-cell>
          <table:table-cell table:style-name="ce22" office:value-type="date" office:date-value="2025-10-24">
            <text:p>10/24/25</text:p>
          </table:table-cell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0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0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25_en_US_oca.meVE.Stichera04 </text:p>
          </table:table-cell>
          <table:table-cell table:style-name="ce21" table:number-columns-repeated="3"/>
          <table:table-cell table:number-columns-repeated="1020"/>
        </table:table-row>
        <table:table-row table:style-name="ro11">
          <table:table-cell table:style-name="ce13" office:value-type="string">
            <text:p>me.m04.d25_en_US_oca.meVE.Stichera05 </text:p>
          </table:table-cell>
          <table:table-cell table:style-name="ce21" table:number-columns-repeated="3"/>
          <table:table-cell table:number-columns-repeated="1020"/>
        </table:table-row>
        <table:table-row table:style-name="ro11">
          <table:table-cell table:style-name="ce13" office:value-type="string">
            <text:p>me.m04.d25_en_US_oca.meVE.Stichera06 </text:p>
          </table:table-cell>
          <table:table-cell table:style-name="ce21" table:number-columns-repeated="3"/>
          <table:table-cell table:number-columns-repeated="1020"/>
        </table:table-row>
        <table:table-row table:style-name="ro11">
          <table:table-cell table:style-name="ce16" office:value-type="string">
            <text:p>me.m04.d26_en_US_oca.meVE.Stichera01 </text:p>
          </table:table-cell>
          <table:table-cell table:style-name="ce39" table:number-columns-repeated="3"/>
          <table:table-cell table:number-columns-repeated="1020"/>
        </table:table-row>
        <table:table-row table:style-name="ro11">
          <table:table-cell table:style-name="ce16" office:value-type="string">
            <text:p>me.m04.d26_en_US_oca.meVE.Stichera02 </text:p>
          </table:table-cell>
          <table:table-cell table:style-name="ce39" table:number-columns-repeated="3"/>
          <table:table-cell table:number-columns-repeated="1020"/>
        </table:table-row>
        <table:table-row table:style-name="ro11">
          <table:table-cell table:style-name="ce16" office:value-type="string">
            <text:p>me.m04.d26_en_US_oca.meVE.Stichera03 </text:p>
          </table:table-cell>
          <table:table-cell table:style-name="ce39" table:number-columns-repeated="3"/>
          <table:table-cell table:number-columns-repeated="1020"/>
        </table:table-row>
        <table:table-row table:style-name="ro11">
          <table:table-cell table:style-name="ce14" office:value-type="string">
            <text:p>me.m04.d27_en_US_oca.meVE.Stichera01 </text:p>
          </table:table-cell>
          <table:table-cell table:style-name="ce22" office:value-type="date" office:date-value="2025-10-27">
            <text:p>10/27/25</text:p>
          </table:table-cell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7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7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7_en_US_oca.meVE.Apolytikion1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28_en_US_oca.meVE.Stichera01 </text:p>
          </table:table-cell>
          <table:table-cell table:style-name="ce20" office:value-type="date" office:date-value="2025-01-16">
            <text:p>01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2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2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30_en_US_oca.meVE.Stichera01 </text:p>
          </table:table-cell>
          <table:table-cell table:style-name="ce22" office:value-type="date" office:date-value="2025-01-16">
            <text:p>01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30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30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1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4_en_US_oca.meVE.Stichera01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5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6_en_US_oca.meVE.Stichera02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41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41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41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05.d09_en_US_oca.meVE.Stichera01 </text:p>
          </table:table-cell>
          <table:table-cell table:style-name="ce22" office:value-type="date" office:date-value="2025-01-29">
            <text:p>01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Aposticha1 </text:p>
          </table:table-cell>
          <table:table-cell table:style-name="ce20" office:value-type="date" office:date-value="2025-01-29">
            <text:p>01/29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Stichera01 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2_en_US_oca.meVE.Stichera04 </text:p>
          </table:table-cell>
          <table:table-cell table:style-name="ce22" office:value-type="date" office:date-value="2025-01-30">
            <text:p>01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3_en_US_oca.meVE.Stichera01 </text:p>
          </table:table-cell>
          <table:table-cell table:style-name="ce20" office:value-type="date" office:date-value="2025-01-30">
            <text:p>01/30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3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3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4_en_US_oca.meVE.Stichera01 </text:p>
          </table:table-cell>
          <table:table-cell table:style-name="ce22" office:value-type="date" office:date-value="2025-10-31">
            <text:p>10/3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4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4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5_en_US_oca.meVE.Stichera01 </text:p>
          </table:table-cell>
          <table:table-cell table:style-name="ce20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5_en_US_oca.meVE.Apolytik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7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8_en_US_dedes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0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2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3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4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6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13" office:value-type="string">
            <text:p>me.m05.d31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3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3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31_en_US_dedes.meVE.SticTheotokion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style-name="ce43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me.m06.d02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3_en_US_oca.meVE.Stichera01 </text:p>
          </table:table-cell>
          <table:table-cell table:style-name="ce22" office:value-type="date" office:date-value="2025-02-04">
            <text:p>02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3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4_en_US_oca.meVE.Stichera04 </text:p>
          </table:table-cell>
          <table:table-cell table:style-name="ce28" office:value-type="date" office:date-value="2025-02-05">
            <text:p>02/05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5_en_US_oca.meVE.Stichera01 </text:p>
          </table:table-cell>
          <table:table-cell table:style-name="ce31" office:value-type="date" office:date-value="2025-02-05">
            <text:p>02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9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Aposticha1 </text:p>
          </table:table-cell>
          <table:table-cell table:style-name="ce31" office:value-type="date" office:date-value="2025-02-06">
            <text:p>02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Stichera04 </text:p>
          </table:table-cell>
          <table:table-cell table:style-name="ce31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2_en_US_oca.meVE.Stichera01 </text:p>
          </table:table-cell>
          <table:table-cell table:style-name="ce28" office:value-type="date" office:date-value="2025-02-06">
            <text:p>02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3_en_US_oca.meVE.Stichera01 </text:p>
          </table:table-cell>
          <table:table-cell table:style-name="ce31" office:value-type="date" office:date-value="2025-01-07">
            <text:p>01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3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1 </text:p>
          </table:table-cell>
          <table:table-cell table:style-name="ce28" office:value-type="date" office:date-value="2025-11-03">
            <text:p>11/0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4 </text:p>
          </table:table-cell>
          <table:table-cell table:style-name="ce20" office:value-type="date" office:date-value="2025-11-04">
            <text:p>11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6_en_US_oca.meVE.Stichera01 </text:p>
          </table:table-cell>
          <table:table-cell table:style-name="ce22" office:value-type="date" office:date-value="2025-02-10">
            <text:p>02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6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6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7_en_US_oca.meVE.Stichera04 </text:p>
          </table:table-cell>
          <table:table-cell table:style-name="ce20" office:value-type="date" office:date-value="2025-02-10">
            <text:p>02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8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8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8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0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1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1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1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2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3_en_US_oca.meVE.Stichera01 </text:p>
          </table:table-cell>
          <table:table-cell table:style-name="ce22" office:value-type="date" office:date-value="2025-02-12">
            <text:p>02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3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3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5_en_US_oca.meVE.Stichera04 </text:p>
          </table:table-cell>
          <table:table-cell table:style-name="ce20" office:value-type="date" office:date-value="2025-02-12">
            <text:p>02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5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5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7_en_US_oca.meVE.Stichera01 </text:p>
          </table:table-cell>
          <table:table-cell table:style-name="ce22" office:value-type="date" office:date-value="2025-02-13">
            <text:p>02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7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7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9_en_US_oca.meVE.Stichera02 </text:p>
          </table:table-cell>
          <table:table-cell table:style-name="ce20" office:value-type="date" office:date-value="2025-02-14">
            <text:p>02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1 </text:p>
          </table:table-cell>
          <table:table-cell table:style-name="ce22" office:value-type="date" office:date-value="2025-02-14">
            <text:p>02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7" office:value-type="string">
            <text:p>me.m06.d30_en_US_oca.meVE.Stichera06 </text:p>
          </table:table-cell>
          <table:table-cell table:style-name="ce44"/>
          <table:table-cell table:style-name="ce23" office:value-type="string">
            <text:p>goadedes</text:p>
          </table:table-cell>
          <table:table-cell table:style-name="ce4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64"/>
          <table:table-cell table:number-columns-repeated="1018"/>
        </table:table-row>
        <table:table-row table:style-name="ro11">
          <table:table-cell table:style-name="ce13" office:value-type="string">
            <text:p>me.m07.d01_en_US_oca.meVE.Stichera02 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7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2_en_US_oca.meVE.Stichera01 </text:p>
          </table:table-cell>
          <table:table-cell table:style-name="ce22" office:value-type="date" office:date-value="2025-04-02">
            <text:p>04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2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2_en_US_oca.meVE.Stichera03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43" office:value-type="date" office:date-value="2025-04-03">
            <text:p>04/0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7_en_US_oca.meVE.Stichera01 </text:p>
          </table:table-cell>
          <table:table-cell table:style-name="ce22" office:value-type="date" office:date-value="2025-04-04">
            <text:p>04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7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7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43" office:value-type="date" office:date-value="2025-04-07">
            <text:p>04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2_en_US_oca.meVE.Stichera01 </text:p>
          </table:table-cell>
          <table:table-cell table:style-name="ce22" office:value-type="date" office:date-value="2025-04-07">
            <text:p>04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2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2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57" office:value-type="string">
            <text:p>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4_en_US_oca.meVE.Stichera01 </text:p>
          </table:table-cell>
          <table:table-cell table:style-name="ce22" office:value-type="date" office:date-value="2025-04-08">
            <text:p>04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4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4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7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7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7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43" office:value-type="date" office:date-value="2025-04-09">
            <text:p>04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6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6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6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43" office:value-type="date" office:date-value="2025-04-11">
            <text:p>04/1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9_en_US_oca.meVE.Stichera01 </text:p>
          </table:table-cell>
          <table:table-cell table:style-name="ce22" office:value-type="date" office:date-value="2025-04-11">
            <text:p>04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9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9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43" office:value-type="date" office:date-value="2025-04-13">
            <text:p>04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31_en_US_oca.meVE.Stichera01 </text:p>
          </table:table-cell>
          <table:table-cell table:style-name="ce22" office:value-type="date" office:date-value="2025-04-13">
            <text:p>04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31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31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3_en_US_oca.meVE.Stichera01 </text:p>
          </table:table-cell>
          <table:table-cell table:style-name="ce22" office:value-type="date" office:date-value="2025-04-15">
            <text:p>04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3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3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1 </text:p>
          </table:table-cell>
          <table:table-cell table:style-name="ce22" office:value-type="date" office:date-value="2025-04-16">
            <text:p>04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43" office:value-type="date" office:date-value="2025-05-02">
            <text:p>05/0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9_en_US_oca.meVE.Aposticha1 </text:p>
          </table:table-cell>
          <table:table-cell table:style-name="ce22" office:value-type="date" office:date-value="2025-05-06">
            <text:p>05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9_en_US_oca.meVE.Aposticha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9_en_US_oca.meVE.Aposticha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0_en_US_oca.meVE.Stichera01 </text:p>
          </table:table-cell>
          <table:table-cell table:style-name="ce22" office:value-type="date" office:date-value="2026-01-05">
            <text:p>01/05/26</text:p>
          </table:table-cell>
          <table:table-cell table:style-name="ce23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23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5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6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1 </text:p>
          </table:table-cell>
          <table:table-cell table:style-name="ce22" office:value-type="date" office:date-value="2025-05-07">
            <text:p>05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45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45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45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7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40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7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7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43" office:value-type="date" office:date-value="2025-05-09">
            <text:p>05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1 </text:p>
          </table:table-cell>
          <table:table-cell table:style-name="ce22" office:value-type="date" office:date-value="2025-05-12">
            <text:p>05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43" office:value-type="date" office:date-value="2025-05-13">
            <text:p>05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1_en_US_oca.meVE.Stichera01 </text:p>
          </table:table-cell>
          <table:table-cell table:style-name="ce22" office:value-type="date" office:date-value="2025-05-13">
            <text:p>05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1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1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43" office:value-type="date" office:date-value="2025-05-14">
            <text:p>05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4_en_US_oca.meVE.Stichera01 </text:p>
          </table:table-cell>
          <table:table-cell table:style-name="ce22" office:value-type="date" office:date-value="2025-05-14">
            <text:p>05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4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4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7_en_US_oca.meVE.Stichera01 </text:p>
          </table:table-cell>
          <table:table-cell table:style-name="ce22" office:value-type="date" office:date-value="2025-05-15">
            <text:p>05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7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7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31_en_US_oca.meVE.Stichera01 </text:p>
          </table:table-cell>
          <table:table-cell table:style-name="ce22" office:value-type="date" office:date-value="2025-05-16">
            <text:p>05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31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31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2_en_US_oca.meVE.Stichera01 </text:p>
          </table:table-cell>
          <table:table-cell table:style-name="ce46" office:value-type="date" office:date-value="2025-05-19">
            <text:p>05/1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2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2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57" office:value-type="string">
            <text:p>goa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8" office:value-type="string">
            <text:p>me.m09.d09_en_US_oca.meVE.Aposticha1 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Stichera01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1_en_US_oca.meVE.Aposticha1 </text:p>
          </table:table-cell>
          <table:table-cell table:style-name="ce48" office:value-type="date" office:date-value="2025-06-09">
            <text:p>06/0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1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1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1 </text:p>
          </table:table-cell>
          <table:table-cell table:style-name="ce48" office:value-type="date" office:date-value="2025-06-11">
            <text:p>06/11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4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43" office:value-type="date" office:date-value="2025-06-11">
            <text:p>06/11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Stichera04 </text:p>
          </table:table-cell>
          <table:table-cell table:style-name="ce48" office:value-type="date" office:date-value="2025-06-12">
            <text:p>06/12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43" office:value-type="date" office:date-value="2025-06-10">
            <text:p>06/1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43" office:value-type="date" office:date-value="2025-06-12">
            <text:p>06/1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dedes.meVE.Stichera01 </text:p>
          </table:table-cell>
          <table:table-cell table:style-name="ce48" office:value-type="date" office:date-value="2025-06-13">
            <text:p>06/13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dedes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dedes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oca.meVE.Aposticha1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oca.meVE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oca.meVE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43" office:value-type="date" office:date-value="2025-06-13">
            <text:p>06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Aposticha1 </text:p>
          </table:table-cell>
          <table:table-cell table:style-name="ce48" office:value-type="date" office:date-value="2025-06-16">
            <text:p>06/16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Stichera01 </text:p>
          </table:table-cell>
          <table:table-cell table:style-name="ce48" office:value-type="date" office:date-value="2025-06-14">
            <text:p>06/14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43" office:value-type="date" office:date-value="2025-06-16">
            <text:p>06/1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7_en_US_oca.meVE.Stichera01 </text:p>
          </table:table-cell>
          <table:table-cell table:style-name="ce48" office:value-type="date" office:date-value="2025-06-17">
            <text:p>06/17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7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7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43" office:value-type="date" office:date-value="2025-06-18">
            <text:p>06/1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30_en_US_oca.meVE.Stichera01 </text:p>
          </table:table-cell>
          <table:table-cell table:style-name="ce48" office:value-type="date" office:date-value="2025-06-18">
            <text:p>06/18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30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30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4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10.d02_en_US_dedes.meVE.AposTheotokion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4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61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61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61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10.d06_en_US_oca.meVE.Aposticha1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43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AposTheotokion </text:p>
          </table:table-cell>
          <table:table-cell table:style-name="ce31" office:value-type="date" office:date-value="2025-07-25">
            <text:p>07/2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43" office:value-type="date" office:date-value="2025-07-25">
            <text:p>07/2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1_en_US_oca.meVE.Stichera01 </text:p>
          </table:table-cell>
          <table:table-cell table:style-name="ce31" office:value-type="date" office:date-value="2025-07-28">
            <text:p>07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43" office:value-type="date" office:date-value="2025-07-28">
            <text:p>07/2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6_en_US_oca.meVE.Stichera01 </text:p>
          </table:table-cell>
          <table:table-cell table:style-name="ce31" office:value-type="date" office:date-value="2025-07-29">
            <text:p>07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43" office:value-type="date" office:date-value="2025-07-30">
            <text:p>07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9_en_US_dedes.meVE.Stichera04 </text:p>
          </table:table-cell>
          <table:table-cell table:style-name="ce31" office:value-type="date" office:date-value="2026-05-28">
            <text:p>05/28/26</text:p>
          </table:table-cell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1">
          <table:table-cell table:style-name="ce14" office:value-type="string">
            <text:p>me.m10.d1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1">
          <table:table-cell table:style-name="ce14" office:value-type="string">
            <text:p>me.m10.d1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10.d19_en_US_oca.meVE.Stichera01 </text:p>
          </table:table-cell>
          <table:table-cell table:style-name="ce31" office:value-type="date" office:date-value="2025-07-30">
            <text:p>07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43" office:value-type="date" office:date-value="2025-07-31">
            <text:p>07/3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1 </text:p>
          </table:table-cell>
          <table:table-cell table:style-name="ce31" office:value-type="date" office:date-value="25-07-30">
            <text:p>08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43" office:value-type="date" office:date-value="2025-08-01">
            <text:p>08/0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4_en_US_oca.meVE.Stichera01 </text:p>
          </table:table-cell>
          <table:table-cell table:style-name="ce31" office:value-type="date" office:date-value="2025-08-04">
            <text:p>08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4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43" office:value-type="date" office:date-value="2025-08-04">
            <text:p>08/0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7_en_US_oca.meVE.Stichera04 </text:p>
          </table:table-cell>
          <table:table-cell table:style-name="ce31" office:value-type="date" office:date-value="2025-08-05">
            <text:p>08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7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7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45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10.d29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43" office:value-type="date" office:date-value="2025-08-07">
            <text:p>08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31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3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3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43" office:value-type="date" office:date-value="2025-08-08">
            <text:p>08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43" office:value-type="date" office:date-value="2025-08-09">
            <text:p>08/09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32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20" office:value-type="date" office:date-value="2024-10-31">
            <text:p>10/31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58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58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58" office:value-type="float" office:value="8">
            <text:p>8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dedes.meVE.SticStavrotheotokion</text:p>
          </table:table-cell>
          <table:table-cell table:style-name="ce28" office:value-type="date" office:date-value="2026-06-17">
            <text:p>06/17/26</text:p>
          </table:table-cell>
          <table:table-cell table:style-name="ce58" office:value-type="string">
            <text:p>goadedes</text:p>
          </table:table-cell>
          <table:table-cell table:style-name="ce58"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43" office:value-type="date" office:date-value="2025-03-01">
            <text:p>03/01/25</text:p>
          </table:table-cell>
          <table:table-cell table:style-name="ce59" office:value-type="string">
            <text:p>goadedes</text:p>
          </table:table-cell>
          <table:table-cell table:style-name="ce59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20" office:value-type="date" office:date-value="2024-11-03">
            <text:p>11/03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20" office:value-type="date" office:date-value="2024-11-02">
            <text:p>11/02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22" office:value-type="date" office:date-value="2024-11-04">
            <text:p>11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0">
            <text:p>10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20" office:value-type="date" office:date-value="2024-11-05">
            <text:p>11/05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31" office:value-type="date" office:date-value="2024-11-06">
            <text:p>11/06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4 </text:p>
          </table:table-cell>
          <table:table-cell table:style-name="ce20" office:value-type="date" office:date-value="2024-11-07">
            <text:p>11/07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12">
            <text:p>1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Aposticha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20" office:value-type="date" office:date-value="2024-11-10">
            <text:p>11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20" office:value-type="date" office:date-value="2024-11-09">
            <text:p>11/0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dedes.meVE.Stichera04 </text:p>
          </table:table-cell>
          <table:table-cell table:style-name="ce22" office:value-type="date" office:date-value="2024-11-11">
            <text:p>11/1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20" office:value-type="date" office:date-value="2024-11-12">
            <text:p>11/1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2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22" office:value-type="date" office:date-value="2024-11-13">
            <text:p>11/1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Aposticha2 </text:p>
          </table:table-cell>
          <table:table-cell table:style-name="ce20" office:value-type="date" office:date-value="2024-11-14">
            <text:p>11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4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4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dedes.meVE.Stichera03 </text:p>
          </table:table-cell>
          <table:table-cell table:style-name="ce22" office:value-type="date" office:date-value="2025-08-13">
            <text:p>08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0_en_US_oca.meVE.Stichera01 </text:p>
          </table:table-cell>
          <table:table-cell table:style-name="ce22" office:value-type="date" office:date-value="2024-11-21">
            <text:p>11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2_en_US_dedes.meVE.Aposticha1 </text:p>
          </table:table-cell>
          <table:table-cell table:style-name="ce43" office:value-type="date" office:date-value="2025-08-13">
            <text:p>08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Aposticha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1 </text:p>
          </table:table-cell>
          <table:table-cell table:style-name="ce20" office:value-type="date" office:date-value="2024-11-21">
            <text:p>11/21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2 </text:p>
          </table:table-cell>
          <table:table-cell table:style-name="ce20" office:value-type="date" office:date-value="2025-08-13">
            <text:p>08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4 </text:p>
          </table:table-cell>
          <table:table-cell table:style-name="ce20" office:value-type="date" office:date-value="2025-08-14">
            <text:p>08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4_en_US_dedes.meVE.Stichera01 </text:p>
          </table:table-cell>
          <table:table-cell table:style-name="ce49" office:value-type="string">
            <text:p>not used</text:p>
          </table:table-cell>
          <table:table-cell table:style-name="ce49" table:number-columns-repeated="2"/>
          <table:table-cell table:number-columns-repeated="1020"/>
        </table:table-row>
        <table:table-row table:style-name="ro11">
          <table:table-cell table:style-name="ce11" office:value-type="string">
            <text:p>me.m12.d14_en_US_dedes.meVE.Stichera02 </text:p>
          </table:table-cell>
          <table:table-cell table:style-name="ce49" office:value-type="string">
            <text:p>not used</text:p>
          </table:table-cell>
          <table:table-cell table:style-name="ce49" table:number-columns-repeated="2"/>
          <table:table-cell table:number-columns-repeated="1020"/>
        </table:table-row>
        <table:table-row table:style-name="ro11">
          <table:table-cell table:style-name="ce11" office:value-type="string">
            <text:p>me.m12.d14_en_US_dedes.meVE.Stichera03 </text:p>
          </table:table-cell>
          <table:table-cell table:style-name="ce49" office:value-type="string">
            <text:p>not used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1" office:value-type="string">
            <text:p>me.m12.d14_en_US_oca.meVE.Stichera04 </text:p>
          </table:table-cell>
          <table:table-cell table:style-name="ce55" office:value-type="date" office:date-value="2026-06-03">
            <text:p>06/0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11">
          <table:table-cell table:style-name="ce11" office:value-type="string">
            <text:p>me.m12.d14_en_US_oca.meVE.Stichera05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11">
          <table:table-cell table:style-name="ce11" office:value-type="string">
            <text:p>me.m12.d14_en_US_oca.meVE.Stichera06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43" office:value-type="date" office:date-value="2025-08-14">
            <text:p>08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Aposticha1 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meVE.Stichera0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Aposticha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Stichera04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43" office:value-type="date" office:date-value="2025-08-20">
            <text:p>08/2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9_en_US_oca.meVE.Stichera0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style-name="ce4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style-name="ce4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me.m12.d22_en_US_dedes.meVE.Stichera04 </text:p>
          </table:table-cell>
          <table:table-cell table:style-name="ce20" office:value-type="date" office:date-value="2025-08-25">
            <text:p>08/2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Aposticha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Stichera0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Aposticha1 </text:p>
          </table:table-cell>
          <table:table-cell table:style-name="ce43" office:value-type="date" office:date-value="2025-08-30">
            <text:p>08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Stichera01 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20" office:value-type="date" office:date-value="2025-09-05">
            <text:p>09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20" office:value-type="date" office:date-value="2025-09-07">
            <text:p>09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AC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AC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AC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FF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FF_en_US_oca.meVE.Stichera02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FF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FF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6" table:print="false">
        <office:forms form:automatic-focus="false" form:apply-design-mode="false"/>
        <table:table-column table:style-name="co11" table:default-cell-style-name="ce10"/>
        <table:table-column table:style-name="co2" table:number-columns-repeated="2" table:default-cell-style-name="ce42"/>
        <table:table-column table:style-name="co12" table:default-cell-style-name="ce42"/>
        <table:table-column table:style-name="co13" table:default-cell-style-name="ce57"/>
        <table:table-column table:style-name="co3" table:number-columns-repeated="1019" table:default-cell-style-name="Excel_20_Built-in_20_Normal"/>
        <table:table-row table:style-name="ro5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19"/>
          <table:table-cell table:style-name="ce67" office:value-type="string">
            <text:p>Total so far:</text:p>
          </table:table-cell>
          <table:table-cell table:style-name="ce60" table:formula="of:=SUM([.D3:.D241])" office:value-type="float" office:value="237">
            <text:p>237</text:p>
          </table:table-cell>
          <table:table-cell/>
          <table:table-cell table:style-name="ce63" table:formula="of:=239-[.D2]" office:value-type="float" office:value="2">
            <text:p>2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11</text:p>
          </table:table-cell>
          <table:table-cell table:style-name="ce22" office:value-type="date" office:date-value="2024-12-31">
            <text:p>12/3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2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11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Exaposteilarion2</text:p>
          </table:table-cell>
          <table:table-cell table:style-name="ce31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11</text:p>
          </table:table-cell>
          <table:table-cell table:style-name="ce29" office:value-type="date" office:date-value="2025-01-05">
            <text:p>01/0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dedes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11" office:value-type="string">
            <text:p><text:s/>me.m01.d05_en_US_oca.meMA.Lauds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11" office:value-type="string">
            <text:p><text:s/>me.m01.d05_en_US_oca.meMA.Lauds4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Glory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8_en_US_oca.meMA.Kathisma21</text:p>
          </table:table-cell>
          <table:table-cell table:style-name="ce20" office:value-type="date" office:date-value="2025-01-02">
            <text:p>01/02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Kathisma11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Kathisma11</text:p>
          </table:table-cell>
          <table:table-cell table:style-name="ce20" office:value-type="date" office:date-value="2025-01-03">
            <text:p>01/03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1</text:p>
          </table:table-cell>
          <table:table-cell table:style-name="ce22" office:value-type="date" office:date-value="2024-01-03">
            <text:p>01/03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2</text:p>
          </table:table-cell>
          <table:table-cell table:style-name="ce31" office:value-type="date" office:date-value="2025-01-04">
            <text:p>01/04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43" office:value-type="date" office:date-value="2025-01-06">
            <text:p>01/06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1</text:p>
          </table:table-cell>
          <table:table-cell table:style-name="ce20" office:value-type="date" office:date-value="2025-01-04">
            <text:p>01/0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5_en_US_oca.meMA.Exaposteilarion3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7_en_US_oca.meMA.Exaposteilarion1</text:p>
          </table:table-cell>
          <table:table-cell table:style-name="ce20" office:value-type="date" office:date-value="2024-12-12">
            <text:p>12/12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7_en_US_oca.meMA.Exaposteilarion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21_en_US_dedes.meMA.Exaposteilarion2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3_en_US_oca.meMA.Kathisma11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3_en_US_oca.meMA.Kathisma21</text:p>
          </table:table-cell>
          <table:table-cell table:style-name="ce28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5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6_en_US_oca.meMA.Kathisma1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dedes.meMA.Kathisma11</text:p>
          </table:table-cell>
          <table:table-cell table:style-name="ce22" office:value-type="date" office:date-value="2024-12-10">
            <text:p>12/1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Exaposteilarion1</text:p>
          </table:table-cell>
          <table:table-cell table:style-name="ce22" office:value-type="date" office:date-value="2024-12-11">
            <text:p>12/1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me.m02.d17_en_US_dedes.meMA.AposTheotokion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2.d26_en_US_andronache.alt1.meMA.Kathisma11</text:p>
          </table:table-cell>
          <table:table-cell table:style-name="ce65" office:value-type="date" office:date-value="2025-01-27">
            <text:p>01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Kathisma2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12" office:value-type="string">
            <text:p><text:s/>me.m02.d26_en_US_andronache.alt1.meMA.Exaposteilarion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3" office:value-type="string">
            <text:p><text:s/>me.m05.d15_en_US_oca.meMA.Exaposteilarion1</text:p>
          </table:table-cell>
          <table:table-cell table:style-name="ce20" office:value-type="date" office:date-value="2025-01-27">
            <text:p>01/27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5.d2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6.d0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6.d08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09_en_US_oca.meMA.Kathisma21</text:p>
          </table:table-cell>
          <table:table-cell table:style-name="ce46" office:value-type="date" office:date-value="2025-05-05">
            <text:p>05/05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43" office:value-type="date" office:date-value="2025-06-20">
            <text:p>06/20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43" office:value-type="date" office:date-value="2025-05-20">
            <text:p>05/20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22_en_US_oca.meMA.Kathisma11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22_en_US_oca.meMA.Kathisma21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43" office:value-type="date" office:date-value="2025-06-04">
            <text:p>06/04/25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1</text:p>
          </table:table-cell>
          <table:table-cell table:style-name="ce48" office:value-type="date" office:date-value="2025-06-04">
            <text:p>06/04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43" office:value-type="date" office:date-value="2025-06-05">
            <text:p>06/05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18" office:value-type="string">
            <text:p><text:s/>me.m09.d18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23_en_US_oca.meMA.Kathisma21</text:p>
          </table:table-cell>
          <table:table-cell table:style-name="ce48" office:value-type="date" office:date-value="2025-06-06">
            <text:p>06/06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me.m09.d24_en_US_dedes.meMA.AposTheotokion</text:p>
          </table:table-cell>
          <table:table-cell table:style-name="ce48" office:value-type="date" office:date-value="2025-07-24">
            <text:p>07/24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0.d01_en_US_dedes.meMA.AposTheotokion</text:p>
          </table:table-cell>
          <table:table-cell table:style-name="ce43" office:value-type="date" office:date-value="2023-06-17">
            <text:p>06/17/23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18" office:value-type="string">
            <text:p><text:s/>me.m10.d06_en_US_oca.meMA.Kathisma21</text:p>
          </table:table-cell>
          <table:table-cell table:style-name="ce48" office:value-type="date" office:date-value="2025-08-11">
            <text:p>08/11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43" office:value-type="date" office:date-value="2024-10-24">
            <text:p>10/24/24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20" office:value-type="date" office:date-value="2024-10-25">
            <text:p>10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22" office:value-type="date" office:date-value="2024-10-26">
            <text:p>10/26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Kathisma11</text:p>
          </table:table-cell>
          <table:table-cell table:style-name="ce20" office:value-type="date" office:date-value="2024-11-13">
            <text:p>11/13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Kathisma2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22" office:value-type="date" office:date-value="2024-11-15">
            <text:p>11/15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8_en_US_dedes.meMA.Exaposteilarion1</text:p>
          </table:table-cell>
          <table:table-cell table:style-name="ce28" office:value-type="date" office:date-value="2025-08-14">
            <text:p>08/1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8_en_US_dedes.meMA.ExapTheotokion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22" office:value-type="date" office:date-value="2024-11-18">
            <text:p>11/18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11_en_US_dedes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11_en_US_dedes.meMA.ExapTheotokion</text:p>
          </table:table-cell>
          <table:table-cell table:style-name="ce23"/>
          <table:table-cell table:style-name="ce23" office:value-type="string">
            <text:p>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12" office:value-type="string">
            <text:p><text:s/>me.m12.d20_en_US_oca.meMA.Kathisma11</text:p>
          </table:table-cell>
          <table:table-cell table:style-name="ce20" office:value-type="date" office:date-value="2025-08-22">
            <text:p>08/22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2</text:p>
          </table:table-cell>
          <table:table-cell table:style-name="ce20" office:value-type="date" office:date-value="2025-08-25">
            <text:p>08/25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5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 table:style-name="ce43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<text:s/>me.m12.d22_en_US_oca.meMA.Kathisma11</text:p>
          </table:table-cell>
          <table:table-cell table:style-name="ce33" office:value-type="date" office:date-value="2025-08-26">
            <text:p>08/26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Kathisma2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2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3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4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Glory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Both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1</text:p>
          </table:table-cell>
          <table:table-cell table:style-name="ce33" office:value-type="date" office:date-value="2025-08-27">
            <text:p>08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2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3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20" office:value-type="date" office:date-value="2025-08-29">
            <text:p>08/29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20" office:value-type="date" office:date-value="2025-08-30">
            <text:p>08/3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Exaposteilarion1</text:p>
          </table:table-cell>
          <table:table-cell table:style-name="ce43" office:value-type="date" office:date-value="2025-09-01">
            <text:p>09/01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meMA.Exaposteilarion2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1</text:p>
          </table:table-cell>
          <table:table-cell table:style-name="ce43" office:value-type="date" office:date-value="2025-09-02">
            <text:p>09/02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Kathisma11</text:p>
          </table:table-cell>
          <table:table-cell table:style-name="ce20" office:value-type="date" office:date-value="2026-06-17">
            <text:p>06/17/26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dedes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table:style-name="ce24"/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Kathisma11</text:p>
          </table:table-cell>
          <table:table-cell table:style-name="ce43" office:value-type="date" office:date-value="2025-09-04">
            <text:p>09/04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20" office:value-type="date" office:date-value="2025-09-05">
            <text:p>09/05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4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7">06/17/2026</text:date>, <text:time>17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7T17:19:24.47</dc:date>
    <dc:creator>Alex Dedes</dc:creator>
    <meta:generator>OpenOffice/4.1.15$Win32 OpenOffice.org_project/4115m2$Build-9813</meta:generator>
    <meta:editing-duration>P1DT13H24M21S</meta:editing-duration>
    <meta:editing-cycles>20</meta:editing-cycles>
    <meta:document-statistic meta:table-count="4" meta:cell-count="3842" meta:object-count="0"/>
  </office:meta>
</office:document-meta>
</file>