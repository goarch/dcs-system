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804">
            <text:p>804</text:p>
          </table:table-cell>
          <table:table-cell table:style-name="ce76" office:value-type="string">
            <text:p>of 852</text:p>
          </table:table-cell>
          <table:table-cell table:style-name="ce45" table:formula="of:=852-[.D2]" office:value-type="float" office:value="48">
            <text:p>48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7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3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4" office:value-type="string">
            <text:p>goadedes</text:p>
          </table:table-cell>
          <table:table-cell table:style-name="ce74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3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1" office:value-type="date" office:date-value="2026-06-03">
            <text:p>06/03/26</text:p>
          </table:table-cell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style-name="ce3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5">06/05/2026</text:date>, <text:time>09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5T09:21:27.03</dc:date>
    <dc:creator>Alex Dedes</dc:creator>
    <meta:generator>OpenOffice/4.1.15$Win32 OpenOffice.org_project/4115m2$Build-9813</meta:generator>
    <meta:editing-duration>PT17H22M9S</meta:editing-duration>
    <meta:editing-cycles>9</meta:editing-cycles>
    <meta:document-statistic meta:table-count="4" meta:cell-count="3780" meta:object-count="0"/>
  </office:meta>
</office:document-meta>
</file>