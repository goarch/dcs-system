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801">
            <text:p>801</text:p>
          </table:table-cell>
          <table:table-cell table:style-name="ce76" office:value-type="string">
            <text:p>of 852</text:p>
          </table:table-cell>
          <table:table-cell table:style-name="ce45" table:formula="of:=852-[.D2]" office:value-type="float" office:value="51">
            <text:p>51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7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3" office:value-type="string">
            <text:p>goadedes</text:p>
          </table:table-cell>
          <table:table-cell table:style-name="ce73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3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4" office:value-type="string">
            <text:p>goadedes</text:p>
          </table:table-cell>
          <table:table-cell table:style-name="ce74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office:value-type="date" office:date-value="2026-06-03">
            <text:p>06/03/26</text:p>
          </table:table-cell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2"/>
          <table:table-cell table:style-name="ce72" office:value-type="string">
            <text:p>goadedes</text:p>
          </table:table-cell>
          <table:table-cell table:style-name="ce72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3">06/03/2026</text:date>, <text:time>07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3T07:52:40.90</dc:date>
    <dc:creator>Alex Dedes</dc:creator>
    <meta:generator>OpenOffice/4.1.15$Win32 OpenOffice.org_project/4115m2$Build-9813</meta:generator>
    <meta:editing-duration>PT17H17M23S</meta:editing-duration>
    <meta:editing-cycles>8</meta:editing-cycles>
    <meta:document-statistic meta:table-count="4" meta:cell-count="3775" meta:object-count="0"/>
  </office:meta>
</office:document-meta>
</file>