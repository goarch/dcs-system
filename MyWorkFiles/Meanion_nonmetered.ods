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4" style:family="table-column">
      <style:table-column-properties fo:break-before="auto" style:column-width="3.1346in"/>
    </style:style>
    <style:style style:name="co15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ta6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9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0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4" table:default-cell-style-name="ce10"/>
        <table:table-column table:style-name="co2" table:number-columns-repeated="4" table:default-cell-style-name="ce42"/>
        <table:table-column table:style-name="co3" table:default-cell-style-name="Excel_20_Built-in_20_Normal"/>
        <table:table-column table:style-name="co15" table:default-cell-style-name="ce42"/>
        <table:table-column table:style-name="co3" table:number-columns-repeated="1017" table:default-cell-style-name="Excel_20_Built-in_20_Normal"/>
        <table:table-row table:style-name="ro12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2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44">
            <text:p>844</text:p>
          </table:table-cell>
          <table:table-cell table:style-name="ce85" office:value-type="string">
            <text:p>Of 853</text:p>
          </table:table-cell>
          <table:table-cell table:style-name="ce63" table:formula="of:=853-[.D2]" office:value-type="float" office:value="9">
            <text:p>9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1 </text:p>
          </table:table-cell>
          <table:table-cell table:style-name="ce62" office:value-type="date" office:date-value="2025-01-02">
            <text:p>01/02/25</text:p>
          </table:table-cell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1 </text:p>
          </table:table-cell>
          <table:table-cell table:style-name="ce68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1_en_US_barrett.meVE.SticTheotokion </text:p>
          </table:table-cell>
          <table:table-cell table:style-name="ce69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6_en_US_dedes.meVE.SticStavrotheotokion </text:p>
          </table:table-cell>
          <table:table-cell table:style-name="ce69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1 </text:p>
          </table:table-cell>
          <table:table-cell table:style-name="ce70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2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3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4.d11_en_US_dedes.meVE.SticStavrotheotokion </text:p>
          </table:table-cell>
          <table:table-cell table:style-name="ce72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1 </text:p>
          </table:table-cell>
          <table:table-cell table:style-name="ce73" office:value-type="date" office:date-value="2026-06-18">
            <text:p>06/18/26</text:p>
          </table:table-cell>
          <table:table-cell table:style-name="ce21" office:value-type="string">
            <text:p>goadedes</text:p>
          </table:table-cell>
          <table:table-cell table:style-name="ce24"/>
          <table:table-cell table:style-name="ce57"/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1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1 </text:p>
          </table:table-cell>
          <table:table-cell table:style-name="ce72" office:value-type="date" office:date-value="2026-06-18">
            <text:p>06/18/26</text:p>
          </table:table-cell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2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3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5_en_US_oca.meVE.Stichera04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5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6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1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2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3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Apolytikion1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08_en_US_oca.meVE.Stichera04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5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6 </text:p>
          </table:table-cell>
          <table:table-cell table:style-name="ce7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2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6.d01_en_US_oca.meVE.Stichera01 </text:p>
          </table:table-cell>
          <table:table-cell table:style-name="ce4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61" office:value-type="string">
            <text:p>me.m06.d30_en_US_oca.meVE.Stichera06 </text:p>
          </table:table-cell>
          <table:table-cell table:style-name="ce77"/>
          <table:table-cell table:style-name="ce23" office:value-type="string">
            <text:p>goadedes</text:p>
          </table:table-cell>
          <table:table-cell table:style-name="ce7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86"/>
          <table:table-cell table:number-columns-repeated="1018"/>
        </table:table-row>
        <table:table-row table:style-name="ro12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1 </text:p>
          </table:table-cell>
          <table:table-cell table:style-name="ce43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1 </text:p>
          </table:table-cell>
          <table:table-cell table:style-name="ce43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1 </text:p>
          </table:table-cell>
          <table:table-cell table:style-name="ce43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1 </text:p>
          </table:table-cell>
          <table:table-cell table:style-name="ce43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1 </text:p>
          </table:table-cell>
          <table:table-cell table:style-name="ce43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1 </text:p>
          </table:table-cell>
          <table:table-cell table:style-name="ce43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1 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4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5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6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1_en_US_oca.meVE.Stichera01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1 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dedes.meVE.Stichera04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5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6 </text:p>
          </table:table-cell>
          <table:table-cell table:style-name="ce78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6_en_US_dedes.meVE.Aposticha1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8_en_US_oca.meVE.Stichera01 </text:p>
          </table:table-cell>
          <table:table-cell table:style-name="ce43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1 </text:p>
          </table:table-cell>
          <table:table-cell table:style-name="ce43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1 </text:p>
          </table:table-cell>
          <table:table-cell table:style-name="ce43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4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Aposticha1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9.d07_en_US_oca.meVE.Stichera01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4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Glory 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dedes.meVE.Aposticha2 </text:p>
          </table:table-cell>
          <table:table-cell table:style-name="ce43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1 </text:p>
          </table:table-cell>
          <table:table-cell table:style-name="ce43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4 </text:p>
          </table:table-cell>
          <table:table-cell table:style-name="ce43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4 </text:p>
          </table:table-cell>
          <table:table-cell table:style-name="ce43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1 </text:p>
          </table:table-cell>
          <table:table-cell table:style-name="ce43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1 </text:p>
          </table:table-cell>
          <table:table-cell table:style-name="ce43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1_en_US_dedes.meVE.SticTheotokion </text:p>
          </table:table-cell>
          <table:table-cell table:style-name="ce4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3_en_US_dedes.meVE.AposTheotokion </text:p>
          </table:table-cell>
          <table:table-cell table:style-name="ce4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1 </text:p>
          </table:table-cell>
          <table:table-cell table:style-name="ce43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AposStavrotheotokion </text:p>
          </table:table-cell>
          <table:table-cell table:style-name="ce43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1 </text:p>
          </table:table-cell>
          <table:table-cell table:style-name="ce43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1 </text:p>
          </table:table-cell>
          <table:table-cell table:style-name="ce43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1 </text:p>
          </table:table-cell>
          <table:table-cell table:style-name="ce43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1 </text:p>
          </table:table-cell>
          <table:table-cell table:style-name="ce43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1 </text:p>
          </table:table-cell>
          <table:table-cell table:style-name="ce43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28_en_US_dedes.meVE.Stichera01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2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3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me.m10.28_en_US_dedes.meVE.Stichera04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5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6</text:p>
          </table:table-cell>
          <table:table-cell table:style-name="ce78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1 </text:p>
          </table:table-cell>
          <table:table-cell table:style-name="ce43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1 </text:p>
          </table:table-cell>
          <table:table-cell table:style-name="ce43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dedes.meVE.Apolytikion1</text:p>
          </table:table-cell>
          <table:table-cell table:style-name="ce43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4_en_US_dedes.meVE.SticTheotokion </text:p>
          </table:table-cell>
          <table:table-cell table:style-name="ce69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1.d07_en_US_oca.meVE.AposStavrotheotokion</text:p>
          </table:table-cell>
          <table:table-cell table:style-name="ce43" office:value-type="date" office:date-value="2025-03-01">
            <text:p>03/01/25</text:p>
          </table:table-cell>
          <table:table-cell table:style-name="ce83" office:value-type="string">
            <text:p>goadedes</text:p>
          </table:table-cell>
          <table:table-cell table:style-name="ce8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dedes.meVE.Stichera04 </text:p>
          </table:table-cell>
          <table:table-cell table:style-name="ce4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6 </text:p>
          </table:table-cell>
          <table:table-cell table:style-name="ce4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2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1 </text:p>
          </table:table-cell>
          <table:table-cell table:style-name="ce43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4_en_US_dedes.meVE.Stichera01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2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3 </text:p>
          </table:table-cell>
          <table:table-cell table:style-name="ce79" office:value-type="string">
            <text:p>not us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4 </text:p>
          </table:table-cell>
          <table:table-cell table:style-name="ce80" office:value-type="date" office:date-value="2026-06-03">
            <text:p>06/03/26</text:p>
          </table:table-cell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5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6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16_en_US_oca.meVE.Stichera01 </text:p>
          </table:table-cell>
          <table:table-cell table:style-name="ce43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1 </text:p>
          </table:table-cell>
          <table:table-cell table:style-name="ce43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21_en_US_dedes.meVE.Stichera04 </text:p>
          </table:table-cell>
          <table:table-cell table:style-name="ce4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21_en_US_oca.meVE.Stichera01 </text:p>
          </table:table-cell>
          <table:table-cell table:style-name="ce4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1 </text:p>
          </table:table-cell>
          <table:table-cell table:style-name="ce43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2"/>
        <table:table-column table:style-name="co12" table:default-cell-style-name="ce42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67" office:value-type="string">
            <text:p>Total so far:</text:p>
          </table:table-cell>
          <table:table-cell table:style-name="ce60" table:formula="of:=SUM([.D3:.D241])" office:value-type="float" office:value="237">
            <text:p>237</text:p>
          </table:table-cell>
          <table:table-cell/>
          <table:table-cell table:style-name="ce63" table:formula="of:=239-[.D2]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43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2.d26_en_US_andronache.alt1.meMA.Kathisma11</text:p>
          </table:table-cell>
          <table:table-cell table:style-name="ce65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43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43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43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43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3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43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 table:style-name="ce4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Kathisma2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4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Glory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Both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1</text:p>
          </table:table-cell>
          <table:table-cell table:style-name="ce43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1</text:p>
          </table:table-cell>
          <table:table-cell table:style-name="ce43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Kathisma11</text:p>
          </table:table-cell>
          <table:table-cell table:style-name="ce43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9">06/19/2026</text:date>, <text:time>09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9T09:43:14.01</dc:date>
    <dc:creator>Alex Dedes</dc:creator>
    <meta:generator>OpenOffice/4.1.15$Win32 OpenOffice.org_project/4115m2$Build-9813</meta:generator>
    <meta:editing-duration>P1DT15H44M9S</meta:editing-duration>
    <meta:editing-cycles>24</meta:editing-cycles>
    <meta:document-statistic meta:table-count="4" meta:cell-count="3853" meta:object-count="0"/>
  </office:meta>
</office:document-meta>
</file>