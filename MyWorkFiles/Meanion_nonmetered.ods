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34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3965in"/>
    </style:style>
    <style:style style:name="co5" style:family="table-column">
      <style:table-column-properties fo:break-before="auto" style:column-width="3.7492in"/>
    </style:style>
    <style:style style:name="co6" style:family="table-column">
      <style:table-column-properties fo:break-before="auto" style:column-width="0.5256in"/>
    </style:style>
    <style:style style:name="co7" style:family="table-column">
      <style:table-column-properties fo:break-before="auto" style:column-width="0.4508in"/>
    </style:style>
    <style:style style:name="co8" style:family="table-column">
      <style:table-column-properties fo:break-before="auto" style:column-width="2.7374in"/>
    </style:style>
    <style:style style:name="co9" style:family="table-column">
      <style:table-column-properties fo:break-before="auto" style:column-width="1.9965in"/>
    </style:style>
    <style:style style:name="co10" style:family="table-column">
      <style:table-column-properties fo:break-before="auto" style:column-width="2.211in"/>
    </style:style>
    <style:style style:name="ro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3.8346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1.0154in" fo:break-before="auto" style:use-optimal-row-height="true"/>
    </style:style>
    <style:style style:name="ta1" style:family="table" style:master-page-name="PageStyle_5f_Menaion_5f_Vespers_5f_notmetered">
      <style:table-properties table:display="true" style:writing-mode="lr-tb"/>
    </style:style>
    <style:style style:name="ta2" style:family="table" style:master-page-name="PageStyle_5f_Meanion_5f_Matins_5f_notmetered">
      <style:table-properties table:display="true" style:writing-mode="lr-tb"/>
    </style:style>
    <style:style style:name="ta3" style:family="table" style:master-page-name="PageStyle_5f_Compare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ddddd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ffb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fo:background-color="#ffdbb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ffde5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 style:data-style-name="N37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8" style:family="table-cell" style:parent-style-name="Excel_20_Built-in_20_Normal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b2b2b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0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 style:data-style-name="N37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2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37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8" style:family="table-cell" style:parent-style-name="Excel_20_Built-in_20_Normal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9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0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2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33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4" style:family="table-cell" style:parent-style-name="Excel_20_Built-in_20_Normal">
      <style:table-cell-properties fo:background-color="#ffd8ce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" style:family="table-cell" style:parent-style-name="Excel_20_Built-in_20_Normal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Excel_20_Built-in_20_Normal">
      <style:table-cell-properties fo:background-color="#ffb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4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9211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Excel_20_Built-in_20_Normal">
      <style:table-cell-properties fo:border-bottom="0.0138in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  <style:style style:name="ce47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53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Menaion_Vespers_notmetered" table:style-name="ta1" table:print="false">
        <office:forms form:automatic-focus="false" form:apply-design-mode="false"/>
        <table:table-column table:style-name="co1" table:default-cell-style-name="ce10"/>
        <table:table-column table:style-name="co2" table:number-columns-repeated="4" table:default-cell-style-name="ce31"/>
        <table:table-column table:style-name="co3" table:default-cell-style-name="Excel_20_Built-in_20_Normal"/>
        <table:table-column table:style-name="co4" table:default-cell-style-name="ce31"/>
        <table:table-column table:style-name="co3" table:number-columns-repeated="1017" table:default-cell-style-name="Excel_20_Built-in_20_Normal"/>
        <table:table-row table:style-name="ro1">
          <table:table-cell table:style-name="ce1" office:value-type="string">
            <text:p>Not Metered</text:p>
          </table:table-cell>
          <table:table-cell table:style-name="ce11" office:value-type="string">
            <text:p>date done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count</text:p>
          </table:table-cell>
          <table:table-cell/>
          <table:table-cell table:style-name="ce11" office:value-type="string">
            <text:p>remaining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1"/>
          <table:table-cell table:style-name="ce11"/>
          <table:table-cell table:style-name="ce11" office:value-type="string">
            <text:p>Total so far:</text:p>
          </table:table-cell>
          <table:table-cell table:style-name="ce42" table:formula="of:=SUM([.D3:.D854])" office:value-type="float" office:value="787">
            <text:p>787</text:p>
          </table:table-cell>
          <table:table-cell table:style-name="ce44" office:value-type="string">
            <text:p>of 852</text:p>
          </table:table-cell>
          <table:table-cell table:style-name="ce45" table:formula="of:=852-[.D2]" office:value-type="float" office:value="65">
            <text:p>65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e.m01.d01_en_US_oca.meVE.Stichera03 </text:p>
          </table:table-cell>
          <table:table-cell table:style-name="ce12" office:value-type="date" office:date-value="2024-11-26">
            <text:p>11/26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01.d01_en_US_oca.meVE.Stichera04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01.d01_en_US_oca.meVE.Stichera05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1.d02_en_US_oca.meVE.Stichera01 </text:p>
          </table:table-cell>
          <table:table-cell table:style-name="ce14" office:value-type="date" office:date-value="2024-11-27">
            <text:p>11/27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1.d02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1.d02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.m01.d03_en_US_oca.meVE.Aposticha1 </text:p>
          </table:table-cell>
          <table:table-cell table:style-name="ce12" office:value-type="date" office:date-value="2024-12-31">
            <text:p>12/31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.m01.d03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.m01.d03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1.d04_en_US_oca.meVE.Aposticha1 </text:p>
          </table:table-cell>
          <table:table-cell table:style-name="ce14" office:value-type="date" office:date-value="2024-12-30">
            <text:p>12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1.d04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1.d04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1.d04_en_US_oca.meVE.Stichera01 </text:p>
          </table:table-cell>
          <table:table-cell table:style-name="ce14" office:value-type="date" office:date-value="2025-01-01">
            <text:p>01/0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1.d0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1.d0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07_en_US_oca.meVE.Aposticha1 </text:p>
          </table:table-cell>
          <table:table-cell table:style-name="ce12" office:value-type="date" office:date-value="2024-12-29">
            <text:p>12/29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07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07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08_en_US_oca.meVE.Aposticha1 </text:p>
          </table:table-cell>
          <table:table-cell table:style-name="ce14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08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08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.m01.d09_en_US_oca.meVE.Aposticha1 </text:p>
          </table:table-cell>
          <table:table-cell table:style-name="ce17" office:value-type="date" office:date-value="2025-01-02">
            <text:p>01/02/25</text:p>
          </table:table-cell>
          <table:table-cell table:style-name="ce18" office:value-type="string">
            <text:p>goadedes</text:p>
          </table:table-cell>
          <table:table-cell table:style-name="ce18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.m01.d09_en_US_oca.meVE.Aposticha2 </text:p>
          </table:table-cell>
          <table:table-cell table:style-name="ce18"/>
          <table:table-cell table:style-name="ce18" office:value-type="string">
            <text:p>goadedes</text:p>
          </table:table-cell>
          <table:table-cell table:style-name="ce18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.m01.d09_en_US_oca.meVE.Aposticha3 </text:p>
          </table:table-cell>
          <table:table-cell table:style-name="ce18"/>
          <table:table-cell table:style-name="ce18" office:value-type="string">
            <text:p>goadedes</text:p>
          </table:table-cell>
          <table:table-cell table:style-name="ce18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.m01.d09_en_US_oca.meVE.Stichera01 </text:p>
          </table:table-cell>
          <table:table-cell table:style-name="ce19"/>
          <table:table-cell table:style-name="ce18" office:value-type="string">
            <text:p>goadedes</text:p>
          </table:table-cell>
          <table:table-cell table:style-name="ce18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.m01.d09_en_US_oca.meVE.Stichera02 </text:p>
          </table:table-cell>
          <table:table-cell table:style-name="ce18"/>
          <table:table-cell table:style-name="ce18" office:value-type="string">
            <text:p>goadedes</text:p>
          </table:table-cell>
          <table:table-cell table:style-name="ce18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.m01.d09_en_US_oca.meVE.Stichera03 </text:p>
          </table:table-cell>
          <table:table-cell table:style-name="ce18"/>
          <table:table-cell table:style-name="ce18" office:value-type="string">
            <text:p>goadedes</text:p>
          </table:table-cell>
          <table:table-cell table:style-name="ce18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10_en_US_oca.meVE.Aposticha1 </text:p>
          </table:table-cell>
          <table:table-cell table:style-name="ce20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1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10_en_US_oca.meVE.Aposticha3 </text:p>
          </table:table-cell>
          <table:table-cell table:style-name="ce20" office:value-type="date" office:date-value="2025-01-06">
            <text:p>01/06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10_en_US_oca.meVE.Stichera01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1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1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1.d12_en_US_oca.meVE.Aposticha1 </text:p>
          </table:table-cell>
          <table:table-cell table:style-name="ce21" office:value-type="date" office:date-value="2024-01-07">
            <text:p>01/07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1.d12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1.d12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1.d12_en_US_oca.meVE.Stichera01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1.d12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1.d12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13_en_US_oca.meVE.Aposticha1 </text:p>
          </table:table-cell>
          <table:table-cell table:style-name="ce20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13_en_US_oca.meVE.Aposticha2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13_en_US_oca.meVE.Aposticha3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16_en_US_oca.meVE.Stichera01 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17_en_US_oca.meVE.Aposticha1 </text:p>
          </table:table-cell>
          <table:table-cell table:style-name="ce12" office:value-type="date" office:date-value="2024-12-16">
            <text:p>12/16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17_en_US_oca.meVE.Aposticha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17_en_US_oca.meVE.Aposticha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17_en_US_oca.meVE.Stichera02 </text:p>
          </table:table-cell>
          <table:table-cell table:style-name="ce12" office:value-type="date" office:date-value="2024-12-14">
            <text:p>12/14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17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18_en_US_dedes.meVE.Aposticha1 </text:p>
          </table:table-cell>
          <table:table-cell table:style-name="ce14" office:value-type="date" office:date-value="2024-12-18">
            <text:p>12/18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18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18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18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18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18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18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18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18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20_en_US_oca.meVE.Aposticha1 </text:p>
          </table:table-cell>
          <table:table-cell table:style-name="ce20" office:value-type="date" office:date-value="2025-01-09">
            <text:p>01/09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2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2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20_en_US_oca.meVE.Stichera01 </text:p>
          </table:table-cell>
          <table:table-cell table:style-name="ce20" office:value-type="date" office:date-value="2025-01-08">
            <text:p>01/0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2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2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20_en_US_oca.meVE.Stichera04 </text:p>
          </table:table-cell>
          <table:table-cell table:style-name="ce20" office:value-type="date" office:date-value="2025-01-09">
            <text:p>01/09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20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20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21_en_US_dedes.meVE.Stichera04 </text:p>
          </table:table-cell>
          <table:table-cell table:style-name="ce23" office:value-type="date" office:date-value="2025-01-10">
            <text:p>01/1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21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21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21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23_en_US_dedes.meVE.SticStavrotheotokion </text:p>
          </table:table-cell>
          <table:table-cell table:style-name="ce12" office:value-type="date" office:date-value="2025-01-10">
            <text:p>01/10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25_en_US_oca.meVE.AposTheotokion </text:p>
          </table:table-cell>
          <table:table-cell table:style-name="ce14" office:value-type="date" office:date-value="2024-12-04">
            <text:p>12/04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25_en_US_oca.meVE.Aposticha1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25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25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25_en_US_oca.meVE.Stichera01 </text:p>
          </table:table-cell>
          <table:table-cell table:style-name="ce14" office:value-type="date" office:date-value="2024-12-03">
            <text:p>12/03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25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25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me.m01.d25_en_US_oca.meVE.Stichera04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7" office:value-type="string">
            <text:p>me.m01.d25_en_US_oca.meVE.Stichera05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7" office:value-type="string">
            <text:p>me.m01.d25_en_US_oca.meVE.Stichera06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me.m01.d26_en_US_oca.meVE.Stichera01 </text:p>
          </table:table-cell>
          <table:table-cell table:style-name="ce14" office:value-type="date" office:date-value="2024-11-28">
            <text:p>11/28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01.d26_en_US_oca.meVE.Stichera02 </text:p>
          </table:table-cell>
          <table:table-cell table:style-name="ce14" office:value-type="date" office:date-value="2024-11-30">
            <text:p>11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01.d2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27_en_US_dedes.meVE.Aposticha1 </text:p>
          </table:table-cell>
          <table:table-cell table:style-name="ce14" office:value-type="date" office:date-value="2024-12-20">
            <text:p>12/2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27_en_US_dedes.meVE.Aposticha2 </text:p>
          </table:table-cell>
          <table:table-cell table:style-name="ce14" office:value-type="date" office:date-value="2024-12-21">
            <text:p>12/2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27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me.m01.d27_en_US_oca.meVE.Stichera04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">
          <table:table-cell table:style-name="ce7" office:value-type="string">
            <text:p>me.m01.d27_en_US_oca.meVE.Stichera05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">
          <table:table-cell table:style-name="ce7" office:value-type="string">
            <text:p>me.m01.d27_en_US_oca.meVE.Stichera06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">
          <table:table-cell table:style-name="ce5" office:value-type="string">
            <text:p>me.m01.d30_en_US_oca.meVE.Aposticha1 </text:p>
          </table:table-cell>
          <table:table-cell table:style-name="ce12" office:value-type="date" office:date-value="2024-12-02">
            <text:p>12/02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3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3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30_en_US_oca.meVE.Stichera01 </text:p>
          </table:table-cell>
          <table:table-cell table:style-name="ce12" office:value-type="date" office:date-value="2024-12-01">
            <text:p>12/01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3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3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1.d30_en_US_oca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1.d31_en_US_goadedes.meVE.SticTheotokion </text:p>
          </table:table-cell>
          <table:table-cell table:style-name="ce23" office:value-type="date" office:date-value="2025-01-10">
            <text:p>01/10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04_en_US_oca.meVE.Stichera01 </text:p>
          </table:table-cell>
          <table:table-cell table:style-name="ce12" office:value-type="date" office:date-value="2025-01-13">
            <text:p>01/13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04_en_US_oca.meVE.Stichera0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04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05_en_US_oca.meVE.Aposticha1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05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05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08_en_US_oca.meVE.Aposticha1 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08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08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08_en_US_oca.meVE.Stichera04 </text:p>
          </table:table-cell>
          <table:table-cell table:style-name="ce12" office:value-type="date" office:date-value="2024-12-06">
            <text:p>12/06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08_en_US_oca.meVE.Stichera05 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08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08_en_US_oca.meVE.SticStavrotheotokion2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08_en_US_oca.meVE.SticTheotokion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12_en_US_oca.meVE.Stichera01 </text:p>
          </table:table-cell>
          <table:table-cell table:style-name="ce12" office:value-type="date" office:date-value="2025-01-13">
            <text:p>01/13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12_en_US_oca.meVE.Stichera02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12_en_US_oca.meVE.Stichera03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12_en_US_oca.meVE.Stichera04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13_en_US_oca.meVE.AposStavrotheotokion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17_en_US_dedes.meVE.AposTheotokion </text:p>
          </table:table-cell>
          <table:table-cell table:style-name="ce20" office:value-type="date" office:date-value="2025-01-14">
            <text:p>01/1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17_en_US_dedes.meVE.SticTheotokion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17_en_US_oca.meVE.Stichera01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17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17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19_en_US_dedes.meVE.SticTheotokion </text:p>
          </table:table-cell>
          <table:table-cell table:style-name="ce23" office:value-type="date" office:date-value="2025-01-14">
            <text:p>01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19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2.d21_en_US_barrett.meVE.SticTheotokion </text:p>
          </table:table-cell>
          <table:table-cell table:style-name="ce24" office:value-type="date" office:date-value="2025-01-14">
            <text:p>01/14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23_en_US_oca.meVE.Stichera01 </text:p>
          </table:table-cell>
          <table:table-cell table:style-name="ce23" office:value-type="date" office:date-value="2025-01-14">
            <text:p>01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2.d26_en_US_dedes.meVE.SticStavrotheotokion </text:p>
          </table:table-cell>
          <table:table-cell table:style-name="ce24" office:value-type="date" office:date-value="2025-01-26">
            <text:p>01/26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.m02.d26_en_US_andronache.alt1.meVE.Stichera01</text:p>
          </table:table-cell>
          <table:table-cell table:style-name="ce25" office:value-type="date" office:date-value="2025-01-26">
            <text:p>01/26/25</text:p>
          </table:table-cell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.m02.d26_en_US_andronache.alt1.meVE.Stichera0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.m02.d26_en_US_andronache.alt1.meVE.Stichera0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.m02.d26_en_US_andronache.alt1.meVE.Aposticha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.m02.d26_en_US_andronache.alt1.meVE.Aposticha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.m02.d26_en_US_andronache.alt1.meVE.Aposticha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27_en_US_oca.meVE.Stichera01 </text:p>
          </table:table-cell>
          <table:table-cell table:style-name="ce23" office:value-type="date" office:date-value="2025-01-15">
            <text:p>01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27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2.d27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28_en_US_oca.meVE.Stichera01 </text:p>
          </table:table-cell>
          <table:table-cell table:style-name="ce12" office:value-type="date" office:date-value="2025-01-15">
            <text:p>01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28_en_US_oca.meVE.Stichera0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2.d28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3.d23_en_US_oca.meVE.Stichera01 </text:p>
          </table:table-cell>
          <table:table-cell table:style-name="ce23" office:value-type="date" office:date-value="2025-01-15">
            <text:p>01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3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3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4.d03_en_US_dedes.meVE.SticStavrotheotokion</text:p>
          </table:table-cell>
          <table:table-cell table:style-name="ce12" office:value-type="date" office:date-value="2025-10-01">
            <text:p>10/01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4.d03_en_US_oca.meVE.Stichera01 </text:p>
          </table:table-cell>
          <table:table-cell table:style-name="ce27" office:value-type="date" office:date-value="2025-10-20">
            <text:p>10/20/25</text:p>
          </table:table-cell>
          <table:table-cell table:style-name="ce13" office:value-type="string">
            <text:p>goadedes</text:p>
          </table:table-cell>
          <table:table-cell table:style-name="ce28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4.d03_en_US_oca.meVE.Stichera02 </text:p>
          </table:table-cell>
          <table:table-cell table:style-name="ce28"/>
          <table:table-cell table:style-name="ce13" office:value-type="string">
            <text:p>goadedes</text:p>
          </table:table-cell>
          <table:table-cell table:style-name="ce28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4.d03_en_US_oca.meVE.Stichera03 </text:p>
          </table:table-cell>
          <table:table-cell table:style-name="ce28"/>
          <table:table-cell table:style-name="ce13" office:value-type="string">
            <text:p>goadedes</text:p>
          </table:table-cell>
          <table:table-cell table:style-name="ce28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4.d11_en_US_dedes.meVE.SticStavrotheotokion 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3" office:value-type="string">
            <text:p>me.m04.d12_en_US_dedes.meVE.Stichera01 </text:p>
          </table:table-cell>
          <table:table-cell table:style-name="ce21" office:value-type="date" office:date-value="2025-04-01">
            <text:p>04/01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4.d12_en_US_dedes.meVE.Stichera02 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3" office:value-type="string">
            <text:p>me.m04.d12_en_US_dedes.meVE.Stichera03 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3" office:value-type="string">
            <text:p>me.m04.d13_en_US_oca.meVE.Stichera01 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3" office:value-type="string">
            <text:p>me.m04.d13_en_US_oca.meVE.Stichera02 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3" office:value-type="string">
            <text:p>me.m04.d13_en_US_oca.meVE.Stichera03 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6" office:value-type="string">
            <text:p>me.m04.d20_en_US_oca.meVE.Stichera01 </text:p>
          </table:table-cell>
          <table:table-cell table:style-name="ce14" office:value-type="date" office:date-value="2025-10-24">
            <text:p>10/24/25</text:p>
          </table:table-cell>
          <table:table-cell table:style-name="ce15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4.d20_en_US_oca.meVE.Stichera02 </text:p>
          </table:table-cell>
          <table:table-cell table:style-name="ce30"/>
          <table:table-cell table:style-name="ce15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4.d20_en_US_oca.meVE.Stichera03 </text:p>
          </table:table-cell>
          <table:table-cell table:style-name="ce30"/>
          <table:table-cell table:style-name="ce15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4.d25_en_US_oca.meVE.Stichera04 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3" office:value-type="string">
            <text:p>me.m04.d25_en_US_oca.meVE.Stichera05 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3" office:value-type="string">
            <text:p>me.m04.d25_en_US_oca.meVE.Stichera06 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3" office:value-type="string">
            <text:p>me.m04.d26_en_US_oca.meVE.Stichera01 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3" office:value-type="string">
            <text:p>me.m04.d26_en_US_oca.meVE.Stichera02 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3" office:value-type="string">
            <text:p>me.m04.d26_en_US_oca.meVE.Stichera03 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6" office:value-type="string">
            <text:p>me.m04.d27_en_US_oca.meVE.Stichera01 </text:p>
          </table:table-cell>
          <table:table-cell table:style-name="ce14" office:value-type="date" office:date-value="2025-10-27">
            <text:p>10/27/25</text:p>
          </table:table-cell>
          <table:table-cell table:style-name="ce15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4.d27_en_US_oca.meVE.Stichera02 </text:p>
          </table:table-cell>
          <table:table-cell table:style-name="ce30"/>
          <table:table-cell table:style-name="ce15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4.d27_en_US_oca.meVE.Stichera03 </text:p>
          </table:table-cell>
          <table:table-cell table:style-name="ce30"/>
          <table:table-cell table:style-name="ce15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4.d27_en_US_oca.meVE.Apolytikion1</text:p>
          </table:table-cell>
          <table:table-cell table:style-name="ce30"/>
          <table:table-cell table:style-name="ce15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4.d28_en_US_oca.meVE.Stichera01 </text:p>
          </table:table-cell>
          <table:table-cell table:style-name="ce12" office:value-type="date" office:date-value="2025-01-16">
            <text:p>01/1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4.d2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4.d2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4.d30_en_US_oca.meVE.Stichera01 </text:p>
          </table:table-cell>
          <table:table-cell table:style-name="ce14" office:value-type="date" office:date-value="2025-01-16">
            <text:p>01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4.d30_en_US_oca.meVE.Stichera02 </text:p>
          </table:table-cell>
          <table:table-cell table:style-name="ce30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4.d30_en_US_oca.meVE.Stichera03 </text:p>
          </table:table-cell>
          <table:table-cell table:style-name="ce30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01_en_US_oca.meVE.Stichera01 </text:p>
          </table:table-cell>
          <table:table-cell table:style-name="ce12" office:value-type="date" office:date-value="2025-01-28">
            <text:p>01/2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0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04_en_US_oca.meVE.Stichera01 </text:p>
          </table:table-cell>
          <table:table-cell table:style-name="ce14" office:value-type="date" office:date-value="2025-01-28">
            <text:p>01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0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0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05_en_US_oca.meVE.Stichera01 </text:p>
          </table:table-cell>
          <table:table-cell table:style-name="ce12" office:value-type="date" office:date-value="2025-01-28">
            <text:p>01/2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0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06_en_US_oca.meVE.Stichera02 </text:p>
          </table:table-cell>
          <table:table-cell table:style-name="ce14" office:value-type="date" office:date-value="2025-01-28">
            <text:p>01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0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5.d08_en_US_oca.meVE.Stichera04 </text:p>
          </table:table-cell>
          <table:table-cell table:style-name="ce29" office:value-type="string">
            <text:p>not used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me.m05.d08_en_US_oca.meVE.Stichera05 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3" office:value-type="string">
            <text:p>me.m05.d08_en_US_oca.meVE.Stichera06 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6" office:value-type="string">
            <text:p>me.m05.d09_en_US_oca.meVE.Stichera01 </text:p>
          </table:table-cell>
          <table:table-cell table:style-name="ce14" office:value-type="date" office:date-value="2025-01-29">
            <text:p>01/2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0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0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0_en_US_oca.meVE.Aposticha1 </text:p>
          </table:table-cell>
          <table:table-cell table:style-name="ce12" office:value-type="date" office:date-value="2025-01-29">
            <text:p>01/29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0_en_US_oca.meVE.Stichera01 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12_en_US_oca.meVE.Stichera04 </text:p>
          </table:table-cell>
          <table:table-cell table:style-name="ce14" office:value-type="date" office:date-value="2025-01-30">
            <text:p>01/3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1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1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3_en_US_oca.meVE.Stichera01 </text:p>
          </table:table-cell>
          <table:table-cell table:style-name="ce12" office:value-type="date" office:date-value="2025-01-30">
            <text:p>01/30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3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3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14_en_US_oca.meVE.Stichera01 </text:p>
          </table:table-cell>
          <table:table-cell table:style-name="ce14" office:value-type="date" office:date-value="2025-10-31">
            <text:p>10/31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14_en_US_oca.meVE.Stichera02 </text:p>
          </table:table-cell>
          <table:table-cell table:style-name="ce30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14_en_US_oca.meVE.Stichera03 </text:p>
          </table:table-cell>
          <table:table-cell table:style-name="ce30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5_en_US_oca.meVE.Stichera01 </text:p>
          </table:table-cell>
          <table:table-cell table:style-name="ce12" office:value-type="date" office:date-value="2025-01-31">
            <text:p>01/3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5_en_US_oca.meVE.Apolytik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17_en_US_oca.meVE.Stichera01 </text:p>
          </table:table-cell>
          <table:table-cell table:style-name="ce23" office:value-type="date" office:date-value="2025-01-31">
            <text:p>01/3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17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17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8_en_US_dedes.meVE.Stichera01 </text:p>
          </table:table-cell>
          <table:table-cell table:style-name="ce12" office:value-type="date" office:date-value="2025-10-31">
            <text:p>10/31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1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20_en_US_oca.meVE.Stichera01 </text:p>
          </table:table-cell>
          <table:table-cell table:style-name="ce23" office:value-type="date" office:date-value="2025-01-31">
            <text:p>01/3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2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2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22_en_US_oca.meVE.Stichera01 </text:p>
          </table:table-cell>
          <table:table-cell table:style-name="ce12" office:value-type="date" office:date-value="2025-02-03">
            <text:p>02/0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23_en_US_oca.meVE.Stichera01 </text:p>
          </table:table-cell>
          <table:table-cell table:style-name="ce23" office:value-type="date" office:date-value="2025-02-03">
            <text:p>02/0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24_en_US_oca.meVE.Stichera01 </text:p>
          </table:table-cell>
          <table:table-cell table:style-name="ce12" office:value-type="date" office:date-value="2025-02-03">
            <text:p>02/0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24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24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26_en_US_oca.meVE.Stichera01 </text:p>
          </table:table-cell>
          <table:table-cell table:style-name="ce23" office:value-type="date" office:date-value="2025-02-03">
            <text:p>02/0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2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5.d2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5.d29_en_US_oca.meVE.Stichera01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05.d29_en_US_oca.meVE.Stichera02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05.d29_en_US_oca.meVE.Stichera03 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e.m05.d31_en_US_oca.meVE.Stichera01 </text:p>
          </table:table-cell>
          <table:table-cell table:style-name="ce12" office:value-type="date" office:date-value="2025-02-04">
            <text:p>02/0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3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3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5.d31_en_US_dedes.meVE.SticTheotokion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6.d01_en_US_oca.meVE.Stichera01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06.d01_en_US_oca.meVE.Stichera02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06.d01_en_US_oca.meVE.Stichera03 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e.m06.d02_en_US_oca.meVE.Stichera01 </text:p>
          </table:table-cell>
          <table:table-cell table:style-name="ce12" office:value-type="date" office:date-value="2025-02-04">
            <text:p>02/0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0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0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03_en_US_oca.meVE.Stichera01 </text:p>
          </table:table-cell>
          <table:table-cell table:style-name="ce14" office:value-type="date" office:date-value="2025-02-04">
            <text:p>02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0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0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03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04_en_US_oca.meVE.Stichera04 </text:p>
          </table:table-cell>
          <table:table-cell table:style-name="ce20" office:value-type="date" office:date-value="2025-02-05">
            <text:p>02/05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04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04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05_en_US_oca.meVE.Stichera01 </text:p>
          </table:table-cell>
          <table:table-cell table:style-name="ce23" office:value-type="date" office:date-value="2025-02-05">
            <text:p>02/0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05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05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09_en_US_oca.meVE.Stichera01 </text:p>
          </table:table-cell>
          <table:table-cell table:style-name="ce20" office:value-type="date" office:date-value="2025-10-31">
            <text:p>10/31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09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0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1_en_US_oca.meVE.Aposticha1 </text:p>
          </table:table-cell>
          <table:table-cell table:style-name="ce23" office:value-type="date" office:date-value="2025-02-06">
            <text:p>02/0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1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1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1_en_US_oca.meVE.Stichera04 </text:p>
          </table:table-cell>
          <table:table-cell table:style-name="ce23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1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1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12_en_US_oca.meVE.Stichera01 </text:p>
          </table:table-cell>
          <table:table-cell table:style-name="ce20" office:value-type="date" office:date-value="2025-02-06">
            <text:p>02/06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1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1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3_en_US_oca.meVE.Stichera01 </text:p>
          </table:table-cell>
          <table:table-cell table:style-name="ce23" office:value-type="date" office:date-value="2025-01-07">
            <text:p>01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3_en_US_dedes.meVE.SticStavro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14_en_US_oca.meVE.Stichera01 </text:p>
          </table:table-cell>
          <table:table-cell table:style-name="ce20" office:value-type="date" office:date-value="2025-11-03">
            <text:p>11/03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14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14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14_en_US_oca.meVE.Stichera04 </text:p>
          </table:table-cell>
          <table:table-cell table:style-name="ce12" office:value-type="date" office:date-value="2025-11-04">
            <text:p>11/0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14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14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6_en_US_oca.meVE.Stichera01 </text:p>
          </table:table-cell>
          <table:table-cell table:style-name="ce14" office:value-type="date" office:date-value="2025-02-10">
            <text:p>02/1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6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6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17_en_US_oca.meVE.Stichera04 </text:p>
          </table:table-cell>
          <table:table-cell table:style-name="ce12" office:value-type="date" office:date-value="2025-02-10">
            <text:p>02/1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17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17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8_en_US_oca.meVE.Stichera01 </text:p>
          </table:table-cell>
          <table:table-cell table:style-name="ce14" office:value-type="date" office:date-value="2025-02-11">
            <text:p>02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8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18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20_en_US_oca.meVE.Stichera01 </text:p>
          </table:table-cell>
          <table:table-cell table:style-name="ce12" office:value-type="date" office:date-value="2025-02-11">
            <text:p>02/1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2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2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21_en_US_oca.meVE.Stichera01 </text:p>
          </table:table-cell>
          <table:table-cell table:style-name="ce14" office:value-type="date" office:date-value="2025-02-11">
            <text:p>02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21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2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22_en_US_oca.meVE.Stichera01 </text:p>
          </table:table-cell>
          <table:table-cell table:style-name="ce12" office:value-type="date" office:date-value="2025-02-11">
            <text:p>02/1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23_en_US_oca.meVE.Stichera01 </text:p>
          </table:table-cell>
          <table:table-cell table:style-name="ce14" office:value-type="date" office:date-value="2025-02-12">
            <text:p>02/1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23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23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25_en_US_oca.meVE.Stichera04 </text:p>
          </table:table-cell>
          <table:table-cell table:style-name="ce12" office:value-type="date" office:date-value="2025-02-12">
            <text:p>02/12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25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25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27_en_US_oca.meVE.Stichera01 </text:p>
          </table:table-cell>
          <table:table-cell table:style-name="ce14" office:value-type="date" office:date-value="2025-02-13">
            <text:p>02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27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27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29_en_US_oca.meVE.Stichera02 </text:p>
          </table:table-cell>
          <table:table-cell table:style-name="ce12" office:value-type="date" office:date-value="2025-02-14">
            <text:p>02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6.d2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30_en_US_oca.meVE.Stichera01 </text:p>
          </table:table-cell>
          <table:table-cell table:style-name="ce14" office:value-type="date" office:date-value="2025-02-14">
            <text:p>02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3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3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30_en_US_oca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6.d30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me.m06.d30_en_US_oca.meVE.Stichera06 </text:p>
          </table:table-cell>
          <table:table-cell table:style-name="ce32"/>
          <table:table-cell table:style-name="ce15" office:value-type="string">
            <text:p>goadedes</text:p>
          </table:table-cell>
          <table:table-cell table:style-name="ce32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style-name="ce46"/>
          <table:table-cell table:number-columns-repeated="1018"/>
        </table:table-row>
        <table:table-row table:style-name="ro1">
          <table:table-cell table:style-name="ce5" office:value-type="string">
            <text:p>me.m07.d01_en_US_oca.meVE.Stichera02 </text:p>
          </table:table-cell>
          <table:table-cell table:style-name="ce12" office:value-type="date" office:date-value="2024-10-30">
            <text:p>10/30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07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02_en_US_oca.meVE.Stichera01 </text:p>
          </table:table-cell>
          <table:table-cell table:style-name="ce14" office:value-type="date" office:date-value="2025-04-02">
            <text:p>04/0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0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02_en_US_oca.meVE.Stichera03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06_en_US_oca.meVE.Stichera01 </text:p>
          </table:table-cell>
          <table:table-cell table:style-name="ce33" office:value-type="date" office:date-value="2025-04-03">
            <text:p>04/0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0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06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06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07_en_US_oca.meVE.Stichera01 </text:p>
          </table:table-cell>
          <table:table-cell table:style-name="ce14" office:value-type="date" office:date-value="2025-04-04">
            <text:p>04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07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07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09_en_US_oca.meVE.Stichera01 </text:p>
          </table:table-cell>
          <table:table-cell table:style-name="ce33" office:value-type="date" office:date-value="2025-04-07">
            <text:p>04/07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09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0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12_en_US_oca.meVE.Stichera01 </text:p>
          </table:table-cell>
          <table:table-cell table:style-name="ce14" office:value-type="date" office:date-value="2025-04-07">
            <text:p>04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1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1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13_en_US_oca.meVE.Aposticha1 </text:p>
          </table:table-cell>
          <table:table-cell table:style-name="ce33" office:value-type="date" office:date-value="2025-04-08">
            <text:p>04/08/25</text:p>
          </table:table-cell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13_en_US_oca.meVE.Aposticha2 </text:p>
          </table:table-cell>
          <table:table-cell/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13_en_US_oca.meVE.Aposticha3 </text:p>
          </table:table-cell>
          <table:table-cell/>
          <table:table-cell table:style-name="ce39" office:value-type="string">
            <text:p>dedes</text:p>
          </table:table-cell>
          <table:table-cell table:style-name="ce39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14_en_US_oca.meVE.Stichera01 </text:p>
          </table:table-cell>
          <table:table-cell table:style-name="ce14" office:value-type="date" office:date-value="2025-04-08">
            <text:p>04/0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14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14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16_en_US_oca.meVE.Stichera01 </text:p>
          </table:table-cell>
          <table:table-cell table:style-name="ce33" office:value-type="date" office:date-value="2025-04-08">
            <text:p>04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17_en_US_oca.meVE.Stichera01 </text:p>
          </table:table-cell>
          <table:table-cell table:style-name="ce14" office:value-type="date" office:date-value="2025-04-09">
            <text:p>04/0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17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17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22_en_US_oca.meVE.Stichera01 </text:p>
          </table:table-cell>
          <table:table-cell table:style-name="ce33" office:value-type="date" office:date-value="2025-04-09">
            <text:p>04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26_en_US_oca.meVE.Stichera01 </text:p>
          </table:table-cell>
          <table:table-cell table:style-name="ce14" office:value-type="date" office:date-value="2025-04-09">
            <text:p>04/0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26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26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28_en_US_oca.meVE.Stichera01 </text:p>
          </table:table-cell>
          <table:table-cell table:style-name="ce33" office:value-type="date" office:date-value="2025-04-11">
            <text:p>04/1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29_en_US_oca.meVE.Stichera01 </text:p>
          </table:table-cell>
          <table:table-cell table:style-name="ce14" office:value-type="date" office:date-value="2025-04-11">
            <text:p>04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29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29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30_en_US_oca.meVE.Stichera01 </text:p>
          </table:table-cell>
          <table:table-cell table:style-name="ce33" office:value-type="date" office:date-value="2025-04-13">
            <text:p>04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7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31_en_US_oca.meVE.Stichera01 </text:p>
          </table:table-cell>
          <table:table-cell table:style-name="ce14" office:value-type="date" office:date-value="2025-04-13">
            <text:p>04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31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7.d3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1_en_US_oca.meVE.Aposticha1 </text:p>
          </table:table-cell>
          <table:table-cell table:style-name="ce33" office:value-type="date" office:date-value="2025-04-15">
            <text:p>04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1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1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1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03_en_US_oca.meVE.Stichera01 </text:p>
          </table:table-cell>
          <table:table-cell table:style-name="ce14" office:value-type="date" office:date-value="2025-04-15">
            <text:p>04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03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03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4_en_US_oca.meVE.Stichera01 </text:p>
          </table:table-cell>
          <table:table-cell table:style-name="ce33" office:value-type="date" office:date-value="2025-04-15">
            <text:p>04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4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4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05_en_US_oca.meVE.Stichera01 </text:p>
          </table:table-cell>
          <table:table-cell table:style-name="ce14" office:value-type="date" office:date-value="2025-04-16">
            <text:p>04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05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05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05_en_US_oca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05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05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8_en_US_oca.meVE.Aposticha1 </text:p>
          </table:table-cell>
          <table:table-cell table:style-name="ce33" office:value-type="date" office:date-value="2025-05-02">
            <text:p>05/02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8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8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8_en_US_oca.meVE.Stichera01 </text:p>
          </table:table-cell>
          <table:table-cell table:style-name="ce33" office:value-type="date" office:date-value="2025-05-05">
            <text:p>05/0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09_en_US_oca.meVE.Aposticha1 </text:p>
          </table:table-cell>
          <table:table-cell table:style-name="ce14" office:value-type="date" office:date-value="2025-05-06">
            <text:p>05/0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09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09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9_en_US_oca.meVE.Stichera04 </text:p>
          </table:table-cell>
          <table:table-cell table:style-name="ce33" office:value-type="date" office:date-value="2025-05-06">
            <text:p>05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0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10_en_US_oca.meVE.Stichera01 </text:p>
          </table:table-cell>
          <table:table-cell table:style-name="ce14" office:value-type="date" office:date-value="2026-01-05">
            <text:p>01/05/26</text:p>
          </table:table-cell>
          <table:table-cell table:style-name="ce15" office:value-type="string">
            <text:p>goadedes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6" office:value-type="string">
            <text:p>me.m08.d10_en_US_oca.meVE.Stichera02 </text:p>
          </table:table-cell>
          <table:table-cell table:style-name="ce30"/>
          <table:table-cell table:style-name="ce15" office:value-type="string">
            <text:p>goadedes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6" office:value-type="string">
            <text:p>me.m08.d10_en_US_oca.meVE.Stichera03 </text:p>
          </table:table-cell>
          <table:table-cell table:style-name="ce30"/>
          <table:table-cell table:style-name="ce15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me.m08.d10_en_US_oca.meVE.Stichera04 </text:p>
          </table:table-cell>
          <table:table-cell table:style-name="ce14" office:value-type="date" office:date-value="2026-01-07">
            <text:p>01/07/26</text:p>
          </table:table-cell>
          <table:table-cell table:style-name="ce15" office:value-type="string">
            <text:p>goadedes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6" office:value-type="string">
            <text:p>me.m08.d10_en_US_oca.meVE.Stichera05 </text:p>
          </table:table-cell>
          <table:table-cell table:style-name="ce30"/>
          <table:table-cell table:style-name="ce15" office:value-type="string">
            <text:p>goadedes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6" office:value-type="string">
            <text:p>me.m08.d10_en_US_oca.meVE.Stichera06 </text:p>
          </table:table-cell>
          <table:table-cell table:style-name="ce30"/>
          <table:table-cell table:style-name="ce15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e.m08.d11_en_US_oca.meVE.Stichera01 </text:p>
          </table:table-cell>
          <table:table-cell table:style-name="ce33" office:value-type="date" office:date-value="2025-05-06">
            <text:p>05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1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1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14_en_US_oca.meVE.Stichera01 </text:p>
          </table:table-cell>
          <table:table-cell table:style-name="ce14" office:value-type="date" office:date-value="2025-05-07">
            <text:p>05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14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14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14_en_US_oca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14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14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16_en_US_oca.meVE.Stichera01 </text:p>
          </table:table-cell>
          <table:table-cell table:style-name="ce33" office:value-type="date" office:date-value="2025-05-08">
            <text:p>05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16_en_US_dedes.meVE.Stichera04 </text:p>
          </table:table-cell>
          <table:table-cell table:style-name="ce34" office:value-type="string">
            <text:p>NA EP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me.m08.d16_en_US_dedes.meVE.Stichera05 </text:p>
          </table:table-cell>
          <table:table-cell table:style-name="ce34" office:value-type="string">
            <text:p>NA EP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me.m08.d16_en_US_dedes.meVE.Stichera06 </text:p>
          </table:table-cell>
          <table:table-cell table:style-name="ce34" office:value-type="string">
            <text:p>NA EP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me.m08.d16_en_US_dedes.meVE.Aposticha1</text:p>
          </table:table-cell>
          <table:table-cell table:style-name="ce33" office:value-type="date" office:date-value="2025-05-08">
            <text:p>05/08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17_en_US_oca.meVE.Stichera04 </text:p>
          </table:table-cell>
          <table:table-cell table:style-name="ce14" office:value-type="date" office:date-value="2026-01-07">
            <text:p>01/07/26</text:p>
          </table:table-cell>
          <table:table-cell table:style-name="ce30" office:value-type="string">
            <text:p>goadedes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6" office:value-type="string">
            <text:p>me.m08.d17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6" office:value-type="string">
            <text:p>me.m08.d17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e.m08.d18_en_US_oca.meVE.Stichera01 </text:p>
          </table:table-cell>
          <table:table-cell table:style-name="ce33" office:value-type="date" office:date-value="2025-05-09">
            <text:p>05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18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18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18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18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19_en_US_oca.meVE.Stichera01 </text:p>
          </table:table-cell>
          <table:table-cell table:style-name="ce14" office:value-type="date" office:date-value="2025-05-12">
            <text:p>05/1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19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19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19_en_US_oca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19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19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20_en_US_oca.meVE.Stichera01 </text:p>
          </table:table-cell>
          <table:table-cell table:style-name="ce33" office:value-type="date" office:date-value="2025-05-13">
            <text:p>05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2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2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20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2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2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21_en_US_oca.meVE.Stichera01 </text:p>
          </table:table-cell>
          <table:table-cell table:style-name="ce14" office:value-type="date" office:date-value="2025-05-13">
            <text:p>05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21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2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22_en_US_oca.meVE.Stichera01 </text:p>
          </table:table-cell>
          <table:table-cell table:style-name="ce33" office:value-type="date" office:date-value="2025-05-14">
            <text:p>05/1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24_en_US_oca.meVE.Stichera01 </text:p>
          </table:table-cell>
          <table:table-cell table:style-name="ce14" office:value-type="date" office:date-value="2025-05-14">
            <text:p>05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24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24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26_en_US_oca.meVE.Stichera01 </text:p>
          </table:table-cell>
          <table:table-cell table:style-name="ce33" office:value-type="date" office:date-value="2025-05-15">
            <text:p>05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2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2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27_en_US_oca.meVE.Stichera01 </text:p>
          </table:table-cell>
          <table:table-cell table:style-name="ce14" office:value-type="date" office:date-value="2025-05-15">
            <text:p>05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27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27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28_en_US_oca.meVE.Stichera01 </text:p>
          </table:table-cell>
          <table:table-cell table:style-name="ce33" office:value-type="date" office:date-value="2025-05-15">
            <text:p>05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8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31_en_US_oca.meVE.Stichera01 </text:p>
          </table:table-cell>
          <table:table-cell table:style-name="ce14" office:value-type="date" office:date-value="2025-05-16">
            <text:p>05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31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08.d3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01_en_US_oca.meVE.Stichera04 </text:p>
          </table:table-cell>
          <table:table-cell table:style-name="ce33" office:value-type="date" office:date-value="2025-05-19">
            <text:p>05/1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02_en_US_oca.meVE.Stichera01 </text:p>
          </table:table-cell>
          <table:table-cell table:style-name="ce35" office:value-type="date" office:date-value="2025-05-19">
            <text:p>05/19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02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02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07_en_US_oca.meVE.Aposticha1 </text:p>
          </table:table-cell>
          <table:table-cell table:style-name="ce33" office:value-type="date" office:date-value="2026-01-08">
            <text:p>01/08/26</text:p>
          </table:table-cell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e.m09.d07_en_US_oca.meVE.Aposticha2 </text:p>
          </table:table-cell>
          <table:table-cell/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e.m09.d07_en_US_oca.meVE.Aposticha3 </text:p>
          </table:table-cell>
          <table:table-cell/>
          <table:table-cell table:style-name="ce39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e.m09.d07_en_US_oca.meVE.Stichera01 </text:p>
          </table:table-cell>
          <table:table-cell table:style-name="ce33" office:value-type="date" office:date-value="2025-05-19">
            <text:p>05/1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07_en_US_oca.meVE.Stichera02 </text:p>
          </table:table-cell>
          <table:table-cell/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07_en_US_oca.meVE.Stichera03 </text:p>
          </table:table-cell>
          <table:table-cell/>
          <table:table-cell table:style-name="ce39" office:value-type="string">
            <text:p>goadedes</text:p>
          </table:table-cell>
          <table:table-cell table:style-name="ce39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07_en_US_oca.meVE.Stichera04 </text:p>
          </table:table-cell>
          <table:table-cell table:style-name="ce33" office:value-type="date" office:date-value="2026-01-08">
            <text:p>01/08/26</text:p>
          </table:table-cell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e.m09.d07_en_US_oca.meVE.Stichera05 </text:p>
          </table:table-cell>
          <table:table-cell/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e.m09.d07_en_US_oca.meVE.Stichera06 </text:p>
          </table:table-cell>
          <table:table-cell/>
          <table:table-cell table:style-name="ce39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me.m09.d09_en_US_oca.meVE.Aposticha1 </text:p>
          </table:table-cell>
          <table:table-cell table:style-name="ce37" office:value-type="date" office:date-value="2025-05-20">
            <text:p>05/2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09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09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09_en_US_oca.meVE.Stichera01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09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09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0_en_US_oca.meVE.AposGlory </text:p>
          </table:table-cell>
          <table:table-cell table:style-name="ce33" office:value-type="date" office:date-value="2025-06-06">
            <text:p>06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0_en_US_oca.meVE.Aposticha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0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0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0_en_US_oca.meVE.Stichera04 </text:p>
          </table:table-cell>
          <table:table-cell table:style-name="ce33" office:value-type="date" office:date-value="2025-06-09">
            <text:p>06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1_en_US_oca.meVE.Aposticha1 </text:p>
          </table:table-cell>
          <table:table-cell table:style-name="ce37" office:value-type="date" office:date-value="2025-06-09">
            <text:p>06/09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1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1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3_en_US_oca.meVE.Stichera04 </text:p>
          </table:table-cell>
          <table:table-cell table:style-name="ce33" office:value-type="date" office:date-value="2025-06-09">
            <text:p>06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3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3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6_en_US_oca.meVE.Aposticha1 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6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6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6_en_US_oca.meVE.Stichera01 </text:p>
          </table:table-cell>
          <table:table-cell table:style-name="ce37" office:value-type="date" office:date-value="2025-06-11">
            <text:p>06/11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6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6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6_en_US_oca.meVE.Stichera04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6_en_US_oca.meVE.Stichera05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6_en_US_oca.meVE.Stichera06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7_en_US_dedes.meVE.Aposticha2 </text:p>
          </table:table-cell>
          <table:table-cell table:style-name="ce33" office:value-type="date" office:date-value="2025-06-11">
            <text:p>06/11/25</text:p>
          </table:table-cell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7_en_US_oca.meVE.Aposticha3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7_en_US_oca.meVE.Aposticha2 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7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8_en_US_oca.meVE.Aposticha1 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8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8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8_en_US_oca.meVE.Stichera04 </text:p>
          </table:table-cell>
          <table:table-cell table:style-name="ce37" office:value-type="date" office:date-value="2025-06-12">
            <text:p>06/12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8_en_US_oca.meVE.Stichera05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18_en_US_oca.meVE.Stichera06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9_en_US_oca.meVE.Aposticha1 </text:p>
          </table:table-cell>
          <table:table-cell table:style-name="ce33" office:value-type="date" office:date-value="2025-06-10">
            <text:p>06/1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9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9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9_en_US_oca.meVE.Stichera04 </text:p>
          </table:table-cell>
          <table:table-cell table:style-name="ce33" office:value-type="date" office:date-value="2025-06-12">
            <text:p>06/12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1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20_en_US_dedes.meVE.Stichera01 </text:p>
          </table:table-cell>
          <table:table-cell table:style-name="ce37" office:value-type="date" office:date-value="2025-06-13">
            <text:p>06/13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20_en_US_dedes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20_en_US_dedes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20_en_US_oca.meVE.Aposticha1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20_en_US_oca.meVE.Aposticha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20_en_US_oca.meVE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22_en_US_oca.meVE.Stichera04 </text:p>
          </table:table-cell>
          <table:table-cell table:style-name="ce33" office:value-type="date" office:date-value="2025-06-13">
            <text:p>06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22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22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23_en_US_oca.meVE.Aposticha1 </text:p>
          </table:table-cell>
          <table:table-cell table:style-name="ce37" office:value-type="date" office:date-value="2025-06-16">
            <text:p>06/16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23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23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23_en_US_oca.meVE.Stichera01 </text:p>
          </table:table-cell>
          <table:table-cell table:style-name="ce37" office:value-type="date" office:date-value="2025-06-14">
            <text:p>06/14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23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23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26_en_US_oca.meVE.Aposticha1 </text:p>
          </table:table-cell>
          <table:table-cell table:style-name="ce33" office:value-type="date" office:date-value="2025-06-16">
            <text:p>06/1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26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26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27_en_US_oca.meVE.Stichera01 </text:p>
          </table:table-cell>
          <table:table-cell table:style-name="ce37" office:value-type="date" office:date-value="2025-06-17">
            <text:p>06/17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27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27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28_en_US_oca.meVE.Stichera01 </text:p>
          </table:table-cell>
          <table:table-cell table:style-name="ce33" office:value-type="date" office:date-value="2025-06-18">
            <text:p>06/1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09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30_en_US_oca.meVE.Stichera01 </text:p>
          </table:table-cell>
          <table:table-cell table:style-name="ce37" office:value-type="date" office:date-value="2025-06-18">
            <text:p>06/18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30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09.d30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01_en_US_dedes.meVE.SticTheotokion </text:p>
          </table:table-cell>
          <table:table-cell table:style-name="ce33" office:value-type="date" office:date-value="2026-05-26">
            <text:p>05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me.m10.d02_en_US_dedes.meVE.AposTheotokion </text:p>
          </table:table-cell>
          <table:table-cell table:style-name="ce14" office:value-type="date" office:date-value="2025-07-24">
            <text:p>07/24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03_en_US_dedes.meVE.AposTheotokion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10.d03_en_US_dedes.meVE.SticTheotokion 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me.m10.d06_en_US_oca.meVE.Aposticha1 </text:p>
          </table:table-cell>
          <table:table-cell table:style-name="ce14" office:value-type="date" office:date-value="2025-07-24">
            <text:p>07/2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06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06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07_en_US_oca.meVE.Stichera01 </text:p>
          </table:table-cell>
          <table:table-cell table:style-name="ce33" office:value-type="date" office:date-value="2025-07-24">
            <text:p>07/2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0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0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09_en_US_dedes.meVE.AposTheotokion </text:p>
          </table:table-cell>
          <table:table-cell table:style-name="ce23" office:value-type="date" office:date-value="2025-07-25">
            <text:p>07/2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09_en_US_dedes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09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09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09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10_en_US_dedes.meVE.AposStavrotheotokion </text:p>
          </table:table-cell>
          <table:table-cell table:style-name="ce33" office:value-type="date" office:date-value="2025-07-25">
            <text:p>07/2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1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10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11_en_US_oca.meVE.Stichera01 </text:p>
          </table:table-cell>
          <table:table-cell table:style-name="ce23" office:value-type="date" office:date-value="2025-07-28">
            <text:p>07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1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1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15_en_US_oca.meVE.Stichera01 </text:p>
          </table:table-cell>
          <table:table-cell table:style-name="ce33" office:value-type="date" office:date-value="2025-07-28">
            <text:p>07/2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1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1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16_en_US_oca.meVE.Stichera01 </text:p>
          </table:table-cell>
          <table:table-cell table:style-name="ce23" office:value-type="date" office:date-value="2025-07-29">
            <text:p>07/2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17_en_US_oca.meVE.Stichera01 </text:p>
          </table:table-cell>
          <table:table-cell table:style-name="ce33" office:value-type="date" office:date-value="2025-07-30">
            <text:p>07/3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17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17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17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17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19_en_US_dedes.meVE.Stichera04 </text:p>
          </table:table-cell>
          <table:table-cell table:style-name="ce15" table:number-columns-repeated="3"/>
          <table:table-cell table:number-columns-repeated="1020"/>
        </table:table-row>
        <table:table-row table:style-name="ro1">
          <table:table-cell table:style-name="ce6" office:value-type="string">
            <text:p>me.m10.d19_en_US_dedes.meVE.Stichera05 </text:p>
          </table:table-cell>
          <table:table-cell table:style-name="ce15" table:number-columns-repeated="3"/>
          <table:table-cell table:number-columns-repeated="1020"/>
        </table:table-row>
        <table:table-row table:style-name="ro1">
          <table:table-cell table:style-name="ce6" office:value-type="string">
            <text:p>me.m10.d19_en_US_dedes.meVE.Stichera06 </text:p>
          </table:table-cell>
          <table:table-cell table:style-name="ce15" table:number-columns-repeated="3"/>
          <table:table-cell table:number-columns-repeated="1020"/>
        </table:table-row>
        <table:table-row table:style-name="ro1">
          <table:table-cell table:style-name="ce6" office:value-type="string">
            <text:p>me.m10.d19_en_US_oca.meVE.Stichera01 </text:p>
          </table:table-cell>
          <table:table-cell table:style-name="ce23" office:value-type="date" office:date-value="2025-07-30">
            <text:p>07/3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21_en_US_oca.meVE.Stichera01 </text:p>
          </table:table-cell>
          <table:table-cell table:style-name="ce33" office:value-type="date" office:date-value="2025-07-31">
            <text:p>07/3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2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22_en_US_oca.meVE.Stichera01 </text:p>
          </table:table-cell>
          <table:table-cell table:style-name="ce23" office:value-type="date" office:date-value="25-07-30">
            <text:p>08/0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22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22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22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2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2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23_en_US_oca.meVE.Aposticha1 </text:p>
          </table:table-cell>
          <table:table-cell table:style-name="ce33" office:value-type="date" office:date-value="2025-08-01">
            <text:p>08/0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23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23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24_en_US_oca.meVE.Stichera01 </text:p>
          </table:table-cell>
          <table:table-cell table:style-name="ce23" office:value-type="date" office:date-value="2025-08-04">
            <text:p>08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2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2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24_en_US_dedes.meVE.SticStavro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25_en_US_oca.meVE.Stichera01 </text:p>
          </table:table-cell>
          <table:table-cell table:style-name="ce33" office:value-type="date" office:date-value="2025-08-04">
            <text:p>08/0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2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2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27_en_US_oca.meVE.Stichera04 </text:p>
          </table:table-cell>
          <table:table-cell table:style-name="ce23" office:value-type="date" office:date-value="2025-08-05">
            <text:p>08/0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27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27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28_en_US_dedes.meVE.Stichera01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" office:value-type="string">
            <text:p>me.m10.28_en_US_dedes.meVE.Stichera02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" office:value-type="string">
            <text:p>me.m10.28_en_US_dedes.meVE.Stichera03</text:p>
          </table:table-cell>
          <table:table-cell table:style-name="ce34"/>
          <table:table-cell table:number-columns-repeated="1022"/>
        </table:table-row>
        <table:table-row table:style-name="ro2">
          <table:table-cell table:style-name="ce3" office:value-type="string">
            <text:p>me.m10.28_en_US_dedes.meVE.Stichera04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" office:value-type="string">
            <text:p>me.m10.28_en_US_dedes.meVE.Stichera05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" office:value-type="string">
            <text:p>me.m10.28_en_US_dedes.meVE.Stichera06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6" office:value-type="string">
            <text:p>me.m10.d29_en_US_oca.meVE.Stichera01 </text:p>
          </table:table-cell>
          <table:table-cell table:style-name="ce23" office:value-type="date" office:date-value="2025-08-07">
            <text:p>08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2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2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30_en_US_oca.meVE.Stichera01 </text:p>
          </table:table-cell>
          <table:table-cell table:style-name="ce33" office:value-type="date" office:date-value="2025-08-07">
            <text:p>08/07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31_en_US_oca.meVE.Stichera01 </text:p>
          </table:table-cell>
          <table:table-cell table:style-name="ce23" office:value-type="date" office:date-value="2025-08-07">
            <text:p>08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3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e.m10.d3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HF_en_US_oca.meVE.Stichera01 </text:p>
          </table:table-cell>
          <table:table-cell table:style-name="ce33" office:value-type="date" office:date-value="2025-08-08">
            <text:p>08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HF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HF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HF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HF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HF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0.dHF_en_US_dedes.meVE.Apolytikion1</text:p>
          </table:table-cell>
          <table:table-cell table:style-name="ce33" office:value-type="date" office:date-value="2025-08-09">
            <text:p>08/09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01_en_US_oca.meVE.Stichera02 </text:p>
          </table:table-cell>
          <table:table-cell table:style-name="ce14" office:value-type="date" office:date-value="2024-10-30">
            <text:p>10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">
          <table:table-cell table:style-name="ce3" office:value-type="string">
            <text:p>me.m11.d0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">
          <table:table-cell table:style-name="ce3" office:value-type="string">
            <text:p>me.m11.d04_en_US_dedes.meVE.SticTheotokion </text:p>
          </table:table-cell>
          <table:table-cell table:style-name="ce24" office:value-type="date" office:date-value="2025-07-24">
            <text:p>07/24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1">
          <table:table-cell table:style-name="ce3" office:value-type="string">
            <text:p>me.m11.d05_en_US_oca.meVE.Stichera01 </text:p>
          </table:table-cell>
          <table:table-cell table:style-name="ce14" office:value-type="date" office:date-value="2024-10-30">
            <text:p>10/3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">
          <table:table-cell table:style-name="ce3" office:value-type="string">
            <text:p>me.m11.d05_en_US_oca.meVE.Stichera02 </text:p>
          </table:table-cell>
          <table:table-cell table:style-name="ce12" office:value-type="date" office:date-value="2024-10-31">
            <text:p>10/31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07_en_US_oca.meVE.Stichera01</text:p>
          </table:table-cell>
          <table:table-cell table:style-name="ce16"/>
          <table:table-cell table:style-name="ce40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07_en_US_oca.meVE.Stichera02</text:p>
          </table:table-cell>
          <table:table-cell table:style-name="ce16"/>
          <table:table-cell table:style-name="ce40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07_en_US_oca.meVE.Stichera03</text:p>
          </table:table-cell>
          <table:table-cell table:style-name="ce16"/>
          <table:table-cell table:style-name="ce40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07_en_US_oca.meVE.Stichera04</text:p>
          </table:table-cell>
          <table:table-cell table:style-name="ce16"/>
          <table:table-cell table:style-name="ce40" office:value-type="string">
            <text:p>goadedes</text:p>
          </table:table-cell>
          <table:table-cell table:style-name="ce4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07_en_US_oca.meVE.Stichera05</text:p>
          </table:table-cell>
          <table:table-cell table:style-name="ce16"/>
          <table:table-cell table:style-name="ce40" office:value-type="string">
            <text:p>goadedes</text:p>
          </table:table-cell>
          <table:table-cell table:style-name="ce4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07_en_US_oca.meVE.Stichera06</text:p>
          </table:table-cell>
          <table:table-cell table:style-name="ce16"/>
          <table:table-cell table:style-name="ce40" office:value-type="string">
            <text:p>goadedes</text:p>
          </table:table-cell>
          <table:table-cell table:style-name="ce40" office:value-type="float" office:value="8">
            <text:p>8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07_en_US_oca.meVE.SticStavrotheotokion</text:p>
          </table:table-cell>
          <table:table-cell table:style-name="ce16"/>
          <table:table-cell table:style-name="ce40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me.m11.d07_en_US_oca.meVE.AposStavrotheotokion</text:p>
          </table:table-cell>
          <table:table-cell table:style-name="ce33" office:value-type="date" office:date-value="2025-03-01">
            <text:p>03/01/25</text:p>
          </table:table-cell>
          <table:table-cell table:style-name="ce41" office:value-type="string">
            <text:p>goadedes</text:p>
          </table:table-cell>
          <table:table-cell table:style-name="ce41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10_en_US_oca.meVE.Stichera01 </text:p>
          </table:table-cell>
          <table:table-cell table:style-name="ce14" office:value-type="date" office:date-value="2024-11-01">
            <text:p>11/01/24</text:p>
          </table:table-cell>
          <table:table-cell table:style-name="ce15" office:value-type="string">
            <text:p>goadedes</text:p>
          </table:table-cell>
          <table:table-cell table:style-name="ce4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1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1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12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1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1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14_en_US_oca.meVE.Aposticha1 </text:p>
          </table:table-cell>
          <table:table-cell table:style-name="ce12" office:value-type="date" office:date-value="2024-11-03">
            <text:p>11/03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">
          <table:table-cell table:style-name="ce3" office:value-type="string">
            <text:p>me.m11.d14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">
          <table:table-cell table:style-name="ce3" office:value-type="string">
            <text:p>me.m11.d14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">
          <table:table-cell table:style-name="ce3" office:value-type="string">
            <text:p>me.m11.d14_en_US_oca.meVE.Stichera01 </text:p>
          </table:table-cell>
          <table:table-cell table:style-name="ce14" office:value-type="date" office:date-value="2024-11-01">
            <text:p>11/0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">
          <table:table-cell table:style-name="ce3" office:value-type="string">
            <text:p>me.m11.d1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">
          <table:table-cell table:style-name="ce3" office:value-type="string">
            <text:p>me.m11.d14_en_US_oca.meVE.Stichera03 </text:p>
          </table:table-cell>
          <table:table-cell table:style-name="ce12" office:value-type="date" office:date-value="2024-11-02">
            <text:p>11/02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">
          <table:table-cell table:style-name="ce3" office:value-type="string">
            <text:p>me.m11.d15_en_US_dedes.meVE.Aposticha1 </text:p>
          </table:table-cell>
          <table:table-cell table:style-name="ce14" office:value-type="date" office:date-value="2024-11-04">
            <text:p>11/04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15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15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16_en_US_oca.meVE.Aposticha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16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16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16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16_en_US_oca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10">
            <text:p>10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18_en_US_oca.meVE.Stichera01 </text:p>
          </table:table-cell>
          <table:table-cell table:style-name="ce12" office:value-type="date" office:date-value="2024-11-05">
            <text:p>11/05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1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1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18_en_US_oca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18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18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19_en_US_oca.meVE.Stichera01 </text:p>
          </table:table-cell>
          <table:table-cell table:style-name="ce23" office:value-type="date" office:date-value="2024-11-06">
            <text:p>11/06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20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2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2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4" office:value-type="string">
            <text:p>me.m11.d22_en_US_dedes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4" office:value-type="string">
            <text:p>me.m11.d22_en_US_dedes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4" office:value-type="string">
            <text:p>me.m11.d22_en_US_dedes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4" office:value-type="string">
            <text:p>me.m11.d22_en_US_dedes.meVE.Stichera04 </text:p>
          </table:table-cell>
          <table:table-cell table:style-name="ce12" office:value-type="date" office:date-value="2024-11-07">
            <text:p>11/07/24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4" office:value-type="string">
            <text:p>me.m11.d22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4" office:value-type="string">
            <text:p>me.m11.d22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me.m11.d23_en_US_dedes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3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3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3_en_US_dedes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3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3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3_en_US_oca.meVE.Aposticha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3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3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12">
            <text:p>1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1.d24_en_US_dedes.meVE.Aposticha1 </text:p>
          </table:table-cell>
          <table:table-cell table:style-name="ce14" office:value-type="date" office:date-value="2024-11-08">
            <text:p>11/08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1.d24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1.d24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1.d24_en_US_dedes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1.d24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1.d24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1.d24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1.d2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1.d2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6_en_US_goadedes.alt1.meVE.Aposticha1 </text:p>
          </table:table-cell>
          <table:table-cell table:style-name="ce12" office:value-type="date" office:date-value="2024-11-10">
            <text:p>11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6_en_US_goadedes.alt1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6_en_US_goadedes.alt1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6_en_US_goadedes.alt1.meVE.Stichera01 </text:p>
          </table:table-cell>
          <table:table-cell table:style-name="ce14" office:value-type="date" office:date-value="2024-11-08">
            <text:p>11/08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6_en_US_goadedes.alt1.meVE.Stichera02 </text:p>
          </table:table-cell>
          <table:table-cell table:style-name="ce12" office:value-type="date" office:date-value="2024-11-09">
            <text:p>11/09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6_en_US_goadedes.alt1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6_en_US_goadedes.alt1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6_en_US_goadedes.alt1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1.d26_en_US_goadedes.alt1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1.d28_en_US_dedes.meVE.Stichera04 </text:p>
          </table:table-cell>
          <table:table-cell table:style-name="ce14" office:value-type="date" office:date-value="2024-11-11">
            <text:p>11/1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1.d28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1.d28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1.d28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1.d28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1.d28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01_en_US_oca.meVE.Stichera01 </text:p>
          </table:table-cell>
          <table:table-cell table:style-name="ce12" office:value-type="date" office:date-value="2024-11-12">
            <text:p>11/12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0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02_en_US_oca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0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0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03_en_US_oca.meVE.Stichera01 </text:p>
          </table:table-cell>
          <table:table-cell table:style-name="ce14" office:value-type="date" office:date-value="2024-11-13">
            <text:p>11/13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0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0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05_en_US_oca.meVE.Aposticha2 </text:p>
          </table:table-cell>
          <table:table-cell table:style-name="ce12" office:value-type="date" office:date-value="2024-11-14">
            <text:p>11/14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05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05_en_US_oca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0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07_en_US_dedes.meVE.Stichera04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12.d07_en_US_dedes.meVE.Stichera05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12.d07_en_US_dedes.meVE.Stichera06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12.d07_en_US_dedes.meVE.SticStavrotheotokion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12.d07_en_US_dedes.meVE.SticTheotokion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12.d07_en_US_oca.meVE.Stichera01 </text:p>
          </table:table-cell>
          <table:table-cell table:style-name="ce12" office:value-type="date" office:date-value="2024-11-18">
            <text:p>11/18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07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07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08_en_US_dedes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08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08_en_US_dedes.meVE.Stichera03 </text:p>
          </table:table-cell>
          <table:table-cell table:style-name="ce14" office:value-type="date" office:date-value="2025-08-13">
            <text:p>08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08_en_US_oca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08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08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09_en_US_oca.meVE.Aposticha1 </text:p>
          </table:table-cell>
          <table:table-cell table:style-name="ce12" office:value-type="date" office:date-value="2024-11-20">
            <text:p>11/2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09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09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09_en_US_oca.meVE.Stichera01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09_en_US_oca.meVE.Stichera02 </text:p>
          </table:table-cell>
          <table:table-cell table:style-name="ce12" office:value-type="date" office:date-value="2024-11-20">
            <text:p>11/2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0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0_en_US_oca.meVE.Stichera01 </text:p>
          </table:table-cell>
          <table:table-cell table:style-name="ce14" office:value-type="date" office:date-value="2024-11-21">
            <text:p>11/2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11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1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1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2_en_US_dedes.meVE.Aposticha1 </text:p>
          </table:table-cell>
          <table:table-cell table:style-name="ce33" office:value-type="date" office:date-value="2025-08-13">
            <text:p>08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2_en_US_dedes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2_en_US_dedes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13_en_US_dedes.meVE.Aposticha1 </text:p>
          </table:table-cell>
          <table:table-cell table:style-name="ce12" office:value-type="date" office:date-value="2025-08-19">
            <text:p>08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13_en_US_dedes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13_en_US_dedes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13_en_US_dedes.meVE.Stichera01 </text:p>
          </table:table-cell>
          <table:table-cell table:style-name="ce12" office:value-type="date" office:date-value="2024-11-21">
            <text:p>11/21/24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13_en_US_dedes.meVE.Stichera02 </text:p>
          </table:table-cell>
          <table:table-cell table:style-name="ce12" office:value-type="date" office:date-value="2025-08-13">
            <text:p>08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13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13_en_US_dedes.meVE.Stichera04 </text:p>
          </table:table-cell>
          <table:table-cell table:style-name="ce12" office:value-type="date" office:date-value="2025-08-14">
            <text:p>08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13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13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4_en_US_dedes.meVE.Stichera01 </text:p>
          </table:table-cell>
          <table:table-cell table:style-name="ce38" table:number-columns-repeated="3"/>
          <table:table-cell table:number-columns-repeated="1020"/>
        </table:table-row>
        <table:table-row table:style-name="ro1">
          <table:table-cell table:style-name="ce2" office:value-type="string">
            <text:p>me.m12.d14_en_US_dedes.meVE.Stichera02 </text:p>
          </table:table-cell>
          <table:table-cell table:style-name="ce38" table:number-columns-repeated="3"/>
          <table:table-cell table:number-columns-repeated="1020"/>
        </table:table-row>
        <table:table-row table:style-name="ro1">
          <table:table-cell table:style-name="ce2" office:value-type="string">
            <text:p>me.m12.d14_en_US_dedes.meVE.Stichera03 </text:p>
          </table:table-cell>
          <table:table-cell table:style-name="ce38" table:number-columns-repeated="3"/>
          <table:table-cell table:number-columns-repeated="1020"/>
        </table:table-row>
        <table:table-row table:style-name="ro1">
          <table:table-cell table:style-name="ce2" office:value-type="string">
            <text:p>me.m12.d14_en_US_oca.meVE.Stichera04 </text:p>
          </table:table-cell>
          <table:table-cell table:style-name="ce38" table:number-columns-repeated="3"/>
          <table:table-cell table:number-columns-repeated="1020"/>
        </table:table-row>
        <table:table-row table:style-name="ro1">
          <table:table-cell table:style-name="ce2" office:value-type="string">
            <text:p>me.m12.d14_en_US_oca.meVE.Stichera05 </text:p>
          </table:table-cell>
          <table:table-cell table:style-name="ce38" table:number-columns-repeated="3"/>
          <table:table-cell table:number-columns-repeated="1020"/>
        </table:table-row>
        <table:table-row table:style-name="ro1">
          <table:table-cell table:style-name="ce2" office:value-type="string">
            <text:p>me.m12.d14_en_US_oca.meVE.Stichera06 </text:p>
          </table:table-cell>
          <table:table-cell table:style-name="ce38" table:number-columns-repeated="3"/>
          <table:table-cell table:number-columns-repeated="1020"/>
        </table:table-row>
        <table:table-row table:style-name="ro1">
          <table:table-cell table:style-name="ce3" office:value-type="string">
            <text:p>me.m12.d16_en_US_oca.meVE.Stichera01 </text:p>
          </table:table-cell>
          <table:table-cell table:style-name="ce33" office:value-type="date" office:date-value="2025-08-14">
            <text:p>08/1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dedes.alt1.meVE.Aposticha1 </text:p>
          </table:table-cell>
          <table:table-cell table:style-name="ce12" office:value-type="date" office:date-value="2024-11-25">
            <text:p>11/25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dedes.alt1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dedes.alt1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dedes.alt1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dedes.alt1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dedes.alt1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dedes.alt1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7">
            <text:p>7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dedes.meVE.Stichera01 </text:p>
          </table:table-cell>
          <table:table-cell table:style-name="ce12" office:value-type="date" office:date-value="2025-08-19">
            <text:p>08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oca.meVE.Aposticha1 </text:p>
          </table:table-cell>
          <table:table-cell table:style-name="ce12" office:value-type="date" office:date-value="2025-08-20">
            <text:p>08/2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oca.meVE.Stichera04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7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18_en_US_oca.meVE.Stichera01 </text:p>
          </table:table-cell>
          <table:table-cell table:style-name="ce33" office:value-type="date" office:date-value="2025-08-20">
            <text:p>08/2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1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9_en_US_oca.meVE.Stichera01 </text:p>
          </table:table-cell>
          <table:table-cell table:style-name="ce12" office:value-type="date" office:date-value="2025-08-20">
            <text:p>08/2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9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1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21_en_US_dedes.meVE.Stichera04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12.d21_en_US_dedes.meVE.Stichera05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12.d21_en_US_dedes.meVE.Stichera06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12.d21_en_US_oca.meVE.Aposticha1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12.d21_en_US_oca.meVE.Aposticha2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12.d21_en_US_oca.meVE.Aposticha3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12.d21_en_US_oca.meVE.Stichera01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12.d21_en_US_oca.meVE.Stichera02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e.m12.d21_en_US_oca.meVE.Stichera03 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e.m12.d22_en_US_dedes.meVE.Stichera04 </text:p>
          </table:table-cell>
          <table:table-cell table:style-name="ce12" office:value-type="date" office:date-value="2025-08-25">
            <text:p>08/2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22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22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22_en_US_oca.meVE.Aposticha1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22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22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22_en_US_oca.meVE.Stichera01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.m12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23_en_US_oca.meVE.Aposticha1 </text:p>
          </table:table-cell>
          <table:table-cell table:style-name="ce33" office:value-type="date" office:date-value="2025-08-30">
            <text:p>08/3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23_en_US_oca.meVE.Stichera01 </text:p>
          </table:table-cell>
          <table:table-cell table:style-name="ce10"/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23_en_US_oca.meVE.Stichera03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23_en_US_dedes.meVE.Stichera04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23_en_US_dedes.meVE.Stichera05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23_en_US_dedes.meVE.Stichera06 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30_en_US_dedes.meVE.Stichera01 </text:p>
          </table:table-cell>
          <table:table-cell table:style-name="ce12" office:value-type="date" office:date-value="2025-09-05">
            <text:p>09/0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30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30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30_en_US_dedes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30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30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30_en_US_oca.meVE.Aposticha1 </text:p>
          </table:table-cell>
          <table:table-cell table:style-name="ce12" office:value-type="date" office:date-value="2025-09-07">
            <text:p>09/07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3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3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AC_en_US_oca.meVE.Stichera01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AC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AC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BC_en_US_goadedes.meVE.Stichera04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BC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.m12.dBC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FF_en_US_oca.meVE.Stichera01 </text:p>
          </table:table-cell>
          <table:table-cell table:style-name="ce12" office:value-type="date" office:date-value="2024-11-18">
            <text:p>11/18/24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FF_en_US_oca.meVE.Stichera02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FF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.m12.dFF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" table:number-rows-repeated="1047282">
          <table:table-cell table:number-columns-repeated="1024"/>
        </table:table-row>
        <table:table-row table:style-name="ro3" table:number-rows-repeated="4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anion_Matins_notmetered" table:style-name="ta2" table:print="false">
        <office:forms form:automatic-focus="false" form:apply-design-mode="false"/>
        <table:table-column table:style-name="co5" table:default-cell-style-name="ce10"/>
        <table:table-column table:style-name="co2" table:number-columns-repeated="2" table:default-cell-style-name="ce31"/>
        <table:table-column table:style-name="co6" table:default-cell-style-name="ce31"/>
        <table:table-column table:style-name="co7" table:default-cell-style-name="ce39"/>
        <table:table-column table:style-name="co3" table:number-columns-repeated="1019" table:default-cell-style-name="Excel_20_Built-in_20_Normal"/>
        <table:table-row table:style-name="ro5">
          <table:table-cell table:style-name="ce1" office:value-type="string">
            <text:p>Not Metered</text:p>
          </table:table-cell>
          <table:table-cell table:style-name="ce11" office:value-type="string">
            <text:p>date done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count</text:p>
          </table:table-cell>
          <table:table-cell/>
          <table:table-cell table:style-name="ce11" office:value-type="string">
            <text:p>remaining</text:p>
          </table:table-cell>
          <table:table-cell table:number-columns-repeated="1018"/>
        </table:table-row>
        <table:table-row table:style-name="ro5">
          <table:table-cell table:style-name="ce1"/>
          <table:table-cell table:style-name="ce11"/>
          <table:table-cell table:style-name="ce49" office:value-type="string">
            <text:p>Total so far:</text:p>
          </table:table-cell>
          <table:table-cell table:style-name="ce42" table:formula="of:=SUM([.D3:.D237])" office:value-type="float" office:value="214">
            <text:p>214</text:p>
          </table:table-cell>
          <table:table-cell/>
          <table:table-cell table:style-name="ce45" table:formula="of:=239-[.D2]" office:value-type="float" office:value="25">
            <text:p>25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<text:s/>me.m01.d02_en_US_oca.meMA.Kathisma11</text:p>
          </table:table-cell>
          <table:table-cell table:style-name="ce12" office:value-type="date" office:date-value="2024-12-31">
            <text:p>12/31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1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2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2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Exaposteilarion1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LaudsGlory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LaudsBoth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11</text:p>
          </table:table-cell>
          <table:table-cell table:style-name="ce14" office:value-type="date" office:date-value="2024-12-31">
            <text:p>12/31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1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2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Exaposteilarion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Both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11</text:p>
          </table:table-cell>
          <table:table-cell table:style-name="ce14" office:value-type="date" office:date-value="2025-01-01">
            <text:p>01/01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1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Exaposteilarion2</text:p>
          </table:table-cell>
          <table:table-cell table:style-name="ce23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Both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11</text:p>
          </table:table-cell>
          <table:table-cell table:style-name="ce21" office:value-type="date" office:date-value="2025-01-05">
            <text:p>01/05/25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1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2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dedes.meMA.Kathisma2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Exaposteilarion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5">
          <table:table-cell table:style-name="ce2" office:value-type="string">
            <text:p><text:s/>me.m01.d05_en_US_oca.meMA.Lauds3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5">
          <table:table-cell table:style-name="ce2" office:value-type="string">
            <text:p><text:s/>me.m01.d05_en_US_oca.meMA.Lauds4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Glory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Both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8_en_US_oca.meMA.Kathisma21</text:p>
          </table:table-cell>
          <table:table-cell table:style-name="ce12" office:value-type="date" office:date-value="2025-01-02">
            <text:p>01/02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Kathisma11</text:p>
          </table:table-cell>
          <table:table-cell table:style-name="ce14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Exaposteilarion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Kathisma11</text:p>
          </table:table-cell>
          <table:table-cell table:style-name="ce12" office:value-type="date" office:date-value="2025-01-03">
            <text:p>01/03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1</text:p>
          </table:table-cell>
          <table:table-cell table:style-name="ce14" office:value-type="date" office:date-value="2024-01-03">
            <text:p>01/03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2</text:p>
          </table:table-cell>
          <table:table-cell table:style-name="ce23" office:value-type="date" office:date-value="2025-01-04">
            <text:p>01/04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Kathisma21</text:p>
          </table:table-cell>
          <table:table-cell table:style-name="ce33" office:value-type="date" office:date-value="2025-01-06">
            <text:p>01/06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3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Glory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1</text:p>
          </table:table-cell>
          <table:table-cell table:style-name="ce12" office:value-type="date" office:date-value="2025-01-04">
            <text:p>01/04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5_en_US_oca.meMA.Exaposteilarion3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7_en_US_oca.meMA.Exaposteilarion1</text:p>
          </table:table-cell>
          <table:table-cell table:style-name="ce12" office:value-type="date" office:date-value="2024-12-12">
            <text:p>12/12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7_en_US_oca.meMA.Exaposteilarion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21_en_US_dedes.meMA.Exaposteilarion2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3_en_US_oca.meMA.Kathisma11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3_en_US_oca.meMA.Kathisma21</text:p>
          </table:table-cell>
          <table:table-cell table:style-name="ce20" office:value-type="date" office:date-value="2025-01-10">
            <text:p>01/10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5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6_en_US_oca.meMA.Kathisma1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dedes.meMA.Kathisma11</text:p>
          </table:table-cell>
          <table:table-cell table:style-name="ce14" office:value-type="date" office:date-value="2024-12-10">
            <text:p>12/1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Exaposteilarion1</text:p>
          </table:table-cell>
          <table:table-cell table:style-name="ce14" office:value-type="date" office:date-value="2024-12-11">
            <text:p>12/11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me.m02.d17_en_US_dedes.meMA.AposTheotokion</text:p>
          </table:table-cell>
          <table:table-cell table:style-name="ce20" office:value-type="date" office:date-value="2025-01-14">
            <text:p>01/14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2.d26_en_US_andronache.alt1.meMA.Kathisma11</text:p>
          </table:table-cell>
          <table:table-cell table:style-name="ce47" office:value-type="date" office:date-value="2025-01-27">
            <text:p>01/27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Kathisma2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/>
          <table:table-cell table:style-name="ce10" office:value-type="string">
            <text:p>WHAT ABOUT KONTAKIA?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<text:s/>me.m02.d26_en_US_andronache.alt1.meMA.Exaposteilarion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 office:value-type="float" office:value="6">
            <text:p>6</text:p>
          </table:table-cell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5" office:value-type="string">
            <text:p><text:s/>me.m05.d15_en_US_oca.meMA.Exaposteilarion1</text:p>
          </table:table-cell>
          <table:table-cell table:style-name="ce12" office:value-type="date" office:date-value="2025-01-27">
            <text:p>01/27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5.d24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6.d04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6.d08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01_en_US_oca.meMA.Exaposteilarion1</text:p>
          </table:table-cell>
          <table:table-cell table:style-name="ce33" office:value-type="date" office:date-value="2025-05-05">
            <text:p>05/05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09_en_US_oca.meMA.Kathisma21</text:p>
          </table:table-cell>
          <table:table-cell table:style-name="ce35" office:value-type="date" office:date-value="2025-05-05">
            <text:p>05/05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Kathisma11</text:p>
          </table:table-cell>
          <table:table-cell table:style-name="ce33" office:value-type="date" office:date-value="2025-06-20">
            <text:p>06/20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Exaposteilarion1</text:p>
          </table:table-cell>
          <table:table-cell table:style-name="ce33" office:value-type="date" office:date-value="2025-05-20">
            <text:p>05/20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22_en_US_oca.meMA.Kathisma11</text:p>
          </table:table-cell>
          <table:table-cell table:style-name="ce37" office:value-type="date" office:date-value="2025-05-20">
            <text:p>05/20/25</text:p>
          </table:table-cell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22_en_US_oca.meMA.Kathisma21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3_en_US_oca.meMA.LaudsBoth</text:p>
          </table:table-cell>
          <table:table-cell table:style-name="ce33" office:value-type="date" office:date-value="2025-06-04">
            <text:p>06/04/25</text:p>
          </table:table-cell>
          <table:table-cell table:style-name="ce39" office:value-type="string">
            <text:p>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1</text:p>
          </table:table-cell>
          <table:table-cell table:style-name="ce37" office:value-type="date" office:date-value="2025-06-04">
            <text:p>06/04/25</text:p>
          </table:table-cell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Kathisma11</text:p>
          </table:table-cell>
          <table:table-cell table:style-name="ce33" office:value-type="date" office:date-value="2025-06-05">
            <text:p>06/05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Kathisma2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3" office:value-type="string">
            <text:p><text:s/>me.m09.d17_en_US_oca.meMA.Aposticha2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Aposticha3</text:p>
          </table:table-cell>
          <table:table-cell/>
          <table:table-cell office:value-type="string">
            <text:p>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ce10"/>
          <table:table-cell table:number-columns-repeated="2"/>
          <table:table-cell table:style-name="ce10"/>
          <table:table-cell table:number-columns-repeated="1015"/>
        </table:table-row>
        <table:table-row table:style-name="ro5">
          <table:table-cell table:style-name="ce9" office:value-type="string">
            <text:p><text:s/>me.m09.d18_en_US_oca.meMA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20_en_US_oca.meMA.Kathisma11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23_en_US_oca.meMA.Kathisma21</text:p>
          </table:table-cell>
          <table:table-cell table:style-name="ce37" office:value-type="date" office:date-value="2025-06-06">
            <text:p>06/06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me.m09.d24_en_US_dedes.meMA.AposTheotokion</text:p>
          </table:table-cell>
          <table:table-cell table:style-name="ce37" office:value-type="date" office:date-value="2025-07-24">
            <text:p>07/24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28_en_US_oca.meMA.Kathisma11</text:p>
          </table:table-cell>
          <table:table-cell table:style-name="ce33" office:value-type="date" office:date-value="2025-06-06">
            <text:p>06/06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6">
          <table:table-cell table:style-name="ce3" office:value-type="string">
            <text:p>me.m10.d01_en_US_dedes.meMA.AposTheotokion</text:p>
          </table:table-cell>
          <table:table-cell table:style-name="ce33"/>
          <table:table-cell table:style-name="ce39" table:number-columns-repeated="2"/>
          <table:table-cell table:number-columns-repeated="1020"/>
        </table:table-row>
        <table:table-row table:style-name="ro5">
          <table:table-cell table:style-name="ce9" office:value-type="string">
            <text:p><text:s/>me.m10.d06_en_US_oca.meMA.Kathisma21</text:p>
          </table:table-cell>
          <table:table-cell table:style-name="ce37" office:value-type="date" office:date-value="2025-08-11">
            <text:p>08/11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09_en_US_oca.meMA.Exaposteilarion1</text:p>
          </table:table-cell>
          <table:table-cell table:style-name="ce33" office:value-type="date" office:date-value="2024-10-24">
            <text:p>10/24/24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1_en_US_oca.meMA.Exaposteilarion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1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2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2T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0_en_US_dedes.meMA.Exaposteilarion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0_en_US_dedes.meMA.Exaposteilarion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oca.meMA.Kathisma1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oca.meMA.Kathisma2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dedes.meMA.Exaposteilarion1</text:p>
          </table:table-cell>
          <table:table-cell table:style-name="ce12" office:value-type="date" office:date-value="2024-10-25">
            <text:p>10/25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dedes.meMA.Exaposteilarion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3_en_US_dedes.meMA.Exaposteilarion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Exaposteilarion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4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Kathisma21</text:p>
          </table:table-cell>
          <table:table-cell table:style-name="ce14" office:value-type="date" office:date-value="2024-10-26">
            <text:p>10/26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Kathisma2T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1</text:p>
          </table:table-cell>
          <table:table-cell table:style-name="ce12" office:value-type="date" office:date-value="2024-10-30">
            <text:p>10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4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Kathisma11</text:p>
          </table:table-cell>
          <table:table-cell table:style-name="ce12" office:value-type="date" office:date-value="2024-11-13">
            <text:p>11/13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Kathisma2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07_en_US_dedes.meMA.Exaposteilarion1</text:p>
          </table:table-cell>
          <table:table-cell table:style-name="ce14" office:value-type="date" office:date-value="2024-11-15">
            <text:p>11/15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07_en_US_dedes.meMA.ExapTheotokion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8_en_US_dedes.meMA.Exaposteilarion1</text:p>
          </table:table-cell>
          <table:table-cell table:style-name="ce20" office:value-type="date" office:date-value="2025-08-14">
            <text:p>08/14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8_en_US_dedes.meMA.ExapTheotokion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0_en_US_oca.meMA.Exaposteilarion1</text:p>
          </table:table-cell>
          <table:table-cell table:style-name="ce14" office:value-type="date" office:date-value="2024-11-18">
            <text:p>11/18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0_en_US_dedes.meMA.ExapTheotokion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11_en_US_dedes.meMA.Exaposteilarion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11_en_US_dedes.meMA.ExapTheotokion</text:p>
          </table:table-cell>
          <table:table-cell table:style-name="ce15"/>
          <table:table-cell table:style-name="ce15" office:value-type="string">
            <text:p>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7_en_US_oca.meMA.Exaposteilarion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1</text:p>
          </table:table-cell>
          <table:table-cell table:style-name="ce12" office:value-type="date" office:date-value="2024-11-25">
            <text:p>11/25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3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3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3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me.m12.d17_en_US_dedes.alt1.meMA.Kathisma32</text:p>
          </table:table-cell>
          <table:table-cell table:number-columns-repeated="1023"/>
        </table:table-row>
        <table:table-row table:style-name="ro5">
          <table:table-cell table:style-name="ce4" office:value-type="string">
            <text:p><text:s/>me.m12.d20_en_US_oca.meMA.Kathisma11</text:p>
          </table:table-cell>
          <table:table-cell table:style-name="ce12" office:value-type="date" office:date-value="2025-08-22">
            <text:p>08/22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2</text:p>
          </table:table-cell>
          <table:table-cell table:style-name="ce12" office:value-type="date" office:date-value="2025-08-25">
            <text:p>08/25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5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Both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1_en_US_oca.meMA.Kathisma11</text:p>
          </table:table-cell>
          <table:table-cell/>
          <table:table-cell table:style-name="ce10"/>
          <table:table-cell table:number-columns-repeated="1021"/>
        </table:table-row>
        <table:table-row table:style-name="ro5">
          <table:table-cell table:style-name="ce3" office:value-type="string">
            <text:p><text:s/>me.m12.d21_en_US_oca.meMA.Kathisma2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2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3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4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Glory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Both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Aposticha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Aposticha2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Aposticha3</text:p>
          </table:table-cell>
          <table:table-cell table:number-columns-repeated="1023"/>
        </table:table-row>
        <table:table-row table:style-name="ro5">
          <table:table-cell table:style-name="ce4" office:value-type="string">
            <text:p><text:s/>me.m12.d22_en_US_oca.meMA.Kathisma11</text:p>
          </table:table-cell>
          <table:table-cell table:style-name="ce25" office:value-type="date" office:date-value="2025-08-26">
            <text:p>08/26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Kathisma21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1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2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3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4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Glory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Both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1</text:p>
          </table:table-cell>
          <table:table-cell table:style-name="ce25" office:value-type="date" office:date-value="2025-08-27">
            <text:p>08/27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2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3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Kathisma11</text:p>
          </table:table-cell>
          <table:table-cell table:style-name="ce12" office:value-type="date" office:date-value="2025-08-29">
            <text:p>08/29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dedes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dedes.meMA.Exaposteilarion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Both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1</text:p>
          </table:table-cell>
          <table:table-cell table:style-name="ce12" office:value-type="date" office:date-value="2025-08-30">
            <text:p>08/30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Exaposteilarion1</text:p>
          </table:table-cell>
          <table:table-cell table:style-name="ce33" office:value-type="date" office:date-value="2025-09-01">
            <text:p>09/01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meMA.Exaposteilarion2</text:p>
          </table:table-cell>
          <table:table-cell table:style-name="ce10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Exaposteilarion3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1</text:p>
          </table:table-cell>
          <table:table-cell table:style-name="ce33" office:value-type="date" office:date-value="2025-09-02">
            <text:p>09/02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3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4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LaudsGlory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LaudsBoth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3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12.d28_en_US_oca.meMA.Kathisma11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dedes.meMA.Kathisma21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ticha1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ticha2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ticha3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Glory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Both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4" office:value-type="string">
            <text:p><text:s/>me.m12.d29_en_US_oca.meMA.Kathisma11</text:p>
          </table:table-cell>
          <table:table-cell table:style-name="ce33" office:value-type="date" office:date-value="2025-09-04">
            <text:p>09/04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3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1</text:p>
          </table:table-cell>
          <table:table-cell table:style-name="ce12" office:value-type="date" office:date-value="2025-09-08">
            <text:p>09/08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1</text:p>
          </table:table-cell>
          <table:table-cell table:style-name="ce12" office:value-type="date" office:date-value="2025-09-05">
            <text:p>09/05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2</text:p>
          </table:table-cell>
          <table:table-cell table:style-name="ce12" office:value-type="date" office:date-value="2025-09-08">
            <text:p>09/08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" office:value-type="string">
            <text:p>Canons</text:p>
          </table:table-cell>
          <table:table-cell table:number-columns-repeated="1023"/>
        </table:table-row>
        <table:table-row table:style-name="ro3">
          <table:table-cell office:value-type="string">
            <text:p>me.m11.d01 Canon 1</text:p>
          </table:table-cell>
          <table:table-cell table:style-name="ce33" office:value-type="date" office:date-value="2026-01-27">
            <text:p>01/27/26</text:p>
          </table:table-cell>
          <table:table-cell office:value-type="string">
            <text:p>goadedes</text:p>
          </table:table-cell>
          <table:table-cell office:value-type="float" office:value="38">
            <text:p>38</text:p>
          </table:table-cell>
          <table:table-cell table:number-columns-repeated="1020"/>
        </table:table-row>
        <table:table-row table:style-name="ro3" table:number-rows-repeated="10483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are" table:style-name="ta3" table:print="false">
        <table:table-column table:style-name="co8" table:number-columns-repeated="3" table:default-cell-style-name="ce52"/>
        <table:table-column table:style-name="co9" table:default-cell-style-name="ce10"/>
        <table:table-column table:style-name="co3" table:default-cell-style-name="Excel_20_Built-in_20_Normal"/>
        <table:table-column table:style-name="co2" table:number-columns-repeated="1019" table:default-cell-style-name="ce52"/>
        <table:table-row table:style-name="ro5">
          <table:table-cell table:style-name="ce50" office:value-type="string">
            <text:p>Automelon</text:p>
          </table:table-cell>
          <table:table-cell table:style-name="ce50" office:value-type="string">
            <text:p>m06.d09</text:p>
          </table:table-cell>
          <table:table-cell table:style-name="ce50" office:value-type="string">
            <text:p>m07.d05</text:p>
          </table:table-cell>
          <table:table-cell table:number-columns-repeated="1021"/>
        </table:table-row>
        <table:table-row table:style-name="ro7"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· </text:p>
            <text:p/>
            <text:p>καὶ ἐν ἀγκάλαις ἔσχες, τὸν πάντα συνέχοντα, </text:p>
            <text:p/>
            <text:p>τὸν τροφοδότην πάντων, καὶ πλάστην καὶ Κύριον. </text:p>
            <text:p/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, </text:p>
            <text:p/>
            <text:p>καὶ ἐν ἀγκάλαις ἔσχες, τὸν πάντα συνέχοντα, </text:p>
            <text:p/>
            <text:p>καὶ ἐκ μαζῶν ἐθήλασας, τὸν πάντας ἐκτρέφοντα.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ὴ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λέκτως </text:p>
            <text:p/>
            <text:p>Μήτηρ Θεοῦ, τῷ κόσμῳ ἐκύησας, τὸν τὸν κόσμον </text:p>
            <text:p/>
            <text:p>συνέχοντα, </text:p>
            <text:p/>
            <text:p>καὶ ἐκ μαζῶν ἐθήλασας, τὸν πάντας ἐκτρέφοντα, </text:p>
            <text:p/>
            <text:p>καὶ ἐν ἀγκάλαις ἔσχες, τὸν πάντα βαστάζοντα·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ή, τὴν σὴν βοήθειαν τότε μοι δώρησαι· </text:p>
            <text:p/>
            <text:p>σὲ γὰρ ἔχω ἐλπίδα ὁ δοῦλός σου.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5">
          <table:table-cell table:style-name="ce50"/>
          <table:table-cell table:number-columns-repeated="1023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4" table:print="false">
        <table:table-column table:style-name="co10" table:number-columns-repeated="1024" table:default-cell-style-name="ce54"/>
        <table:table-row table:style-name="ro8">
          <table:table-cell table:style-name="ce53" office:value-type="string">
            <text:p>Τὴν Σοφίαν καὶ Λόγον ἐν σῇ γαστρί, συλλαβοῦσα 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ἀφράστως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ἀφλέκτως </text:p>
          </table:table-cell>
          <table:table-cell table:style-name="ce53" office:value-type="string">
            <text:p>C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Μήτηρ Θεοῦ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τῷ κόσμῳ ἐκύησας, τὸν τὸν κόσμον </text:p>
          </table:table-cell>
          <table:table-cell table:number-columns-repeated="2" table:style-name="ce53" office:value-type="string">
            <text:p>A</text:p>
          </table:table-cell>
          <table:table-cell table:style-name="ce53" office:value-type="string">
            <text:p>ἀφράστως ἀπεκύησας, τὸν τὰ π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κατέχοντα·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υνέχοντα,</text:p>
          </table:table-cell>
          <table:table-cell table:style-name="ce53" office:value-type="string">
            <text:p>ποιήσ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ἐν ἀγκάλαις ἔσχες, τὸν πάντα συνέχοντα,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καὶ ἐκ μαζῶν ἐθήλασας, τὸν πάντας ἐκτρέφοντα, </text:p>
          </table:table-cell>
          <table:table-cell table:style-name="ce53" office:value-type="string">
            <text:p>καὶ ἐν ἀγκάλαις ἔσχες, τὸν πάντα κατέχοντα 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9">
          <table:table-cell table:style-name="ce53" office:value-type="string">
            <text:p>τὸν τροφοδότην πάντων, καὶ πλάστην καὶ Κύριον. </text:p>
            <text:p/>
          </table:table-cell>
          <table:table-cell table:style-name="ce53" office:value-type="string">
            <text:p>καὶ ἐκ μαζῶν ἐθήλασας, τὸν πάντας ἐκτρέφοντα. </text:p>
          </table:table-cell>
          <table:table-cell table:style-name="ce53" office:value-type="string">
            <text:p>καὶ ἐν ἀγκάλαις ἔσχες, τὸν πάντα βαστάζοντα· </text:p>
          </table:table-cell>
          <table:table-cell table:style-name="ce53" office:value-type="string">
            <text:p>καὶ ἐκ μαζῶν ἐθήλασας, τὸν κόσμον ἐκτρέφοντα. </text:p>
          </table:table-cell>
          <table:table-cell table:style-name="ce53" office:value-type="string">
            <text:p>τὸν τροφοδότην πάντων, καὶ Πλάστην τῆς κτίσεως· </text:p>
            <text:p/>
          </table:table-cell>
          <table:table-cell table:number-columns-repeated="1019"/>
        </table:table-row>
        <table:table-row table:style-name="ro10">
          <table:table-cell table:style-name="ce53" office:value-type="string"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</text:p>
          </table:table-cell>
          <table:table-cell table:number-columns-repeated="3" table:style-name="ce53" office:value-type="string">
            <text:p>Α</text:p>
          </table:table-cell>
          <table:table-cell table:style-name="ce53" office:value-type="string">
            <text:p>Ὅθεν δυσωπῶ σε, Παναγία Παρθένε· Ἐν ὥρᾳ τῆς κρίσεως, ὅταν μέλλω παρίστασθαι, πρὸ προσώπου τοῦ Κτίστου μου. δώρησαί μοι τότε τὴν σήν, προστασίαν </text:p>
          </table:table-cell>
          <table:table-cell table:number-columns-repeated="1019"/>
        </table:table-row>
        <table:table-row table:style-name="ro6">
          <table:table-cell table:style-name="ce53" office:value-type="string">
            <text:p>τότε μοι δώρησαι·</text:p>
          </table:table-cell>
          <table:table-cell table:number-columns-repeated="2" table:style-name="ce53" office:value-type="string">
            <text:p>Α</text:p>
          </table:table-cell>
          <table:table-cell table:style-name="ce53" office:value-type="string">
            <text:p>τότε παράχσου μοι·</text:p>
          </table:table-cell>
          <table:table-cell table:style-name="ce53" office:value-type="string">
            <text:p>Δέσποινα πανάχραντε·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γὰρ δύνασαι, ὅσα θέλεις πανύμνητε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 ὁ δοῦλός σου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, ὁ ἀνάξιος δοῦλός σου.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3"/>
          <table:table-cell office:value-type="string">
            <text:p>m01.d17.Kathisma1T</text:p>
          </table:table-cell>
          <table:table-cell office:value-type="string">
            <text:p>m03.d06.Ode3T</text:p>
          </table:table-cell>
          <table:table-cell table:number-columns-repeated="1019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26">05/26/2026</text:date>, <text:time>08:2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aion_5f_Vespers_5f_notmetered" style:display-name="PageStyle_Menaion_Vespers_notmeter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anion_5f_Matins_5f_notmetered" style:display-name="PageStyle_Meanion_Matins_notmetere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e" style:display-name="PageStyle_Comp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5-26T08:21:33.64</dc:date>
    <dc:creator>Alex Dedes</dc:creator>
    <meta:generator>OpenOffice/4.1.15$Win32 OpenOffice.org_project/4115m2$Build-9813</meta:generator>
    <meta:editing-duration>PT1H34M45S</meta:editing-duration>
    <meta:editing-cycles>1</meta:editing-cycles>
    <meta:document-statistic meta:table-count="4" meta:cell-count="3749" meta:object-count="0"/>
  </office:meta>
</office:document-meta>
</file>